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style:font-name="Arial1" fo:font-size="11pt" style:font-size-asian="11pt" style:font-size-complex="11p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padding="0cm" fo:border="none"/>
      <style:text-properties style:font-name="Arial1" fo:font-size="11pt" fo:font-weight="bold" officeooo:rsid="000473f3" officeooo:paragraph-rsid="000473f3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padding="0cm" fo:border="none"/>
      <style:text-properties style:font-name="Arial1" fo:font-size="11pt" fo:font-weight="bold" officeooo:paragraph-rsid="000473f3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style:font-name="Arial1" fo:font-size="11pt" style:font-size-asian="11pt" style:font-size-complex="11pt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style:font-name="Arial1" fo:font-size="11pt" officeooo:rsid="002396cf" officeooo:paragraph-rsid="002396cf" style:font-size-asian="11pt" style:font-size-complex="11pt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style:font-name="Arial1" fo:font-size="11pt" fo:font-weight="bold" officeooo:rsid="002396cf" officeooo:paragraph-rsid="002396cf" fo:background-color="#ffff00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style:font-name="Arial1" fo:font-size="11pt" fo:font-weight="bold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style:font-name="Arial1" fo:font-size="11pt" style:font-size-asian="11pt" style:font-size-complex="11pt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style:font-name="Arial1" fo:font-size="11pt" officeooo:paragraph-rsid="000708b1" style:font-size-asian="11pt" style:font-size-complex="11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style:font-name="Arial1" fo:font-size="11pt" fo:font-weight="bold" officeooo:paragraph-rsid="000708b1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style:font-name="Arial1" fo:font-size="11pt" officeooo:rsid="00347af0" officeooo:paragraph-rsid="00347af0" style:font-size-asian="11pt" style:font-size-complex="11pt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style:font-name="Arial1" fo:font-size="11pt" officeooo:paragraph-rsid="0010efc8" style:font-size-asian="11pt" style:font-size-complex="11pt"/>
    </style:style>
    <style:style style:name="P13" style:family="paragraph" style:parent-style-name="Text_20_body" style:list-style-name="L1">
      <style:paragraph-properties fo:margin-top="0cm" fo:margin-bottom="0cm" style:contextual-spacing="false" fo:line-height="150%" fo:orphans="2" fo:widows="2" fo:padding="0cm" fo:border="none"/>
      <style:text-properties style:font-name="Arial1" fo:font-size="11pt" officeooo:rsid="0010efc8" officeooo:paragraph-rsid="0010efc8" style:font-size-asian="11pt" style:font-size-complex="11pt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size="11pt" officeooo:paragraph-rsid="00141471" style:font-size-asian="11pt" style:font-size-complex="11pt"/>
    </style:style>
    <style:style style:name="P15" style:family="paragraph" style:parent-style-name="Text_20_body" style:list-style-name="L2">
      <style:paragraph-properties fo:margin-top="0cm" fo:margin-bottom="0cm" style:contextual-spacing="false" fo:line-height="150%" fo:orphans="2" fo:widows="2" fo:padding="0cm" fo:border="none"/>
      <style:text-properties style:font-name="Arial1" fo:font-size="11pt" fo:font-weight="bold" officeooo:rsid="00141471" officeooo:paragraph-rsid="00141471" style:font-size-asian="11pt" style:font-weight-asian="bold" style:font-size-complex="11pt" style:font-weight-complex="bold"/>
    </style:style>
    <style:style style:name="P16" style:family="paragraph" style:parent-style-name="Text_20_body" style:list-style-name="L3">
      <style:paragraph-properties fo:margin-top="0cm" fo:margin-bottom="0cm" style:contextual-spacing="false" fo:line-height="150%" fo:orphans="2" fo:widows="2" fo:padding="0cm" fo:border="none"/>
      <style:text-properties style:font-name="Arial1" fo:font-size="11pt" officeooo:rsid="0036d519" officeooo:paragraph-rsid="0036d519" style:font-size-asian="11pt" style:font-size-complex="11pt"/>
    </style:style>
    <style:style style:name="P17" style:family="paragraph" style:parent-style-name="Text_20_body" style:list-style-name="L4">
      <style:paragraph-properties fo:margin-top="0cm" fo:margin-bottom="0cm" style:contextual-spacing="false" fo:line-height="150%" fo:orphans="2" fo:widows="2" fo:padding="0cm" fo:border="none"/>
      <style:text-properties style:font-name="Arial1" fo:font-size="11pt" officeooo:rsid="00141471" officeooo:paragraph-rsid="00141471" style:font-size-asian="11pt" style:font-size-complex="11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size="11pt" style:font-size-asian="11pt" style:font-size-complex="11pt"/>
    </style:style>
    <style:style style:name="P19" style:family="paragraph" style:parent-style-name="Text_20_body" style:list-style-name="L5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style:font-name="Arial1" fo:font-size="11pt" style:font-size-asian="11pt" style:font-size-complex="11pt"/>
    </style:style>
    <style:style style:name="P20" style:family="paragraph" style:parent-style-name="Text_20_body" style:list-style-name="L5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style:font-name="Arial1" fo:font-size="11pt" style:font-size-asian="11pt" style:font-size-complex="11pt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padding="0cm" fo:border="none"/>
      <style:text-properties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00473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08b1"/>
    </style:style>
    <style:style style:name="T4" style:family="text">
      <style:text-properties officeooo:rsid="0010efc8"/>
    </style:style>
    <style:style style:name="T5" style:family="text">
      <style:text-properties officeooo:rsid="00347af0"/>
    </style:style>
    <style:style style:name="T6" style:family="text">
      <style:text-properties officeooo:rsid="00141471"/>
    </style:style>
    <style:style style:name="T7" style:family="text">
      <style:text-properties style:font-name="Arial1"/>
    </style:style>
    <style:style style:name="T8" style:family="text">
      <style:text-properties style:font-name="Arial1" fo:font-weight="bold" style:font-weight-asian="bold" style:font-weight-complex="bold"/>
    </style:style>
    <style:style style:name="T9" style:family="text">
      <style:text-properties officeooo:rsid="0036d519"/>
    </style:style>
    <style:style style:name="T10" style:family="text">
      <style:text-properties officeooo:rsid="002396cf"/>
    </style:style>
    <style:style style:name="T11" style:family="text">
      <style:text-properties style:font-name="Arial1" officeooo:rsid="002396cf"/>
    </style:style>
    <style:style style:name="T12" style:family="text">
      <style:text-properties style:font-name="Arial1" fo:font-weight="bold" officeooo:rsid="002396cf" style:font-weight-asian="bold" style:font-weight-complex="bold"/>
    </style:style>
    <style:style style:name="T13" style:family="text">
      <style:text-properties fo:font-weight="bold" officeooo:rsid="000708b1" style:font-weight-asian="bold" style:font-weight-complex="bold"/>
    </style:style>
    <style:style style:name="T14" style:family="text">
      <style:text-properties officeooo:rsid="0037c832" fo:background-color="#ffe994" loext:char-shading-value="0"/>
    </style:style>
    <style:style style:name="T15" style:family="text">
      <style:text-properties fo:font-weight="bold" officeooo:rsid="00347af0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IFES</text:p>
      <text:p text:style-name="P3"><text:span text:style-name="T1">T</text:span>rabalho de <text:span text:style-name="T1">Administração Financeira</text:span></text:p>
      <text:p text:style-name="P2">Prof. Luiz Fernando Dalmonech</text:p>
      <text:p text:style-name="P3"/>
      <text:p text:style-name="P4"><text:tab/><text:span text:style-name="T1">Pr</text:span>oposta de estrutura para o trabalho, dividida entre o Relatório Técnico (texto) e a Apresentação de Slides, além de um roteiro de execução para o grupo.</text:p>
      <text:p text:style-name="P5"/>
      <text:p text:style-name="P6">Entrega: dia 25 de junho de 2026</text:p>
      <text:p text:style-name="P4"/>
      <text:p text:style-name="P7"><text:span text:style-name="T1">1. </text:span>Estrutura Sugerida para o Relatório (Texto)</text:p>
      <text:p text:style-name="P8"/>
      <text:p text:style-name="P9"><text:span text:style-name="T1">1.</text:span>1. <text:span text:style-name="T2">Elementos Pré-Textuais</text:span></text:p>
      <text:p text:style-name="P10"/>
      <text:p text:style-name="P9"><text:span text:style-name="T2"><text:tab/>Capa e Folha de Rosto: </text:span>Nome da instituição, curso, disciplina (Fundamentos <text:span text:style-name="T3">da Administração Financeira, </text:span>turma (M3), título do trabalho, nome dos componentes do grupo e data. <text:span text:style-name="T4">Ver formatação no Manual de Normas do Ifes.</text:span></text:p>
      <text:p text:style-name="P9"/>
      <text:p text:style-name="P11">Nota: usar 6 empresas. As empresas selecionadas precisam de ter disponibilizados todas as informações necessárias para a análise.</text:p>
      <text:p text:style-name="P8"/>
      <text:p text:style-name="P8"><text:span text:style-name="T1">1.</text:span>2. <text:span text:style-name="T2">Introdução</text:span></text:p>
      <text:p text:style-name="P7"/>
      <text:p text:style-name="P8"><text:s text:c="4"/>• <text:span text:style-name="T2">Apresentação do Setor:</text:span> Justificativa da escolha do ramo/setor econômico (ex: varejo, energia elétrica, saúde).</text:p>
      <text:p text:style-name="P12"><text:s text:c="4"/>• <text:span text:style-name="T2">Perfil das Empresas</text:span>: Breve apresentação das <text:span text:style-name="T5">6</text:span> empresas selecionadas (nome, ticker da bolsa, subsetor de atuação). </text:p>
      <text:list text:style-name="L1">
        <text:list-item>
          <text:p text:style-name="P13">Destacar aspectos Macroeconômicos e microeconômicos (ver Radar Econômico <text:span text:style-name="T6">da Fiesp, SEBRAE, etc...</text:span>). </text:p>
        </text:list-item>
      </text:list>
      <text:p text:style-name="P14"><text:span text:style-name="T7"><text:s text:c="4"/>• </text:span><text:span text:style-name="T8">Objetivo do Trabalho:</text:span><text:span text:style-name="T7"> Explicar que o relatório visa analisar a evolução patrimonial e de resultados das empresas ao longo de 6 anos através das técnicas de AH e AV. </text:span></text:p>
      <text:list text:style-name="L2">
        <text:list-item>
          <text:p text:style-name="P15">Nesta análise usar dados trimestrais e anuais <text:span text:style-name="T9">dos últimos 6 anos</text:span>.</text:p>
        </text:list-item>
      </text:list>
      <text:p text:style-name="P8"/>
      <text:p text:style-name="P7"><text:span text:style-name="T1">1.</text:span>3. Metodologia</text:p>
      <text:p text:style-name="P8"><text:s text:c="4"/>• <text:span text:style-name="T2">Coleta de Dados:</text:span> Fontes dos dados (ex: site de RI das empresas, B3, ou CVM).</text:p>
      <text:p text:style-name="P8"><text:s text:c="4"/>• <text:span text:style-name="T2">Ferramentas Utilizadas:</text:span> Menção ao uso de planilhas eletrônicas (como o LibreOffice Calc ou Excel) para o processamento dos dados.</text:p>
      <text:p text:style-name="P8"><text:soft-page-break/><text:s text:c="4"/>• <text:span text:style-name="T2">Conceituação Breve</text:span>: Explicação rápida de como a Análise Vertical (AV) e a Análise Horizontal (AH) foram aplicadas nas demonstrações (Balanço Patrimonial – <text:span text:style-name="T6">BP </text:span>e D<text:span text:style-name="T6">emonstração do Resultado do Exercício – DRE</text:span>).</text:p>
      <text:list text:style-name="L3">
        <text:list-item>
          <text:p text:style-name="P16">Necessário diagnóstico e prognóstico.</text:p>
        </text:list-item>
      </text:list>
      <text:p text:style-name="P8"/>
      <text:p text:style-name="P8"/>
      <text:p text:style-name="P7"><text:span text:style-name="T3">1.</text:span>4. Análise dos Dados (O Coração do Trabalho)</text:p>
      <text:p text:style-name="P8"/>
      <text:p text:style-name="P8"><text:tab/> Use gráficos para resumir as tendências e anexe as tabelas completas no final.</text:p>
      <text:p text:style-name="P8"><text:s text:c="4"/>• <text:s/>Análise <text:span text:style-name="T6">Trimestral e </text:span><text:span text:style-name="T10">Análise </text:span>Anual Consolidad<text:span text:style-name="T3">a</text:span> <text:span text:style-name="T10">dos últimos </text:span>6 anos <text:span text:style-name="T10">completos</text:span>:</text:p>
      <text:p text:style-name="P8"><text:s text:c="8"/>◦ Comparativo da evolução da receita líquida, lucro líquido e margens das <text:span text:style-name="T10">6</text:span> empresas <text:span text:style-name="T10">escolhidas</text:span>. </text:p>
      <text:p text:style-name="P8"><text:s text:c="8"/>◦ Estrutura de Ativos e Passivos (AV): Quem é mais intensiva em capital fixo? Quem usa mais capital de terceiros?</text:p>
      <text:p text:style-name="P8"><text:s text:c="4"/>• Análise Trimestral (Sazonalidade e Tendências):</text:p>
      <text:p text:style-name="P8"><text:s text:c="8"/>◦ Destaque para o comportamento dos trimestres. O setor possui sazonalidade? (Ex: o varejo costuma ter um 4º trimestre mais forte devido ao Natal <text:s/><text:span text:style-name="T10">e outros eventos</text:span>.</text:p>
      <text:list text:style-name="L4">
        <text:list-item>
          <text:p text:style-name="P17">Lembrar que para o quarto trimestre é necessário subtrair os três trimestres do valor anual <text:span text:style-name="T10">(caso não esteja em separado)</text:span>.</text:p>
        </text:list-item>
      </text:list>
      <text:p text:style-name="P8"/>
      <text:p text:style-name="P8"><text:span text:style-name="T3">1.4.1</text:span> <text:s text:c="3"/>Análise Individual Relevante:</text:p>
      <text:p text:style-name="P8"><text:s text:c="8"/>◦ Destaques de eventos marcantes que a AH e a AV revelaram (ex: um pico de endividamento no ano X devido a uma expansão, ou queda de margem no trimestre Y).</text:p>
      <text:p text:style-name="P8"/>
      <text:p text:style-name="P7"><text:span text:style-name="T3">1.</text:span>5. Conclusão / Considerações Finais</text:p>
      <text:p text:style-name="P18"><text:span text:style-name="T7"><text:s text:c="4"/>• Diagnóstico do Setor: Qual das </text:span><text:span text:style-name="T11">6</text:span><text:span text:style-name="T7"> empresas apresentou a melhor eficiência operacional e saúde financeira ao longo desses 6 anos? </text:span><text:span text:style-name="T12">Utilizar as variáveis do modelo DuPont e Modelo Fleuriet para a análise e conclusão.</text:span></text:p>
      <text:p text:style-name="P8"><text:s text:c="4"/>• Síntese das Descobertas: Como os fatores macroeconômicos do período afetaram o ramo escolhido de forma geral?</text:p>
      <text:p text:style-name="P8"/>
      <text:p text:style-name="P8"><text:span text:style-name="T3">1.</text:span>6. Elementos Pós-Textuais</text:p>
      <text:p text:style-name="P8"><text:s text:c="4"/>• Referências: Fontes das demonstrações financeiras.</text:p>
      <text:p text:style-name="P8"><text:s text:c="4"/>• Apêndices / Anexos: Links ou as tabelas completas de AH e AV geradas pelo grupo.</text:p>
      <text:p text:style-name="P8"/>
      <text:p text:style-name="P8"><text:span text:style-name="T13">2. </text:span><text:span text:style-name="T2">Estrutura Sugerida para a Apresentação (Slides)</text:span></text:p>
      <text:p text:style-name="P4">Para uma apresentação dinâmica e que não seja cansativa, foque em gráficos comparativos em vez de tabelas cheias de números miúdos.</text:p>
      <text:list text:style-name="L5">
        <text:list-item>
          <text:p text:style-name="P19"><text:soft-page-break/>Slide 1: Capa (Título, Turma M3, Disciplina e Nome dos Integrantes).</text:p>
        </text:list-item>
        <text:list-item>
          <text:p text:style-name="P19">Slide 2: Contextualização (O setor escolhido e por que ele é interessante).</text:p>
        </text:list-item>
        <text:list-item>
          <text:p text:style-name="P19">Slide 3: As <text:span text:style-name="T5">6</text:span> Empresas (Logos e breve perfil de cada uma).</text:p>
        </text:list-item>
        <text:list-item>
          <text:p text:style-name="P19">Slide 4: Aspectos Metodológicos (Amostra de 6 anos, cortes anuais e trimestrais).</text:p>
        </text:list-item>
        <text:list-item>
          <text:p text:style-name="P19">Slide 5: Análise Horizontal (Evolução) (Gráfico de linhas mostrando o crescimento da Receita e Lucro das <text:span text:style-name="T5">6</text:span> empresas “lado a lado” ao longo dos 6 anos).</text:p>
        </text:list-item>
        <text:list-item>
          <text:p text:style-name="P19">Slide 6: Análise Vertical (Estrutura) (Gráfico de barras empilhadas mostrando a composição do Ativo ou do Passivo das empresas para comparar as estruturas patrimoniais).</text:p>
        </text:list-item>
        <text:list-item>
          <text:p text:style-name="P19">Slide 7: O Impacto dos Trimestres (Gráfico demonstrando a oscilação trimestral e a sazonalidade do setor).</text:p>
        </text:list-item>
        <text:list-item>
          <text:p text:style-name="P19">Slide 8: Conclusão Geral (O veredicto" do grupo sobre o desempenho do setor e os destaques positivo e negativo entre as empresas).</text:p>
          <text:p text:style-name="P20"/>
        </text:list-item>
      </text:list>
      <text:p text:style-name="P7"><text:span text:style-name="T3">3. </text:span>Roteiro de Execução para o Grupo</text:p>
      <text:p text:style-name="P8"><text:tab/>Para que o grupo trabalhe em sintonia e ninguém fique sobrecarregado, sugiro os seguintes passos:</text:p>
      <text:p text:style-name="P8"><text:s text:c="3"/><text:span text:style-name="T2"><text:s/>1. Definição do Ramo:</text:span> Escolham um setor listado na B3 que seja padronizado e fácil de analisar (geralmente Energia Elétrica ou Saneamento são ótimos por serem mais estáveis; Varejo é excelente para ver sazonalidade trimestral).</text:p>
      <text:p text:style-name="P8"><text:s/><text:span text:style-name="T2"><text:s text:c="3"/>2. Divisão das Empresas:</text:span> Como há dados para cada elemento do grupo, cada integrante pode ficar responsável por baixar e estruturar os dados de uma (ou duas) empresas na planilha.</text:p>
      <text:p text:style-name="P8"><text:s text:c="4"/><text:span text:style-name="T2">3. Padronização da Planilha:</text:span> Criem um modelo de planilha padrão para que todos façam as fórmulas de AH e AV da mesma forma. Isso facilitará muito na hora de juntar tudo em gráficos comparativos. <text:span text:style-name="T14">(Entregar a(s) planilha(s) quando da entrega do relatório. </text:span></text:p>
      <text:p text:style-name="P8"><text:s text:c="3"/><text:span text:style-name="T2"><text:s text:c="5"/>◦ Lembrete técnico:</text:span> Na Análise Vertical do Balanço, a base (100%) é o Total do Ativo/Passivo. Na DRE, a base é a Receita Líquida <text:span text:style-name="T3">(ou bruta)</text:span>. Na Análise Horizontal, definam o ano 1 (ou o primeiro trimestre) como base (100%) ou façam a análise ano a ano (em cadeia).</text:p>
      <text:p text:style-name="P11"><text:span text:style-name="T2">4. Redação e Consolidação:</text:span> lembrar que é preciso fechar com o diagnóstico e prognóstico.</text:p>
      <text:p text:style-name="P8"><text:span text:style-name="T15">5</text:span><text:span text:style-name="T2">. Redação e Consolidação:</text:span> Unam os<text:span text:style-name="T16"> insights </text:span>de cada empresa para extrair a análise do setor que vai para o relatório final. </text:p>
      <text:p text:style-name="P8"/>
      <text:p text:style-name="P21">S<text:span text:style-name="T17">e precisar de ajuda com modelos de fórmulas para a planilha, ideias de setores ou formatos de gráficos para ilustrar as análises, é só avisar!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0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0T06:36:15.370000000</meta:creation-date>
    <dc:date>2026-06-25T14:14:28.631479800</dc:date>
    <meta:editing-duration>PT50M16S</meta:editing-duration>
    <meta:editing-cycles>12</meta:editing-cycles>
    <meta:generator>LibreOffice/25.8.6.2$Windows_X86_64 LibreOffice_project/b4b39682cd9868fa725bc664aff94278d315bd04</meta:generator>
    <meta:document-statistic meta:table-count="0" meta:image-count="0" meta:object-count="0" meta:page-count="3" meta:paragraph-count="56" meta:word-count="916" meta:character-count="5731" meta:non-whitespace-character-count="4765"/>
  </office:meta>
</office:document-meta>
</file>