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780F202B3DFA313DA5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 style:master-page-name="">
      <style:table-properties style:width="15cm" style:page-number="auto" fo:break-before="auto" fo:break-after="auto" table:align="left" fo:keep-with-next="auto" style:writing-mode="lr-tb"/>
    </style:style>
    <style:style style:name="Tabela1.A" style:family="table-column">
      <style:table-column-properties style:column-width="5.115cm"/>
    </style:style>
    <style:style style:name="Tabela1.B" style:family="table-column">
      <style:table-column-properties style:column-width="9.885cm"/>
    </style:style>
    <style:style style:name="Tabela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ela1.B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ela2" style:family="table" style:master-page-name="">
      <style:table-properties style:width="15cm" style:page-number="auto" fo:break-before="auto" fo:break-after="auto" table:align="left" fo:keep-with-next="auto" style:writing-mode="lr-tb"/>
    </style:style>
    <style:style style:name="Tabela2.A" style:family="table-column">
      <style:table-column-properties style:column-width="2.97cm"/>
    </style:style>
    <style:style style:name="Tabela2.B" style:family="table-column">
      <style:table-column-properties style:column-width="3.089cm"/>
    </style:style>
    <style:style style:name="Tabela2.C" style:family="table-column">
      <style:table-column-properties style:column-width="2.071cm"/>
    </style:style>
    <style:style style:name="Tabela2.D" style:family="table-column">
      <style:table-column-properties style:column-width="2.658cm"/>
    </style:style>
    <style:style style:name="Tabela2.E" style:family="table-column">
      <style:table-column-properties style:column-width="4.212cm"/>
    </style:style>
    <style:style style:name="Tabela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ela2.E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eading_20_2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margin-top="0cm" fo:margin-bottom="0.247cm" style:contextual-spacing="false" fo:line-height="114%"/>
      <style:text-properties style:font-name="Times New Roman" fo:font-size="12pt" style:font-size-asian="12pt" style:font-size-complex="12pt"/>
    </style:style>
    <style:style style:name="P4" style:family="paragraph" style:parent-style-name="Heading_20_2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7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4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</style:style>
    <style:style style:name="P17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95270"/>
    </style:style>
    <style:style style:name="P18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19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20" style:family="paragraph" style:parent-style-name="Heading_20_3">
      <style:paragraph-properties fo:margin-top="0cm" fo:margin-bottom="0.247cm" style:contextual-spacing="false" fo:line-height="114%"/>
      <style:text-properties style:font-name="Times New Roman" fo:font-size="12pt" style:font-size-asian="12pt" style:font-size-complex="12pt"/>
    </style:style>
    <style:style style:name="P21" style:family="paragraph" style:parent-style-name="Heading_20_3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Heading_20_3">
      <style:text-properties style:font-name="Times New Roman" fo:font-size="12pt" style:font-size-asian="12pt" style:font-size-complex="12pt"/>
    </style:style>
    <style:style style:name="P23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Horizontal_20_Line">
      <style:text-properties style:font-name="Times New Roman" fo:font-size="12pt" style:font-size-asian="12pt" style:font-size-complex="12pt"/>
    </style:style>
    <style:style style:name="P25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27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8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9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0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1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2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3" style:family="paragraph" style:parent-style-name="Preformatted_20_Text">
      <style:paragraph-properties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34" style:family="paragraph" style:parent-style-name="Preformatted_20_Text">
      <style:paragraph-properties fo:margin-top="0cm" fo:margin-bottom="0cm" style:contextual-spacing="false" fo:line-height="114%"/>
    </style:style>
    <style:style style:name="P35" style:family="paragraph" style:parent-style-name="Preformatted_20_Text">
      <style:paragraph-properties fo:margin-top="0cm" fo:margin-bottom="0.499cm" style:contextual-spacing="false"/>
    </style:style>
    <style:style style:name="P36" style:family="paragraph" style:parent-style-name="Preformatted_20_Text">
      <style:paragraph-properties fo:margin-top="0cm" fo:margin-bottom="0cm" style:contextual-spacing="false" fo:line-height="114%" fo:orphans="2" fo:widows="2" fo:break-before="auto" fo:break-after="auto" fo:padding="0cm" fo:border="none" fo:keep-with-next="auto"/>
      <style:text-properties style:font-name="Times New Roman" fo:font-size="12pt" style:font-size-asian="12pt" style:font-size-complex="12pt"/>
    </style:style>
    <style:style style:name="P37" style:family="paragraph" style:parent-style-name="Preformatted_20_Text">
      <style:text-properties style:font-name="Times New Roman" fo:font-size="12pt" style:font-size-asian="12pt" style:font-size-complex="12pt"/>
    </style:style>
    <style:style style:name="P38" style:family="paragraph" style:parent-style-name="Quotations" style:master-page-name="">
      <style:paragraph-properties fo:margin-left="2.058cm" fo:margin-right="2.058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39" style:family="paragraph" style:parent-style-name="Quotations" style:master-page-name="">
      <style:paragraph-properties fo:margin-left="2.058cm" fo:margin-right="2.058cm" fo:margin-top="0cm" fo:margin-bottom="0cm" style:contextual-spacing="false" fo:line-height="114%" fo:text-align="justify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40" style:family="paragraph" style:parent-style-name="Quotations" style:master-page-name="">
      <style:paragraph-properties fo:margin-left="2.058cm" fo:margin-right="2.058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text-properties style:font-name="Times New Roman" fo:font-size="12pt" style:font-size-asian="12pt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Standard">
      <style:text-properties style:font-name="Times New Roman" fo:font-size="12pt" officeooo:paragraph-rsid="00195270" style:font-size-asian="12pt" style:font-size-complex="12pt"/>
    </style:style>
    <style:style style:name="P48" style:family="paragraph" style:parent-style-name="Standard" style:list-style-name="WWNum2">
      <style:text-properties style:font-name="Times New Roman" fo:font-size="12pt" style:font-size-asian="12pt" style:font-size-complex="12pt"/>
    </style:style>
    <style:style style:name="P49" style:family="paragraph" style:parent-style-name="Standard" style:list-style-name="WWNum3">
      <style:text-properties style:font-name="Times New Roman" fo:font-size="12pt" style:font-size-asian="12pt" style:font-size-complex="12pt"/>
    </style:style>
    <style:style style:name="P50" style:family="paragraph" style:parent-style-name="Standard" style:list-style-name="WWNum4">
      <style:text-properties style:font-name="Times New Roman" fo:font-size="12pt" style:font-size-asian="12pt" style:font-size-complex="12pt"/>
    </style:style>
    <style:style style:name="P51" style:family="paragraph" style:parent-style-name="Standard" style:list-style-name="WWNum5">
      <style:text-properties style:font-name="Times New Roman" fo:font-size="12pt" style:font-size-asian="12pt" style:font-size-complex="12pt"/>
    </style:style>
    <style:style style:name="P52" style:family="paragraph" style:parent-style-name="Standard">
      <style:paragraph-properties fo:margin-left="0cm" fo:margin-right="0cm" fo:text-indent="0.635cm" style:auto-text-indent="false"/>
      <style:text-properties style:font-name="Times New Roman" fo:font-size="12pt" style:font-size-asian="12pt" style:font-size-complex="12pt"/>
    </style:style>
    <style:style style:name="P53" style:family="paragraph" style:parent-style-name="Standard" style:list-style-name="WWNum6">
      <style:text-properties style:font-name="Times New Roman" fo:font-size="12pt" style:font-size-asian="12pt" style:font-size-complex="12pt"/>
    </style:style>
    <style:style style:name="P54" style:family="paragraph" style:parent-style-name="Standard" style:list-style-name="WWNum7">
      <style:text-properties style:font-name="Times New Roman" fo:font-size="12pt" style:font-size-asian="12pt" style:font-size-complex="12pt"/>
    </style:style>
    <style:style style:name="P55" style:family="paragraph" style:parent-style-name="Standard" style:list-style-name="WWNum8">
      <style:text-properties style:font-name="Times New Roman" fo:font-size="12pt" style:font-size-asian="12pt" style:font-size-complex="12pt"/>
    </style:style>
    <style:style style:name="P56" style:family="paragraph" style:parent-style-name="Standard" style:list-style-name="WWNum9">
      <style:text-properties style:font-name="Times New Roman" fo:font-size="12pt" style:font-size-asian="12pt" style:font-size-complex="12pt"/>
    </style:style>
    <style:style style:name="P57" style:family="paragraph" style:parent-style-name="Standard" style:list-style-name="WWNum10">
      <style:text-properties style:font-name="Times New Roman" fo:font-size="12pt" style:font-size-asian="12pt" style:font-size-complex="12pt"/>
    </style:style>
    <style:style style:name="P58" style:family="paragraph" style:parent-style-name="Standard" style:list-style-name="WWNum11">
      <style:text-properties style:font-name="Times New Roman" fo:font-size="12pt" style:font-size-asian="12pt" style:font-size-complex="12pt"/>
    </style:style>
    <style:style style:name="P59" style:family="paragraph" style:parent-style-name="Standard" style:list-style-name="WWNum12">
      <style:text-properties style:font-name="Times New Roman" fo:font-size="12pt" style:font-size-asian="12pt" style:font-size-complex="12pt"/>
    </style:style>
    <style:style style:name="P60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 style:font-size-complex="12pt"/>
    </style:style>
    <style:style style:name="P61" style:family="paragraph" style:parent-style-name="Standard" style:list-style-name="WWNum13">
      <style:text-properties style:font-name="Times New Roman" fo:font-size="12pt" style:font-size-asian="12pt" style:font-size-complex="12pt"/>
    </style:style>
    <style:style style:name="P62" style:family="paragraph" style:parent-style-name="Standard" style:list-style-name="WWNum14">
      <style:text-properties style:font-name="Times New Roman" fo:font-size="12pt" style:font-size-asian="12pt" style:font-size-complex="12pt"/>
    </style:style>
    <style:style style:name="P63" style:family="paragraph" style:parent-style-name="Standard" style:list-style-name="WWNum15">
      <style:text-properties style:font-name="Times New Roman" fo:font-size="12pt" style:font-size-asian="12pt" style:font-size-complex="12pt"/>
    </style:style>
    <style:style style:name="P64" style:family="paragraph" style:parent-style-name="Standard" style:list-style-name="WWNum16">
      <style:text-properties style:font-name="Times New Roman" fo:font-size="12pt" style:font-size-asian="12pt" style:font-size-complex="12pt"/>
    </style:style>
    <style:style style:name="P65" style:family="paragraph" style:parent-style-name="Standard" style:list-style-name="WWNum17">
      <style:text-properties style:font-name="Times New Roman" fo:font-size="12pt" style:font-size-asian="12pt" style:font-size-complex="12pt"/>
    </style:style>
    <style:style style:name="P66" style:family="paragraph" style:parent-style-name="Standard" style:list-style-name="WWNum18">
      <style:text-properties style:font-name="Times New Roman" fo:font-size="12pt" style:font-size-asian="12pt" style:font-size-complex="12pt"/>
    </style:style>
    <style:style style:name="P67" style:family="paragraph" style:parent-style-name="Standard" style:list-style-name="WWNum19">
      <style:text-properties style:font-name="Times New Roman" fo:font-size="12pt" style:font-size-asian="12pt" style:font-size-complex="12pt"/>
    </style:style>
    <style:style style:name="P6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bold" officeooo:rsid="0014b468" officeooo:paragraph-rsid="0014b468" fo:background-color="#ffff00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2pt" fo:font-weight="bold" style:font-size-asian="12pt" style:font-size-complex="12pt" loext:padding="0cm" loext:border="none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Times New Roman" fo:font-size="12pt" fo:font-weight="bold" style:font-size-asian="12pt" style:font-size-complex="12pt" loext:padding="0cm" loext:border="none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2pt" style:font-size-asian="12pt" style:font-size-complex="12pt" loext:padding="0cm" loext:border="none"/>
    </style:style>
    <style:style style:name="P76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Times New Roman" fo:font-size="12pt" style:font-size-asian="12pt" style:font-size-complex="12pt" loext:padding="0cm" loext:border="none"/>
    </style:style>
    <style:style style:name="P7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1f1f1f" loext:opacity="100%" style:font-name="Times New Roman" fo:font-size="12pt" style:font-size-asian="12pt" style:font-size-complex="12pt"/>
    </style:style>
    <style:style style:name="P78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justify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79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justify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0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justify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8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Times New Roman" fo:font-size="12pt" style:font-size-asian="12pt" style:font-size-complex="12pt"/>
    </style:style>
    <style:style style:name="P93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4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5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6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7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8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99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0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1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3" style:family="paragraph" style:parent-style-name="Text_20_body" style:list-style-name="L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Times New Roman" fo:font-size="12pt" style:font-size-asian="12pt" style:font-size-complex="12pt"/>
    </style:style>
    <style:style style:name="P104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5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6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7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8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09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0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1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2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3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4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5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6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7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8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19" style:family="paragraph" style:parent-style-name="Text_20_body" style:list-style-name="L17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20" style:family="paragraph" style:parent-style-name="Text_20_body" style:list-style-name="L17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21" style:family="paragraph" style:parent-style-name="Text_20_body" style:list-style-name="L17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Times New Roman" fo:font-size="12pt" style:font-size-asian="12pt" style:font-size-complex="12pt"/>
    </style:style>
    <style:style style:name="P122" style:family="paragraph" style:parent-style-name="Text_20_body" style:list-style-name="L17">
      <style:paragraph-properties fo:margin-top="0cm" fo:margin-bottom="0cm" style:contextual-spacing="false" fo:line-height="114%" fo:orphans="2" fo:widows="2" fo:padding="0cm" fo:border="none"/>
      <style:text-properties fo:color="#1f1f1f" loext:opacity="100%" style:font-name="Times New Roman" fo:font-size="12pt" style:font-size-asian="12pt" style:font-size-complex="12pt"/>
    </style:style>
    <style:style style:name="P123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fo:color="#1f1f1f" loext:opacity="100%" style:font-name="Times New Roman" fo:font-size="12pt" style:font-size-asian="12pt" style:font-size-complex="12pt"/>
    </style:style>
    <style:style style:name="P124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Times New Roman" fo:font-size="12pt" officeooo:paragraph-rsid="00195270" style:font-size-asian="12pt" style:font-size-complex="12pt" loext:padding="0cm" loext:border="none"/>
    </style:style>
    <style:style style:name="P12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fo:font-weight="bold" style:font-size-asian="12pt" style:font-size-complex="12pt" loext:padding="0cm" loext:border="none"/>
    </style:style>
    <style:style style:name="P12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fo:font-weight="bold" style:font-size-asian="12pt" style:font-size-complex="12pt" loext:padding="0cm" loext:border="none"/>
    </style:style>
    <style:style style:name="P12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fo:font-weight="bold" style:font-size-asian="12pt" style:font-size-complex="12pt" loext:padding="0cm" loext:border="none"/>
    </style:style>
    <style:style style:name="P128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1f1f1f" loext:opacity="100%" style:font-name="Times New Roman" fo:font-size="12pt" fo:font-weight="bold" style:font-size-asian="12pt" style:font-weight-asian="bold" style:font-size-complex="12pt" style:font-weight-complex="bold" loext:padding="0cm" loext:border="none"/>
    </style:style>
    <style:style style:name="P129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Times New Roman" fo:font-size="12pt" style:font-size-asian="12pt" style:font-size-complex="12pt" loext:padding="0cm" loext:border="none"/>
    </style:style>
    <style:style style:name="P130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1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2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95270"/>
    </style:style>
    <style:style style:name="P133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4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5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6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7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8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9" style:family="paragraph" style:parent-style-name="Text_20_body" style:list-style-name="L6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</style:style>
    <style:style style:name="P14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1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2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3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4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5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7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8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9" style:family="paragraph" style:parent-style-name="Text_20_body">
      <style:paragraph-properties fo:margin-top="0cm" fo:margin-bottom="0.247cm" style:contextual-spacing="false" fo:line-height="114%"/>
    </style:style>
    <style:style style:name="P150" style:family="paragraph" style:parent-style-name="Text_20_body" style:list-style-name="L11"/>
    <style:style style:name="P15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152" style:family="paragraph" style:parent-style-name="Text_20_body" style:list-style-name="L16">
      <style:text-properties style:font-name="Times New Roman" fo:font-size="12pt" style:font-size-asian="12pt" style:font-size-complex="12pt"/>
    </style:style>
    <style:style style:name="P153" style:family="paragraph" style:parent-style-name="Text_20_body">
      <style:text-properties style:font-name="Times New Roman" fo:font-size="12pt" style:font-size-asian="12pt" style:font-size-complex="12pt"/>
    </style:style>
    <style:style style:name="P154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155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15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style:font-name="Times New Roman" fo:font-size="12pt" style:font-size-asian="12pt" style:font-size-complex="12pt"/>
    </style:style>
    <style:style style:name="P157" style:family="paragraph" style:parent-style-name="Text_20_body">
      <style:paragraph-properties fo:margin-top="0cm" fo:margin-bottom="0.247cm" style:contextual-spacing="false" fo:line-height="114%"/>
      <style:text-properties style:font-name="Times New Roman" fo:font-size="12pt" style:font-size-asian="12pt" style:font-size-complex="12pt"/>
    </style:style>
    <style:style style:name="P158" style:family="paragraph" style:parent-style-name="Text_20_body" style:list-style-name="L9">
      <style:paragraph-properties fo:margin-top="0cm" fo:margin-bottom="0.247cm" style:contextual-spacing="false" fo:line-height="114%" fo:padding="0cm" fo:border="none"/>
      <style:text-properties style:font-name="Times New Roman" fo:font-size="12pt" style:font-size-asian="12pt" style:font-size-complex="12pt"/>
    </style:style>
    <style:style style:name="P159" style:family="paragraph" style:parent-style-name="Text_20_body" style:list-style-name="L10">
      <style:paragraph-properties fo:margin-top="0cm" fo:margin-bottom="0.247cm" style:contextual-spacing="false" fo:line-height="114%" fo:padding="0cm" fo:border="none"/>
      <style:text-properties style:font-name="Times New Roman" fo:font-size="12pt" style:font-size-asian="12pt" style:font-size-complex="12pt"/>
    </style:style>
    <style:style style:name="P160" style:family="paragraph" style:parent-style-name="Text_20_body">
      <style:paragraph-properties fo:margin-top="0cm" fo:margin-bottom="0.247cm" style:contextual-spacing="false" fo:line-height="114%"/>
      <style:text-properties style:font-name="Times New Roman" fo:font-size="12pt" fo:font-weight="bold" style:font-size-asian="12pt" style:font-size-complex="12pt"/>
    </style:style>
    <style:style style:name="P161" style:family="paragraph" style:parent-style-name="Text_20_body">
      <style:text-properties style:font-name="Times New Roman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loext:padding="0cm" loext:border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 loext:padding="0cm" loext:border="none"/>
    </style:style>
    <style:style style:name="T10" style:family="text">
      <style:text-properties fo:font-style="italic" loext:padding="0cm" loext:border="none"/>
    </style:style>
    <style:style style:name="T11" style:family="text">
      <style:text-properties fo:font-style="italic" fo:font-weight="bold" style:font-style-asian="italic" style:font-style-complex="italic" loext:padding="0cm" loext:border="none"/>
    </style:style>
    <style:style style:name="T12" style:family="text">
      <style:text-properties fo:color="#1f1f1f" loext:opacity="100%"/>
    </style:style>
    <style:style style:name="T13" style:family="text">
      <style:text-properties fo:color="#1f1f1f" loext:opacity="100%" fo:font-weight="bold" loext:padding="0cm" loext:border="none"/>
    </style:style>
    <style:style style:name="T14" style:family="text">
      <style:text-properties fo:color="#1f1f1f" loext:opacity="100%" fo:font-weight="bold" style:font-weight-asian="bold" style:font-weight-complex="bold"/>
    </style:style>
    <style:style style:name="T15" style:family="text">
      <style:text-properties fo:color="#1f1f1f" loext:opacity="100%" fo:font-weight="bold" officeooo:rsid="001588db" style:font-weight-asian="bold" style:font-weight-complex="bold"/>
    </style:style>
    <style:style style:name="T16" style:family="text">
      <style:text-properties fo:color="#1f1f1f" loext:opacity="100%" officeooo:rsid="0014b468"/>
    </style:style>
    <style:style style:name="T17" style:family="text">
      <style:text-properties fo:color="#1f1f1f" loext:opacity="100%" style:font-name="Times New Roman" fo:font-size="12pt" style:font-size-asian="12pt" style:font-size-complex="12pt"/>
    </style:style>
    <style:style style:name="T18" style:family="text">
      <style:text-properties fo:color="#1f1f1f" loext:opacity="100%" style:font-name="Times New Roman" fo:font-size="12pt" style:font-size-asian="12pt" style:font-size-complex="12pt" loext:padding="0cm" loext:border="none"/>
    </style:style>
    <style:style style:name="T19" style:family="text">
      <style:text-properties fo:color="#1f1f1f" loext:opacity="100%" style:font-name="Times New Roman" fo:font-size="12pt" officeooo:rsid="00195270" style:font-size-asian="12pt" style:font-size-complex="12pt"/>
    </style:style>
    <style:style style:name="T20" style:family="text">
      <style:text-properties fo:color="#1f1f1f" loext:opacity="100%" style:font-name="Times New Roman" fo:font-size="12pt" fo:font-weight="bold" style:font-size-asian="12pt" style:font-size-complex="12pt" loext:padding="0cm" loext:border="none"/>
    </style:style>
    <style:style style:name="T21" style:family="text">
      <style:text-properties fo:color="#1f1f1f" loext:opacity="100%" style:font-name="Times New Roman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1f1f1f" loext:opacity="100%" style:font-name="Times New Roman" fo:font-size="12pt" fo:font-weight="bold" officeooo:rsid="00195270" style:font-size-asian="12pt" style:font-weight-asian="bold" style:font-size-complex="12pt" style:font-weight-complex="bold"/>
    </style:style>
    <style:style style:name="T23" style:family="text">
      <style:text-properties fo:color="#1f1f1f" loext:opacity="100%" officeooo:rsid="00195270"/>
    </style:style>
    <style:style style:name="T24" style:family="text">
      <style:text-properties officeooo:rsid="0014b468"/>
    </style:style>
    <style:style style:name="T25" style:family="text">
      <style:text-properties fo:color="#444746" loext:opacity="100%"/>
    </style:style>
    <style:style style:name="T26" style:family="text">
      <style:text-properties fo:color="#444746" loext:opacity="100%" style:font-name="Times New Roman" fo:font-size="12pt" style:font-size-asian="12pt" style:font-size-complex="12pt" loext:padding="0cm" loext:border="none"/>
    </style:style>
    <style:style style:name="T27" style:family="text">
      <style:text-properties fo:color="#444746" loext:opacity="100%" style:font-name="Times New Roman" fo:font-size="12pt" fo:font-weight="bold" style:font-size-asian="12pt" style:font-weight-asian="bold" style:font-size-complex="12pt" style:font-weight-complex="bold" loext:padding="0cm" loext:border="none"/>
    </style:style>
    <style:style style:name="T28" style:family="text">
      <style:text-properties fo:color="#444746" loext:opacity="100%" officeooo:rsid="00195270"/>
    </style:style>
    <style:style style:name="T29" style:family="text">
      <style:text-properties fo:font-variant="normal" fo:text-transform="none" fo:color="#8430ce" loext:opacity="100%" style:font-name="Times New Roman" fo:font-size="12pt" fo:font-style="normal" fo:font-weight="normal" style:font-size-asian="12pt" style:font-size-complex="12pt" loext:padding="0cm" loext:border="none"/>
    </style:style>
    <style:style style:name="T30" style:family="text">
      <style:text-properties fo:font-variant="normal" fo:text-transform="none" fo:color="#444746" loext:opacity="100%" style:font-name="Times New Roman" fo:font-size="12pt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fo:color="#444746" loext:opacity="100%" style:font-name="Times New Roman" fo:font-size="12pt" style:font-size-asian="12pt" style:font-size-complex="12pt" loext:padding="0cm" loext:border="none"/>
    </style:style>
    <style:style style:name="T32" style:family="text">
      <style:text-properties fo:font-variant="normal" fo:text-transform="none" fo:color="#1967d2" loext:opacity="100%" style:font-name="Times New Roman" fo:font-size="12pt" fo:font-style="normal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fo:color="#1f1f1f" loext:opacity="100%" style:font-name="Times New Roman" fo:font-size="12pt" fo:font-style="normal" fo:font-weight="normal" style:font-size-asian="12pt" style:font-size-complex="12pt" loext:padding="0cm" loext:border="none"/>
    </style:style>
    <style:style style:name="T34" style:family="text">
      <style:text-properties fo:font-variant="normal" fo:text-transform="none" fo:color="#188038" loext:opacity="100%" style:font-name="Times New Roman" fo:font-size="12pt" fo:font-style="normal" fo:font-weight="normal" style:font-size-asian="12pt" style:font-size-complex="12pt" loext:padding="0cm" loext:border="none"/>
    </style:style>
    <style:style style:name="T35" style:family="text">
      <style:text-properties fo:font-variant="normal" fo:text-transform="none" fo:color="#5f6368" loext:opacity="100%" style:font-name="Times New Roman" fo:font-size="12pt" fo:font-style="normal" fo:font-weight="normal" style:font-size-asian="12pt" style:font-size-complex="12pt" loext:padding="0cm" loext:border="none"/>
    </style:style>
    <style:style style:name="T36" style:family="text">
      <style:text-properties fo:font-variant="normal" fo:text-transform="none" fo:color="#b55908" loext:opacity="100%" style:font-name="Times New Roman" fo:font-size="12pt" fo:font-style="normal" fo:font-weight="normal" style:font-size-asian="12pt" style:font-size-complex="12pt" loext:padding="0cm" loext:border="none"/>
    </style:style>
    <style:style style:name="T37" style:family="text">
      <style:text-properties officeooo:rsid="00195270"/>
    </style:style>
    <style:style style:name="T38" style:family="text">
      <style:text-properties style:font-name="Times New Roman" fo:font-size="12pt" fo:font-weight="bold" style:font-size-asian="12pt" style:font-size-complex="12pt"/>
    </style:style>
    <style:style style:name="T39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49cm" fo:border="0.06pt solid #e1e3e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2">GESTÃO INTEGRADA DO CAPITAL DE GIRO E FLUXO DE CAIXA: UMA ABORDAGEM APLICADA À TOMADA DE DECISÃO</text:span></text:p>
      <text:p text:style-name="P43"><text:span text:style-name="T2">1. FUNDAMENTOS CONCEITUAIS DO CAPITAL DE GIRO</text:span></text:p>
      <text:p text:style-name="P44">A gestão do capital de giro constitui um dos eixos centrais da administração financeira de curto prazo, sendo determinante para a solvência e continuidade operacional da firma. Conforme enfatiza Assaf Neto, a liquidez empresarial deve ser compreendida não apenas como uma posição estática, mas como um processo dinâmico associado à geração e ao consumo de caixa ao longo do ciclo operacional.</text:p>
      <text:p text:style-name="P43"><text:span text:style-name="T2">1.1 Capital Circulante Líquido (CCL)</text:span></text:p>
      <text:p text:style-name="P44">O <text:span text:style-name="T2">Capital Circulante Líquido (CCL)</text:span> representa a margem de segurança financeira da empresa no curto prazo, refletindo o montante de recursos permanentes (capital próprio e dívidas de longo prazo) que financiam o ativo circulante.</text:p>
      <text:p text:style-name="P41"><text:line-break/>CCL = Ativo Circulante - Passivo Circulante<text:line-break/></text:p>
      <text:p text:style-name="P45">Obs.: Para Gitman, um CCL positivo indica capacidade de honrar compromissos de curto prazo sem pressão imediata sobre o caixa, enquanto valores negativos sinalizam maior risco de insolvência técnica.</text:p>
      <text:p text:style-name="P43"/>
      <text:p text:style-name="P43"><text:span text:style-name="T2">1.2 Necessidade de Capital de Giro (NCG)</text:span></text:p>
      <text:p text:style-name="P44">A <text:span text:style-name="T2">Necessidade de Capital de Giro (NCG)</text:span>, conceito estruturado no modelo dinâmico de <text:span text:style-name="T2">Fleuriet</text:span>, representa o volume de recursos demandado pelas operações da empresa.</text:p>
      <text:p text:style-name="P47"><text:line-break/>NCG = (Ativo Circulante Operacional) – Passivo Circulante Operacional (PCO) , </text:p>
      <text:p text:style-name="P47">ou seja: <text:span text:style-name="T2">NCG = ACO – PCO </text:span><text:line-break/></text:p>
      <text:p text:style-name="P43">Ou seja:</text:p>
      <text:list text:style-name="WWNum2">
        <text:list-item>
          <text:p text:style-name="P48"><text:span text:style-name="T2">Ativos Operacionais (ACO):</text:span> estoques + contas a receber + outras contas operacionais</text:p>
        </text:list-item>
        <text:list-item>
          <text:p text:style-name="P48"><text:span text:style-name="T2">Passivos Operacionais (PCO):</text:span> fornecedores + obrigações operacionais + outros passivos operacionais.</text:p>
        </text:list-item>
      </text:list>
      <text:p text:style-name="P68">A NCG traduz o chamado ciclo financeiro, sendo diretamente influenciada por:</text:p>
      <text:list text:style-name="WWNum3">
        <text:list-item>
          <text:p text:style-name="P49">prazo médio de estocagem</text:p>
        </text:list-item>
        <text:list-item>
          <text:p text:style-name="P49">prazo médio de recebimento</text:p>
        </text:list-item>
        <text:list-item>
          <text:p text:style-name="P49">prazo médio de pagamento</text:p>
        </text:list-item>
      </text:list>
      <text:p text:style-name="P45"><text:span text:style-name="T5">Obs.: <text:tab/>Quanto maior o descasamento entre recebimentos e pagamentos, maior será a NCG.</text:span></text:p>
      <text:p text:style-name="P43"><text:soft-page-break/></text:p>
      <text:p text:style-name="P43"><text:span text:style-name="T2">1.3 Saldo em Tesouraria (ST)</text:span></text:p>
      <text:p text:style-name="P44">O Saldo em Tesouraria (ST) representa a posição líquida de liquidez imediata, sendo um indicador síntese do equilíbrio financeiro de curto prazo.</text:p>
      <text:p text:style-name="P42"><text:line-break/><text:span text:style-name="T2">ST = CCL - NCG</text:span></text:p>
      <text:p text:style-name="P43">Interpretação:</text:p>
      <text:list text:style-name="WWNum4">
        <text:list-item>
          <text:p text:style-name="P50"><text:span text:style-name="T2">ST positivo:</text:span> existência de folga financeira (excesso de liquidez)</text:p>
        </text:list-item>
        <text:list-item>
          <text:p text:style-name="P50"><text:span text:style-name="T2">ST negativo:</text:span> necessidade de financiamento de curto prazo</text:p>
        </text:list-item>
      </text:list>
      <text:p text:style-name="P43">Segundo <text:span text:style-name="T2">Fleuriet</text:span>, o chamado <text:span text:style-name="T2">“efeito tesoura”</text:span> ocorre quando a NCG cresce mais rapidamente do que o CCL, comprimindo o ST e elevando o risco financeiro.</text:p>
      <text:p text:style-name="P43"/>
      <text:p text:style-name="P43"><text:span text:style-name="T2">2. RELAÇÃO ESTRUTURAL COM O FLUXO DE CAIXA</text:span></text:p>
      <text:p text:style-name="P44">A conexão entre esses conceitos se materializa no <text:span text:style-name="T2">Fluxo de Caixa Operacional (FCO)</text:span>, que, conforme <text:span text:style-name="T2">Ross, Westerfield e Jaffe</text:span>, representa a verdadeira capacidade de geração de caixa da empresa.</text:p>
      <text:p text:style-name="P41"><text:line-break/>FCO = Lucro <text:s/>Líquido + Ajustes Contábeis – Variação do NCG<text:line-break/></text:p>
      <text:p text:style-name="P43">Essa equação evidencia um ponto crítico da análise financeira:</text:p>
      <text:p text:style-name="P43"><text:span text:style-name="T2">Lucro não é sinônimo de caixa.</text:span></text:p>
      <text:p text:style-name="P43"><text:span text:style-name="T2">Interpretação técnica:</text:span></text:p>
      <text:list text:style-name="WWNum5">
        <text:list-item>
          <text:p text:style-name="P51"><text:span text:style-name="T2">ΔNCG &gt; 0 (aumento da NCG)</text:span> → consumo de caixa</text:p>
        </text:list-item>
        <text:list-item>
          <text:p text:style-name="P51"><text:span text:style-name="T2">ΔNCG &lt; 0 (redução da NCG)</text:span> → geração de caixa</text:p>
        </text:list-item>
      </text:list>
      <text:p text:style-name="P45">De acordo com <text:span text:style-name="T2">Damodaran</text:span>, a criação de valor está diretamente associada à capacidade de gerar fluxos de caixa livres, e não apenas resultados contábeis.</text:p>
      <text:p text:style-name="P43"/>
      <text:p text:style-name="P43"><text:span text:style-name="T2">3. INTEGRAÇÃO DINÂMICA: VISÃO SISTÊMICA</text:span></text:p>
      <text:p text:style-name="P52">A interação entre CCL, NCG e ST pode ser compreendida como um sistema financeiro integrado:</text:p>
      <text:list text:style-name="WWNum6">
        <text:list-item>
          <text:p text:style-name="P53">A <text:span text:style-name="T2">NCG</text:span> determina a demanda operacional por recursos</text:p>
        </text:list-item>
        <text:list-item>
          <text:p text:style-name="P53"><text:soft-page-break/>O <text:span text:style-name="T2">CCL</text:span> define a capacidade estrutural de financiamento</text:p>
        </text:list-item>
        <text:list-item>
          <text:p text:style-name="P53">O <text:span text:style-name="T2">ST</text:span> revela o resultado líquido dessa interação</text:p>
        </text:list-item>
      </text:list>
      <text:p text:style-name="P43"><text:span text:style-name="T2">Dinâmica típica:</text:span></text:p>
      <text:list text:style-name="WWNum7">
        <text:list-item>
          <text:p text:style-name="P54">Crescimento das vendas → aumento da NCG</text:p>
        </text:list-item>
        <text:list-item>
          <text:p text:style-name="P54">Se o CCL não acompanha → queda do ST</text:p>
        </text:list-item>
        <text:list-item>
          <text:p text:style-name="P54">Consequência → necessidade de financiamento externo</text:p>
        </text:list-item>
      </text:list>
      <text:p text:style-name="P46">Essa dinâmica explica por que empresas podem quebrar mesmo sendo lucrativas, fenômeno amplamente documentado na literatura de finanças empresariais.</text:p>
      <text:p text:style-name="P43"/>
      <text:p text:style-name="P43"><text:span text:style-name="T2">4. SÍNTESE ANALÍTICA</text:span></text:p>
      <text:list text:style-name="WWNum8">
        <text:list-item>
          <text:p text:style-name="P55"><text:span text:style-name="T2">NCG</text:span> → explica a variação do caixa (ótica operacional)</text:p>
        </text:list-item>
        <text:list-item>
          <text:p text:style-name="P55"><text:span text:style-name="T2">CCL</text:span> → explica o financiamento do giro (ótica estrutural)</text:p>
        </text:list-item>
        <text:list-item>
          <text:p text:style-name="P55"><text:span text:style-name="T2">ST</text:span> → evidencia o resultado final em termos de liquidez</text:p>
        </text:list-item>
      </text:list>
      <text:p text:style-name="P43"><text:span text:style-name="T2">A relação central ocorre por meio da:</text:span></text:p>
      <text:p text:style-name="P43"><text:span text:style-name="T2">Variação da NCG no Fluxo de Caixa Operacional</text:span></text:p>
      <text:p text:style-name="P43"/>
      <text:p text:style-name="P43"><text:span text:style-name="T2">5. APLICAÇÃO PRÁTICA</text:span></text:p>
      <text:p text:style-name="P43"><text:span text:style-name="T2">5.1 Crescimento com Controle Financeiro</text:span></text:p>
      <text:p text:style-name="P43">Conforme alerta <text:span text:style-name="T2">Higgins (sustainable growth model)</text:span>:</text:p>
      <text:p text:style-name="P43">O crescimento desordenado pode destruir valor.</text:p>
      <text:list text:style-name="WWNum9">
        <text:list-item>
          <text:p text:style-name="P56">Expansão de vendas → aumento de estoques e clientes</text:p>
        </text:list-item>
        <text:list-item>
          <text:p text:style-name="P56">Elevação da NCG → consumo de caixa</text:p>
        </text:list-item>
        <text:list-item>
          <text:p text:style-name="P56"><text:soft-page-break/>Risco: crescimento financiado por dívida cara</text:p>
        </text:list-item>
      </text:list>
      <text:p text:style-name="P43"><text:span text:style-name="T6">Recomendação:</text:span><text:span text:style-name="T5"> alinhar crescimento à capacidade de financiamento.</text:span></text:p>
      <text:p text:style-name="P43"/>
      <text:p text:style-name="P43"><text:span text:style-name="T2">5.2 Gestão Estratégica de Prazos</text:span></text:p>
      <text:p text:style-name="P43">A NCG pode ser gerida por meio de três alavancas:</text:p>
      <text:list text:style-name="WWNum10">
        <text:list-item>
          <text:p text:style-name="P57">Redução do prazo de recebimento (PMR ou PMRV)</text:p>
        </text:list-item>
        <text:list-item>
          <text:p text:style-name="P57">Redução do prazo de estocagem (PME ou PMRE)</text:p>
        </text:list-item>
        <text:list-item>
          <text:p text:style-name="P57">Aumento do prazo de pagamento (PMP ou PMPF)</text:p>
        </text:list-item>
      </text:list>
      <text:p text:style-name="P43"><text:span text:style-name="T2">Impacto direto:</text:span> melhora imediata do fluxo de caixa e do ST.</text:p>
      <text:p text:style-name="P43"/>
      <text:p text:style-name="P43"><text:span text:style-name="T2">5.3 Otimização do Excesso de Caixa</text:span></text:p>
      <text:list text:style-name="WWNum11">
        <text:list-item>
          <text:p text:style-name="P58">ST consistentemente positivo → excesso de liquidez</text:p>
        </text:list-item>
        <text:list-item>
          <text:p text:style-name="P58">Custo de oportunidade elevado</text:p>
        </text:list-item>
      </text:list>
      <text:p text:style-name="P43"><text:span text:style-name="T2">Recomendação:</text:span></text:p>
      <text:list text:style-name="WWNum12">
        <text:list-item>
          <text:p text:style-name="P59">Investimentos produtivos</text:p>
        </text:list-item>
        <text:list-item>
          <text:p text:style-name="P59">Redução de endividamento</text:p>
        </text:list-item>
        <text:list-item>
          <text:p text:style-name="P59">Aplicações financeiras estratégicas</text:p>
        </text:list-item>
      </text:list>
      <text:p text:style-name="P43"/>
      <text:p text:style-name="P43"><text:span text:style-name="T2">6. COMO ELABORAR UM FLUXO DE CAIXA PROJETADO (ABORDAGEM GERENCIAL)</text:span></text:p>
      <text:p text:style-name="P60">A projeção de fluxo de caixa é um instrumento essencial de planejamento financeiro, conforme defendido por <text:span text:style-name="T2">Gitman</text:span> e <text:span text:style-name="T2">Ross et al.</text:span></text:p>
      <text:p text:style-name="P43"><text:span text:style-name="T2">Etapas estruturadas:</text:span></text:p>
      <text:p text:style-name="P43"><text:soft-page-break/><text:span text:style-name="T2">1. Projeção de receitas</text:span></text:p>
      <text:list text:style-name="WWNum13">
        <text:list-item>
          <text:p text:style-name="P61">Base histórica + cenários (otimista, base (moderado), pessimista)</text:p>
        </text:list-item>
      </text:list>
      <text:p text:style-name="P43"><text:span text:style-name="T2">2. Modelagem dos prazos operacionais</text:span></text:p>
      <text:list text:style-name="WWNum14">
        <text:list-item>
          <text:p text:style-name="P62">PMR ou PMRV (clientes)</text:p>
        </text:list-item>
        <text:list-item>
          <text:p text:style-name="P62">PME ou PMRE (estoques)</text:p>
        </text:list-item>
        <text:list-item>
          <text:p text:style-name="P62">PMP ou PMPF (fornecedores)</text:p>
        </text:list-item>
      </text:list>
      <text:p text:style-name="P43"><text:span text:style-name="T2">3. Construção da NCG projetada</text:span></text:p>
      <text:p text:style-name="P41"><text:line-break/>NCG = ACO – PCO <text:line-break/></text:p>
      <text:p text:style-name="P43"><text:span text:style-name="T2">4. Cálculo da variação da NCG</text:span></text:p>
      <text:list text:style-name="WWNum15">
        <text:list-item>
          <text:p text:style-name="P63">Identificar o impacto no caixa: diário, semanal, quinzenal, mensal, trimestral etc.</text:p>
        </text:list-item>
      </text:list>
      <text:p text:style-name="P43"><text:span text:style-name="T2">5. Estruturação do fluxo de caixa</text:span></text:p>
      <text:p text:style-name="P43"><text:span text:style-name="T2">Entradas:</text:span></text:p>
      <text:list text:style-name="WWNum16">
        <text:list-item>
          <text:p text:style-name="P64">Recebimentos de clientes</text:p>
        </text:list-item>
      </text:list>
      <text:p text:style-name="P43"><text:span text:style-name="T2">Saídas:</text:span></text:p>
      <text:list text:style-name="WWNum17">
        <text:list-item>
          <text:p text:style-name="P65">Pagamentos operacionais</text:p>
        </text:list-item>
        <text:list-item>
          <text:p text:style-name="P65">Despesas administrativas</text:p>
        </text:list-item>
        <text:list-item>
          <text:p text:style-name="P65">Tributos</text:p>
        </text:list-item>
        <text:list-item>
          <text:p text:style-name="P65">Encargos financeiros</text:p>
        </text:list-item>
      </text:list>
      <text:p text:style-name="P43"><text:span text:style-name="T2">6. Apuração do saldo de caixa</text:span></text:p>
      <text:list text:style-name="WWNum18">
        <text:list-item>
          <text:p text:style-name="P66">Determinar o ST projetado</text:p>
        </text:list-item>
      </text:list>
      <text:p text:style-name="P43"/>
      <text:p text:style-name="P43"><text:soft-page-break/><text:span text:style-name="T2">6.1 Interpretação gerencial da projeção</text:span></text:p>
      <text:list text:style-name="WWNum19">
        <text:list-item>
          <text:p text:style-name="P67">ST negativo futuro → necessidade de financiamento</text:p>
        </text:list-item>
        <text:list-item>
          <text:p text:style-name="P67">ST positivo elevado → oportunidade de investimento</text:p>
        </text:list-item>
        <text:list-item>
          <text:p text:style-name="P67">Oscilações fortes → risco de liquidez</text:p>
        </text:list-item>
      </text:list>
      <text:p text:style-name="P43"/>
      <text:p text:style-name="P43"><text:span text:style-name="T2">7. Conclusão Estratégica</text:span></text:p>
      <text:p text:style-name="P44">A integração entre <text:span text:style-name="T2">CCL, NCG, ST e fluxo de caixa</text:span> fornece uma estrutura analítica robusta para a gestão financeira de curto prazo.</text:p>
      <text:p text:style-name="P44">Conforme sintetiza <text:span text:style-name="T2">Damodaran</text:span>: “O valor de uma empresa está na sua capacidade de gerar caixa, no tempo e com risco controlado.”</text:p>
      <text:p text:style-name="P44">Dessa forma, o gestor que compreende essas relações passa a atuar de maneira <text:span text:style-name="T2">proativa</text:span>, antecipando desequilíbrios, otimizando recursos e sustentando o crescimento com equilíbrio financeiro.</text:p>
      <text:p text:style-name="P44"/>
      <text:p text:style-name="P70">8. Aplicação em Sistema de Informação</text:p>
      <text:p text:style-name="P77"><text:span text:style-name="T24">O</text:span> entendimento de Capital de Giro e Fluxo de Caixa não é apenas uma questão contábil <text:span text:style-name="T37">financeira</text:span>, mas a base para o desenvolvimento de <text:span text:style-name="T4">ERPs (</text:span><text:span text:style-name="T11">Enterprise Resource Planning)</text:span><text:span text:style-name="T8">,</text:span> dashboards de <text:span text:style-name="T11">Business Intelligence</text:span><text:span text:style-name="T4"> (BI)</text:span> e algoritmos de análise preditiva.</text:p>
      <text:h text:style-name="P21" text:outline-level="3"><text:span text:style-name="T23">O</text:span><text:span text:style-name="T12"> ERP é o "Coração" da NCG e do Fluxo de Caixa. </text:span><text:span text:style-name="T23">Ele </text:span>não é apenas um <text:span text:style-name="T8">software </text:span>de cadastro; ele é o motor que executa tudo o que criamos no SQL:</text:h>
      <text:list text:style-name="L16">
        <text:list-item>
          <text:p text:style-name="P152"><text:span text:style-name="T1">Módulo de Suprimentos:</text:span> Alimenta o <text:span text:style-name="T1">Estoque</text:span> (aumenta a NCG).</text:p>
        </text:list-item>
        <text:list-item>
          <text:p text:style-name="P152"><text:span text:style-name="T1">Módulo de Vendas:</text:span> Alimenta o <text:span text:style-name="T1">Contas a Receber</text:span> (aumenta a NCG).</text:p>
        </text:list-item>
        <text:list-item>
          <text:p text:style-name="P152"><text:span text:style-name="T1">Módulo Financeiro:</text:span> Alimenta o <text:span text:style-name="T1">Fluxo de Caixa</text:span> e faz a <text:span text:style-name="T1">Conciliação Bancária</text:span>.</text:p>
        </text:list-item>
        <text:list-item>
          <text:p text:style-name="P152"><text:span text:style-name="T1">Módulo Contábil:</text:span> Consolida o <text:span text:style-name="T1">Modelo Fleuriet</text:span> para gerar o balanço.</text:p>
        </text:list-item>
      </text:list>
      <text:p text:style-name="P77"/>
      <text:section text:style-name="Sect1" text:name="model-response-message-contentr_fda86e0403cee889">
        <text:h text:style-name="P1" text:outline-level="2"><text:span text:style-name="T16">8.1 </text:span><text:span text:style-name="T12">Engenharia de Dados Financeiros – Capital de Giro e Fluxo de Caixa</text:span></text:h>
        <text:p text:style-name="P78"><text:s text:c="4"/>Em SI, o <text:span text:style-name="T4">Capital de Giro (CG)</text:span> pode ser visualizado como o "<text:span text:style-name="T8">buffer</text:span>" ou a memória volátil de uma empresa. Ele representa os recursos necessários para que a operação não trave entre o momento da compra e o momento do recebimento.</text:p>
        <text:list text:style-name="L1">
          <text:list-item>
            <text:p text:style-name="P81"><text:span text:style-name="T4">Ativo Circulante :</text:span> Contas a receber, estoques e disponibilidades.</text:p>
          </text:list-item>
          <text:list-item>
            <text:p text:style-name="P81"><text:span text:style-name="T4">Passivo Circulante:</text:span> Fornecedores, salários e impostos a pagar.</text:p>
          </text:list-item>
        </text:list>
        <text:p text:style-name="P83"><text:span text:style-name="T4"/></text:p>
        <text:p text:style-name="P92"><text:span text:style-name="T4">A lógica do SI:</text:span> O sistema precisa calcular em tempo real a <text:span text:style-name="T4">Necessidade de Capital de Giro (NCG)</text:span>.</text:p>
        <text:p text:style-name="P128">NCG = (Contas a <text:s/>Receber + Estoques) - (Fornecedores + Obrigações Sociais)</text:p>
        <text:p text:style-name="P124"><draw:frame draw:style-name="fr1" draw:name="Figura1" text:anchor-type="as-char" svg:width="13.067cm" svg:height="12.245cm" draw:z-index="0"><draw:image xlink:href="Pictures/100000000000080000000780F202B3DFA313DA57.jpg" xlink:type="simple" xlink:show="embed" xlink:actuate="onLoad" draw:mime-type="image/jpeg"/><svg:title>Working Capital Cycle Diagram, gerado pela IA</svg:title></draw:frame></text:p>
        <text:p text:style-name="P124"><text:span text:style-name="T28">Fonte: </text:span><text:span text:style-name="T25">Getty Images</text:span></text:p>
        <text:h text:style-name="P18" text:outline-level="3"><text:span text:style-name="T15"/></text:h>
        <text:h text:style-name="P19" text:outline-level="3"><text:span text:style-name="T15">8.</text:span><text:span text:style-name="T14">2. Fluxo de Caixa: O Log de Eventos Financeiros</text:span></text:h>
        <text:p text:style-name="P78"><text:tab/>Se o Capital de Giro é uma foto do momento, o <text:span text:style-name="T4">Fluxo de Caixa</text:span> é o <text:span text:style-name="T10">s</text:span><text:span text:style-name="T9">treaming</text:span><text:span text:style-name="T8"> </text:span>de dados. Para um desenvolvedor ou analista de sistemas, o Fluxo de Caixa é a base de dados que registra cada entrada e saída de numerário.</text:p>
        <text:p text:style-name="P123"/>
        <text:list xml:id="list2595820145" text:style-name="L17">
          <text:list-item>
            <text:p text:style-name="P119"><text:span text:style-name="T4">Fluxo de Caixa Operacional:</text:span> A saúde do "core" do negócio.</text:p>
          </text:list-item>
          <text:list-item>
            <text:p text:style-name="P119"><text:span text:style-name="T4">Fluxo de Caixa de Investimento:</text:span> Aquisição de ativos.</text:p>
          </text:list-item>
          <text:list-item>
            <text:p text:style-name="P119"><text:span text:style-name="T4">Fluxo de Caixa de Financiamento:</text:span> Empréstimos ou aporte de capital.</text:p>
            <text:p text:style-name="P122"/>
          </text:list-item>
          <text:list-item>
            <text:p text:style-name="P119"><text:span text:style-name="T4">Integração em SI:</text:span> Um software financeiro robusto deve permitir o <text:span text:style-name="T11">Cash Flow Forecasting</text:span><text:span text:style-name="T8"> </text:span>(Previsão de Fluxo de Caixa) utilizando modelos matemáticos para antecipar períodos de escassez de liquidez.</text:p>
          </text:list-item>
        </text:list>
        <text:h text:style-name="P18" text:outline-level="3"><text:span text:style-name="T12"/></text:h>
        <text:h text:style-name="P23" text:outline-level="3"><text:span text:style-name="T23">8.</text:span><text:span text:style-name="T12">3. A Conexão: Modelo Fleuriet e Algoritmos de Decisão</text:span></text:h>
        <text:p text:style-name="P78"><text:tab/>O Modelo Fleuriet é especialmente interessante para SI porque ele permite classificar a situação da empresa em "ratings" (como Excelente, Sólida, Arriscada, etc.), algo facilmente traduzível para lógica de programação (<text:span text:style-name="T10">If Else</text:span> ou <text:span text:style-name="T10">Machine Learning</text:span>).</text:p>
        <table:table table:name="Tabela1" table:style-name="Tabela1">
          <table:table-column table:style-name="Tabela1.A"/>
          <table:table-column table:style-name="Tabela1.B"/>
          <table:table-header-rows>
            <table:table-row>
              <table:table-cell table:style-name="Tabela1.A1" office:value-type="string">
                <text:p text:style-name="P72"><text:span text:style-name="Strong_20_Emphasis"><text:span text:style-name="T18">Componente</text:span></text:span></text:p>
              </table:table-cell>
              <table:table-cell table:style-name="Tabela1.B1" office:value-type="string">
                <text:p text:style-name="P72"><text:span text:style-name="Strong_20_Emphasis"><text:span text:style-name="T18">Visão de SI</text:span></text:span></text:p>
              </table:table-cell>
            </table:table-row>
          </table:table-header-rows>
          <table:table-row>
            <table:table-cell table:style-name="Tabela1.A1" office:value-type="string">
              <text:p text:style-name="P74">Capital de Giro (CDG)</text:p>
            </table:table-cell>
            <table:table-cell table:style-name="Tabela1.B1" office:value-type="string">
              <text:p text:style-name="P76">Recursos de longo prazo financiando o curto prazo.</text:p>
            </table:table-cell>
          </table:table-row>
          <table:table-row>
            <table:table-cell table:style-name="Tabela1.A1" office:value-type="string">
              <text:p text:style-name="P74">Necessidade de CG (NCG)</text:p>
            </table:table-cell>
            <table:table-cell table:style-name="Tabela1.B1" office:value-type="string">
              <text:p text:style-name="P76">O volume de dados operacionais que "consome" caixa.</text:p>
            </table:table-cell>
          </table:table-row>
          <table:table-row>
            <table:table-cell table:style-name="Tabela1.A1" office:value-type="string">
              <text:p text:style-name="P74">Saldo de Tesouraria (ST)</text:p>
            </table:table-cell>
            <table:table-cell table:style-name="Tabela1.B1" office:value-type="string">
              <text:p text:style-name="P76">O valor final da variável de liquidez (ST = CDG - NCG).</text:p>
            </table:table-cell>
          </table:table-row>
        </table:table>
        <text:h text:style-name="P18" text:outline-level="3"><text:span text:style-name="T12"/></text:h>
        <text:h text:style-name="P23" text:outline-level="3"><text:soft-page-break/><text:span text:style-name="T23">8.</text:span><text:span text:style-name="T12">4. Aplicação Prática para Estudantes de SI</text:span></text:h>
        <text:p text:style-name="P93">Para conectar esses mundos, o desenvolvimento de um sistema deve considerar:</text:p>
        <text:list xml:id="list3318407765" text:style-name="L3">
          <text:list-item>
            <text:p text:style-name="P101"><text:span text:style-name="T4">Dashboard de Liquidez:</text:span> Transformar as fórmulas de NCG e ST em visualizações gráficas para o gestor.</text:p>
          </text:list-item>
          <text:list-item>
            <text:p text:style-name="P101"><text:span text:style-name="T4">Alertas de Gatilho:</text:span> Programar notificações quando o Ciclo Financeiro (tempo entre pagar fornecedor e receber do cliente) aumenta, o que exige mais Capital de Giro.</text:p>
          </text:list-item>
          <text:list-item>
            <text:p text:style-name="P101"><text:span text:style-name="T4">Automação de Conciliação:</text:span> Integrar o extrato bancário (Fluxo de Caixa).</text:p>
            <text:p text:style-name="P103"/>
          </text:list-item>
        </text:list>
        <text:p text:style-name="P39"><text:span text:style-name="T4">Nota para SI:</text:span> Entender a regra de negócio financeira é o que diferencia um "codificador" de um "arquiteto de soluções". Um sistema mal projetado pode ocultar uma NCG negativa, levando uma empresa saudável ao colapso por falta de caixa.</text:p>
      </text:section>
      <text:h text:style-name="P21" text:outline-level="3"><text:soft-page-break/></text:h>
      <text:p text:style-name="P151"><text:span text:style-name="T12">Para estruturar um banco de dados que suporte a análise de </text:span><text:span text:style-name="T13">Necessidade de Capital de Giro (NCG)</text:span><text:span text:style-name="T12"> e </text:span><text:span text:style-name="T13">Fluxo de Caixa</text:span><text:span text:style-name="T12">, precisamos de uma arquitetura que separe o que é </text:span><text:span text:style-name="T13">competência</text:span><text:span text:style-name="T12"> (o fato gerador, como uma venda) do que é </text:span><text:span text:style-name="T13">caixa</text:span><text:span text:style-name="T12"> (o movimento real do dinheiro).</text:span></text:p>
      <text:section text:style-name="Sect1" text:name="model-response-message-contentr_dd8beeb8cf2a047c">
        <text:p text:style-name="P96"><text:span text:style-name="T37"><text:s text:c="4"/><text:tab/>Pr</text:span>oposta de modelagem relacional simplificada para um ERP ou módulo financeiro:</text:p>
        <text:h text:style-name="P1" text:outline-level="2"><text:span text:style-name="T12"/></text:h>
        <text:h text:style-name="P2" text:outline-level="2"><text:span text:style-name="T23">8.5 </text:span><text:span text:style-name="T12">Estrutura de Tabelas (Esquema Lógico)</text:span></text:h>
        <text:h text:style-name="P17" text:outline-level="3"><text:span text:style-name="T22">8.5.</text:span><text:span text:style-name="T21">1. Tabela </text:span><text:span text:style-name="Source_20_Text"><text:span text:style-name="T27">Entidades</text:span></text:span><text:span text:style-name="T21"> (Fornecedores e Clientes): </text:span><text:span text:style-name="T17">Armazena os stakeholders. É essencial para segmentar a NCG por setor ou tipo de parceiro.</text:span></text:h>
        <text:list xml:id="list3774149899" text:style-name="L5">
          <text:list-item>
            <text:p text:style-name="P132"><text:span text:style-name="Source_20_Text"><text:span text:style-name="T26">entidade_id</text:span></text:span><text:span text:style-name="T17"> (PK)</text:span></text:p>
          </text:list-item>
          <text:list-item>
            <text:p text:style-name="P130"><text:span text:style-name="Source_20_Text"><text:span text:style-name="T26">nome</text:span></text:span></text:p>
          </text:list-item>
          <text:list-item>
            <text:p text:style-name="P130"><text:span text:style-name="Source_20_Text"><text:span text:style-name="T26">tipo</text:span></text:span><text:span text:style-name="T17"> (Cliente/Fornecedor)</text:span></text:p>
          </text:list-item>
        </text:list>
        <text:h text:style-name="P14" text:outline-level="3"><text:span text:style-name="T17"/></text:h>
        <text:h text:style-name="P16" text:outline-level="3"><text:span text:style-name="T22">8.5;</text:span><text:span text:style-name="T21">2. Tabela </text:span><text:span text:style-name="Source_20_Text"><text:span text:style-name="T27">Lancamentos_Operacionais</text:span></text:span><text:span text:style-name="T21"> (Base para NCG)</text:span></text:h>
        <text:p text:style-name="P93">Representa o faturamento e as compras. Aqui calcula-<text:span text:style-name="T37">se </text:span>o que a empresa tem a receber ou a pagar (Ativo e Passivo Circulante).</text:p>
        <text:list xml:id="list774430143" text:style-name="L6">
          <text:list-item>
            <text:p text:style-name="P133"><text:span text:style-name="Source_20_Text"><text:span text:style-name="T26">lancamento_id</text:span></text:span><text:span text:style-name="T17"> (PK)</text:span></text:p>
          </text:list-item>
          <text:list-item>
            <text:p text:style-name="P133"><text:span text:style-name="Source_20_Text"><text:span text:style-name="T26">entidade_id</text:span></text:span><text:span text:style-name="T17"> (FK)</text:span></text:p>
          </text:list-item>
          <text:list-item>
            <text:p text:style-name="P133"><text:span text:style-name="Source_20_Text"><text:span text:style-name="T26">data_emissao</text:span></text:span></text:p>
          </text:list-item>
          <text:list-item>
            <text:p text:style-name="P133"><text:span text:style-name="Source_20_Text"><text:span text:style-name="T26">valor_total</text:span></text:span></text:p>
          </text:list-item>
          <text:list-item>
            <text:p text:style-name="P133"><text:span text:style-name="Source_20_Text"><text:span text:style-name="T26">categoria</text:span></text:span><text:span text:style-name="T17"> (Ex: Estoque, Venda de Mercadoria, Salários)</text:span></text:p>
          </text:list-item>
          <text:list-item>
            <text:p text:style-name="P133"><text:span text:style-name="Source_20_Text"><text:span text:style-name="T26">status</text:span></text:span><text:span text:style-name="T17"> (Aberto/Liquidado)</text:span></text:p>
            <text:p text:style-name="P139"><text:span text:style-name="T17"/></text:p>
          </text:list-item>
        </text:list>
        <text:h text:style-name="P14" text:outline-level="3"><text:span text:style-name="T22">8.5.</text:span><text:span text:style-name="T21">3. Tabela </text:span><text:span text:style-name="Source_20_Text"><text:span text:style-name="T27">Fluxo_Caixa</text:span></text:span><text:span text:style-name="T21"> (Base para Tesouraria)</text:span></text:h>
        <text:p text:style-name="P93">Registra as entradas e saídas efetivas de dinheiro. É o "log" que alimenta o Saldo de Tesouraria.</text:p>
        <text:list text:style-name="L7">
          <text:list-item>
            <text:p text:style-name="P140"><text:span text:style-name="Source_20_Text"><text:span text:style-name="T26">movimento_id</text:span></text:span><text:span text:style-name="T17"> (PK)</text:span></text:p>
          </text:list-item>
          <text:list-item>
            <text:p text:style-name="P140"><text:span text:style-name="Source_20_Text"><text:span text:style-name="T26">lancamento_id</text:span></text:span><text:span text:style-name="T17"> (FK - Opcional, para conciliação)</text:span></text:p>
          </text:list-item>
          <text:list-item>
            <text:p text:style-name="P140"><text:span text:style-name="Source_20_Text"><text:span text:style-name="T26">data_pagamento</text:span></text:span></text:p>
          </text:list-item>
          <text:list-item>
            <text:p text:style-name="P140"><text:span text:style-name="Source_20_Text"><text:span text:style-name="T26">valor_pago</text:span></text:span></text:p>
          </text:list-item>
          <text:list-item>
            <text:p text:style-name="P140"><text:span text:style-name="Source_20_Text"><text:span text:style-name="T26">tipo_movimentacao</text:span></text:span><text:span text:style-name="T17"> (Entrada/Saída)</text:span></text:p>
          </text:list-item>
          <text:list-item>
            <text:p text:style-name="P140"><text:span text:style-name="Source_20_Text"><text:span text:style-name="T26">conta_bancaria_id</text:span></text:span></text:p>
          </text:list-item>
        </text:list>
        <text:h text:style-name="P4" text:outline-level="2"><text:span text:style-name="T12"/></text:h>
        <text:h text:style-name="P2" text:outline-level="2"><text:span text:style-name="T23">8.5.4 </text:span><text:span text:style-name="T12">Relacionamento e Lógica de Consulta (SQL)</text:span></text:h>
        <text:p text:style-name="P83">Para um sistema de SI gerar o relatório de <text:span text:style-name="T4">Necessidade de Capital de Giro</text:span>, o software executaria uma lógica similar a esta:</text:p>
        <text:h text:style-name="P5" text:outline-level="3">Cálculo da NCG via SQL:</text:h>
        <text:p text:style-name="P129">SQL</text:p>
        <text:p text:style-name="P25"><text:soft-page-break/><text:span text:style-name="Source_20_Text"><text:span text:style-name="T29">SELECT</text:span></text:span><text:span text:style-name="Source_20_Text"><text:span text:style-name="T30"> </text:span></text:span></text:p>
        <text:p text:style-name="P26"><text:span text:style-name="Source_20_Text"><text:span text:style-name="T31"><text:s text:c="4"/></text:span></text:span><text:span text:style-name="Source_20_Text"><text:span text:style-name="T30">(</text:span></text:span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2">SUM</text:span></text:span><text:span text:style-name="Source_20_Text"><text:span text:style-name="T30">(valor_total) </text:span></text:span><text:span text:style-name="Source_20_Text"><text:span text:style-name="T29">FROM</text:span></text:span><text:span text:style-name="Source_20_Text"><text:span text:style-name="T30"> Lancamentos_Operacionais </text:span></text:span></text:p>
        <text:p text:style-name="P26"><text:span text:style-name="Source_20_Text"><text:span text:style-name="T31"><text:s text:c="5"/></text:span></text:span><text:span text:style-name="Source_20_Text"><text:span text:style-name="T29">WHERE</text:span></text:span><text:span text:style-name="Source_20_Text"><text:span text:style-name="T30"> categoria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Vendas'</text:span></text:span><text:span text:style-name="Source_20_Text"><text:span text:style-name="T30">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) </text:span></text:span><text:span text:style-name="Source_20_Text"><text:span text:style-name="T29">AS</text:span></text:span><text:span text:style-name="Source_20_Text"><text:span text:style-name="T30"> Ativo_Circulante_Operacional,</text:span></text:span></text:p>
        <text:p text:style-name="P33"><text:span text:style-name="Source_20_Text"><text:span text:style-name="T31"><text:s text:c="5"/></text:span></text:span></text:p>
        <text:p text:style-name="P26"><text:span text:style-name="Source_20_Text"><text:span text:style-name="T31"><text:s text:c="4"/></text:span></text:span><text:span text:style-name="Source_20_Text"><text:span text:style-name="T30">(</text:span></text:span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2">SUM</text:span></text:span><text:span text:style-name="Source_20_Text"><text:span text:style-name="T30">(valor_total) </text:span></text:span><text:span text:style-name="Source_20_Text"><text:span text:style-name="T29">FROM</text:span></text:span><text:span text:style-name="Source_20_Text"><text:span text:style-name="T30"> Lancamentos_Operacionais </text:span></text:span></text:p>
        <text:p text:style-name="P26"><text:span text:style-name="Source_20_Text"><text:span text:style-name="T31"><text:s text:c="5"/></text:span></text:span><text:span text:style-name="Source_20_Text"><text:span text:style-name="T29">WHERE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Fornecedores'</text:span></text:span><text:span text:style-name="Source_20_Text"><text:span text:style-name="T30">, </text:span></text:span><text:span text:style-name="Source_20_Text"><text:span text:style-name="T34">'Salarios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) </text:span></text:span><text:span text:style-name="Source_20_Text"><text:span text:style-name="T29">AS</text:span></text:span><text:span text:style-name="Source_20_Text"><text:span text:style-name="T30"> Passivo_Circulante_Operacional,</text:span></text:span></text:p>
        <text:p text:style-name="P36"/>
        <text:p text:style-name="P26"><text:span text:style-name="Source_20_Text"><text:span text:style-name="T31"><text:s text:c="4"/></text:span></text:span><text:span text:style-name="Source_20_Text"><text:span text:style-name="T35">-- A diferença resulta na NCG</text:span></text:span></text:p>
        <text:p text:style-name="P26"><text:span text:style-name="Source_20_Text"><text:span text:style-name="T31"><text:s text:c="4"/></text:span></text:span><text:span text:style-name="Source_20_Text"><text:span text:style-name="T30">((</text:span></text:span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2">SUM</text:span></text:span><text:span text:style-name="Source_20_Text"><text:span text:style-name="T30">(valor_total) </text:span></text:span><text:span text:style-name="Source_20_Text"><text:span text:style-name="T29">FROM</text:span></text:span><text:span text:style-name="Source_20_Text"><text:span text:style-name="T30"> Lancamentos_Operacionais </text:span></text:span><text:span text:style-name="Source_20_Text"><text:span text:style-name="T29">WHERE</text:span></text:span><text:span text:style-name="Source_20_Text"><text:span text:style-name="T30"> categoria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Vendas'</text:span></text:span><text:span text:style-name="Source_20_Text"><text:span text:style-name="T30">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) </text:span></text:span><text:span text:style-name="Source_20_Text"><text:span text:style-name="T33">-</text:span></text:span><text:span text:style-name="Source_20_Text"><text:span text:style-name="T30"> </text:span></text:span></text:p>
        <text:p text:style-name="P26"><text:span text:style-name="Source_20_Text"><text:span text:style-name="T31"><text:s text:c="5"/></text:span></text:span><text:span text:style-name="Source_20_Text"><text:span text:style-name="T30">(</text:span></text:span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2">SUM</text:span></text:span><text:span text:style-name="Source_20_Text"><text:span text:style-name="T30">(valor_total) </text:span></text:span><text:span text:style-name="Source_20_Text"><text:span text:style-name="T29">FROM</text:span></text:span><text:span text:style-name="Source_20_Text"><text:span text:style-name="T30"> Lancamentos_Operacionais </text:span></text:span><text:span text:style-name="Source_20_Text"><text:span text:style-name="T29">WHERE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Fornecedores'</text:span></text:span><text:span text:style-name="Source_20_Text"><text:span text:style-name="T30">, </text:span></text:span><text:span text:style-name="Source_20_Text"><text:span text:style-name="T34">'Salarios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)) </text:span></text:span><text:span text:style-name="Source_20_Text"><text:span text:style-name="T29">AS</text:span></text:span><text:span text:style-name="Source_20_Text"><text:span text:style-name="T30"> NCG</text:span></text:span></text:p>
        <text:h text:style-name="P4" text:outline-level="2"><text:span text:style-name="T12"/></text:h>
        <text:h text:style-name="P2" text:outline-level="2"><text:span text:style-name="T23">8.5.5. </text:span><text:span text:style-name="T12">Integração com Business Intelligence (BI)</text:span></text:h>
        <text:p text:style-name="P69"/>
        <text:p text:style-name="P83"><text:span text:style-name="T37"><text:tab/>Os</text:span> esses dados brutos do banco devem ser transformados em <text:span text:style-name="T4">KPIs (Key Performance Indicators)</text:span>:</text:p>
        <text:list text:style-name="L8">
          <text:list-item>
            <text:p text:style-name="P104"><text:span text:style-name="T4">DSO (Days Sales Outstanding):</text:span> Média de dias que o sistema registra entre a emissão e o pagamento (afeta diretamente o Capital de Giro).</text:p>
          </text:list-item>
          <text:list-item>
            <text:p text:style-name="P104"><text:span text:style-name="T4">Giro de Estoque:</text:span> Integração entre o módulo de compras e vendas para otimizar o capital imobilizado.</text:p>
          </text:list-item>
          <text:list-item>
            <text:p text:style-name="P104"><text:span text:style-name="T4">Análise de Liquidez Corrente:</text:span> Comparativo em tempo real entre Ativos e Passivos de curto prazo.</text:p>
          </text:list-item>
        </text:list>
        <text:p text:style-name="P38"><text:span text:style-name="T4">Insight de Arquitetura:</text:span> Ao desenhar o sistema <text:span text:style-name="T37">é preciso garantir </text:span>a <text:span text:style-name="T4">Integridade Referencial</text:span>. Se um registro de "Contas a Receber" for deletado sem a devida baixa, o cálculo da NCG será corrompido, levando o gestor a tomar decisões erradas sobre empréstimos ou investimentos.</text:p>
        <text:p text:style-name="P154"><text:span text:style-name="T13"/></text:p>
        <text:p text:style-name="P155"><text:span text:style-name="T13"/></text:p>
        <text:h text:style-name="P3" text:outline-level="2">Aula: Sistemas de Informação Aplicados à Gestão Financeira</text:h>
        <text:p text:style-name="P157"><text:span text:style-name="T1">Foco:</text:span> Capital de Giro (NCG) e Fluxo de Caixa</text:p>
        <text:h text:style-name="P20" text:outline-level="3">1. Definições de Ativos e Passivos (Regra de Negócio)</text:h>
        <text:p text:style-name="P157">Para o sistema calcular os indicadores corretamente, os dados devem ser classificados da seguinte forma:</text:p>
        <text:list text:style-name="L9">
          <text:list-item>
            <text:p text:style-name="P158"><text:span text:style-name="T1">Ativo Circulante Operacional (ACO):</text:span> Contas a Receber (Clientes) e Estoques. São os recursos "presos" na operação.</text:p>
          </text:list-item>
          <text:list-item>
            <text:p text:style-name="P158"><text:span text:style-name="T1">Passivo Circulante Operacional (PCO):</text:span> Fornecedores, Salários a Pagar e Impostos. É o financiamento vindo da própria operação.</text:p>
          </text:list-item>
          <text:list-item>
            <text:p text:style-name="P158"><text:span text:style-name="T1">Necessidade de Capital de Giro (NCG):</text:span> O quanto de recurso financeiro o sistema identifica que a empresa precisa para girar.</text:p>
            <text:list>
              <text:list-item>
                <text:p text:style-name="P158"><text:span text:style-name="T1">Fórmula:</text:span> $NCG = ACO - PCO$</text:p>
              </text:list-item>
            </text:list>
          </text:list-item>
        </text:list>
        <text:p text:style-name="P24"/>
        <text:h text:style-name="P20" text:outline-level="3">2. Modelagem de Dados (Entity-Relationship)</text:h>
        <text:p text:style-name="P157">Abaixo, a estrutura de tabelas sugerida para suportar esses cálculos:</text:p>
        <text:p text:style-name="P149"><text:span text:style-name="T38">Tabela: </text:span><text:span text:style-name="Source_20_Text"><text:span text:style-name="T38">lancamentos_operacionais</text:span></text:span><text:span text:style-name="T38"> (Base da NCG)</text:span></text:p>
        <text:p text:style-name="P157">| Coluna | Tipo | Descrição |</text:p>
        <text:p text:style-name="P157">| :--- | :--- | :--- |</text:p>
        <text:p text:style-name="P149"><text:span text:style-name="T39">| </text:span><text:span text:style-name="Source_20_Text"><text:span text:style-name="T39">id</text:span></text:span><text:span text:style-name="T39"> | PK (INT) | Identificador único do lançamento. |</text:span></text:p>
        <text:p text:style-name="P149"><text:span text:style-name="T39">| </text:span><text:span text:style-name="Source_20_Text"><text:span text:style-name="T39">data_vencimento</text:span></text:span><text:span text:style-name="T39"> | DATE | Data prevista para entrada/saída. |</text:span></text:p>
        <text:p text:style-name="P149"><text:span text:style-name="T39">| </text:span><text:span text:style-name="Source_20_Text"><text:span text:style-name="T39">valor</text:span></text:span><text:span text:style-name="T39"> | DECIMAL | Valor nominal do título. |</text:span></text:p>
        <text:p text:style-name="P149"><text:span text:style-name="T39">| </text:span><text:span text:style-name="Source_20_Text"><text:span text:style-name="T39">categoria</text:span></text:span><text:span text:style-name="T39"> | VARCHAR | 'CLIENTE', 'ESTOQUE', 'FORNECEDOR', 'SALARIO'. |</text:span></text:p>
        <text:p text:style-name="P149"><text:span text:style-name="T39">| </text:span><text:span text:style-name="Source_20_Text"><text:span text:style-name="T39">status</text:span></text:span><text:span text:style-name="T39"> | VARCHAR | 'ABERTO', 'LIQUIDADO'. |</text:span></text:p>
        <text:p text:style-name="P149"><text:span text:style-name="T38">Tabela: </text:span><text:span text:style-name="Source_20_Text"><text:span text:style-name="T38">fluxo_caixa</text:span></text:span><text:span text:style-name="T38"> (Base da Tesouraria)</text:span></text:p>
        <text:p text:style-name="P157"><text:soft-page-break/>| Coluna | Tipo | Descrição |</text:p>
        <text:p text:style-name="P157">| :--- | :--- | :--- |</text:p>
        <text:p text:style-name="P149"><text:span text:style-name="T39">| </text:span><text:span text:style-name="Source_20_Text"><text:span text:style-name="T39">id</text:span></text:span><text:span text:style-name="T39"> | PK (INT) | Identificador do movimento de caixa. |</text:span></text:p>
        <text:p text:style-name="P149"><text:span text:style-name="T39">| </text:span><text:span text:style-name="Source_20_Text"><text:span text:style-name="T39">lancamento_id</text:span></text:span><text:span text:style-name="T39"> | FK (INT) | Relacionamento com a tabela de lançamentos. |</text:span></text:p>
        <text:p text:style-name="P149"><text:span text:style-name="T39">| </text:span><text:span text:style-name="Source_20_Text"><text:span text:style-name="T39">data_pagamento</text:span></text:span><text:span text:style-name="T39"> | DATE | Data real em que o dinheiro entrou/saiu. |</text:span></text:p>
        <text:p text:style-name="P149"><text:span text:style-name="T39">| </text:span><text:span text:style-name="Source_20_Text"><text:span text:style-name="T39">valor_pago</text:span></text:span><text:span text:style-name="T39"> | DECIMAL | Valor efetivamente movimentado (líquido). |</text:span></text:p>
        <text:p text:style-name="P149"><text:span text:style-name="T39">| </text:span><text:span text:style-name="Source_20_Text"><text:span text:style-name="T39">tipo</text:span></text:span><text:span text:style-name="T39"> | CHAR(1) | 'E' (Entrada) ou 'S' (Saída). |</text:span></text:p>
        <text:p text:style-name="P24"/>
        <text:h text:style-name="P20" text:outline-level="3">3. Lógica de Implementação (SQL)</text:h>
        <text:p text:style-name="P157">Exemplo de consulta para o Dashboard de NCG:</text:p>
        <text:p text:style-name="P157">SQL</text:p>
        <text:p text:style-name="P34"><text:span text:style-name="Source_20_Text"><text:span text:style-name="T39">SELECT </text:span></text:span></text:p>
        <text:p text:style-name="P34"><text:span text:style-name="Source_20_Text"><text:span text:style-name="T39"><text:s text:c="4"/>-- Soma do que a empresa tem a receber e em estoque (ACO)</text:span></text:span></text:p>
        <text:p text:style-name="P34"><text:span text:style-name="Source_20_Text"><text:span text:style-name="T39"><text:s text:c="4"/>SUM(CASE WHEN categoria IN ('CLIENTE', 'ESTOQUE') AND status = 'ABERTO' THEN valor ELSE 0 END) AS ACO,</text:span></text:span></text:p>
        <text:p text:style-name="P34"><text:span text:style-name="Source_20_Text"><text:span text:style-name="T39"><text:s text:c="4"/></text:span></text:span></text:p>
        <text:p text:style-name="P34"><text:span text:style-name="Source_20_Text"><text:span text:style-name="T39"><text:s text:c="4"/>-- Soma do que a empresa deve para fornecedores e funcionários (PCO)</text:span></text:span></text:p>
        <text:p text:style-name="P34"><text:span text:style-name="Source_20_Text"><text:span text:style-name="T39"><text:s text:c="4"/>SUM(CASE WHEN categoria IN ('FORNECEDOR', 'SALARIO') AND status = 'ABERTO' THEN valor ELSE 0 END) AS PCO,</text:span></text:span></text:p>
        <text:p text:style-name="P34"><text:span text:style-name="Source_20_Text"><text:span text:style-name="T39"><text:s text:c="4"/></text:span></text:span></text:p>
        <text:p text:style-name="P34"><text:span text:style-name="Source_20_Text"><text:span text:style-name="T39"><text:s text:c="4"/>-- Cálculo final da Necessidade de Capital de Giro</text:span></text:span></text:p>
        <text:p text:style-name="P34"><text:span text:style-name="Source_20_Text"><text:span text:style-name="T39"><text:s text:c="4"/>(SUM(CASE WHEN categoria IN ('CLIENTE', 'ESTOQUE') AND status = 'ABERTO' THEN valor ELSE 0 END) - </text:span></text:span></text:p>
        <text:p text:style-name="P34"><text:span text:style-name="Source_20_Text"><text:span text:style-name="T39"><text:s text:c="5"/>SUM(CASE WHEN categoria IN ('FORNECEDOR', 'SALARIO') AND status = 'ABERTO' THEN valor ELSE 0 END)) AS NCG</text:span></text:span></text:p>
        <text:p text:style-name="P34"><text:span text:style-name="Source_20_Text"><text:span text:style-name="T39">FROM lancamentos_operacionais;</text:span></text:span></text:p>
        <text:p text:style-name="P24"/>
        <text:h text:style-name="P20" text:outline-level="3">4. Resumo para os Alunos (O Papel do SI)</text:h>
        <text:list text:style-name="L10">
          <text:list-item>
            <text:p text:style-name="P159"><text:span text:style-name="T1">O sistema não apenas registra:</text:span> Ele prevê cenários. Se o <text:span text:style-name="T7">lead time</text:span> do fornecedor aumenta no banco de dados, a NCG sobe automaticamente.</text:p>
          </text:list-item>
          <text:list-item>
            <text:p text:style-name="P159"><text:span text:style-name="T1">Integridade é tudo:</text:span> Um erro de input no "Contas a Receber" gera um falso positivo de liquidez, podendo levar a empresa à falência técnica.</text:p>
          </text:list-item>
          <text:list-item>
            <text:p text:style-name="P159"><text:span text:style-name="T1">Dashboards de BI:</text:span> Devem mostrar o <text:span text:style-name="T1">Saldo de Tesouraria ($ST = CDG - NCG$)</text:span> como o indicador de saúde máxima da empresa.</text:p>
          </text:list-item>
        </text:list>
        <text:p text:style-name="P24"/>
        <text:p text:style-name="P160">Gostaria que eu formatasse esse material em um arquivo específico, como um roteiro de aula em PDF ou um script SQL completo para teste?</text:p>
        <text:p text:style-name="P155"/>
      </text:section>
      <text:p text:style-name="P44"><text:soft-page-break/></text:p>
      <text:p text:style-name="P151">Aqui está um script SQL completo e estruturado para você copiar. Ele cria o banco de dados de exemplo, insere dados de teste e realiza os cálculos de <text:span text:style-name="T1">Necessidade de Capital de Giro (NCG)</text:span> e <text:span text:style-name="T1">Saldo de Tesouraria</text:span>.</text:p>
      <text:p text:style-name="P153">Você pode executar este código em qualquer gerenciador de banco de dados (como MySQL, PostgreSQL ou SQLite).</text:p>
      <text:p text:style-name="P24"/>
      <text:h text:style-name="P22" text:outline-level="3">Script SQL: Sistema de Gestão de Capital de Giro</text:h>
      <text:p text:style-name="P153">SQL</text:p>
      <text:p text:style-name="Preformatted_20_Text"><text:span text:style-name="Source_20_Text"><text:span text:style-name="T39">-- 1. Criação da Tabela de Entidades (Clientes e Fornecedores)</text:span></text:span></text:p>
      <text:p text:style-name="Preformatted_20_Text"><text:span text:style-name="Source_20_Text"><text:span text:style-name="T39">CREATE TABLE entidades (</text:span></text:span></text:p>
      <text:p text:style-name="Preformatted_20_Text"><text:span text:style-name="Source_20_Text"><text:span text:style-name="T39"><text:s text:c="4"/>id INTEGER PRIMARY KEY,</text:span></text:span></text:p>
      <text:p text:style-name="Preformatted_20_Text"><text:span text:style-name="Source_20_Text"><text:span text:style-name="T39"><text:s text:c="4"/>nome VARCHAR(100),</text:span></text:span></text:p>
      <text:p text:style-name="Preformatted_20_Text"><text:span text:style-name="Source_20_Text"><text:span text:style-name="T39"><text:s text:c="4"/>tipo VARCHAR(20) -- 'CLIENTE' ou 'FORNECEDOR'</text:span></text:span></text:p>
      <text:p text:style-name="Preformatted_20_Text"><text:span text:style-name="Source_20_Text"><text:span text:style-name="T39">);</text:span></text:span></text:p>
      <text:p text:style-name="P37"/>
      <text:p text:style-name="Preformatted_20_Text"><text:span text:style-name="Source_20_Text"><text:span text:style-name="T39">-- 2. Criação da Tabela de Lançamentos Operacionais (Base para NCG)</text:span></text:span></text:p>
      <text:p text:style-name="Preformatted_20_Text"><text:span text:style-name="Source_20_Text"><text:span text:style-name="T39">-- Aqui registramos o que a empresa "tem para receber" ou "tem para pagar"</text:span></text:span></text:p>
      <text:p text:style-name="Preformatted_20_Text"><text:span text:style-name="Source_20_Text"><text:span text:style-name="T39">CREATE TABLE lancamentos_operacionais (</text:span></text:span></text:p>
      <text:p text:style-name="Preformatted_20_Text"><text:span text:style-name="Source_20_Text"><text:span text:style-name="T39"><text:s text:c="4"/>id INTEGER PRIMARY KEY,</text:span></text:span></text:p>
      <text:p text:style-name="Preformatted_20_Text"><text:span text:style-name="Source_20_Text"><text:span text:style-name="T39"><text:s text:c="4"/>entidade_id INTEGER,</text:span></text:span></text:p>
      <text:p text:style-name="Preformatted_20_Text"><text:span text:style-name="Source_20_Text"><text:span text:style-name="T39"><text:s text:c="4"/>categoria VARCHAR(50), -- 'VENDA', 'ESTOQUE', 'FORNECEDOR', 'SALARIO'</text:span></text:span></text:p>
      <text:p text:style-name="Preformatted_20_Text"><text:span text:style-name="Source_20_Text"><text:span text:style-name="T39"><text:s text:c="4"/>valor DECIMAL(10,2),</text:span></text:span></text:p>
      <text:p text:style-name="Preformatted_20_Text"><text:span text:style-name="Source_20_Text"><text:span text:style-name="T39"><text:s text:c="4"/>status VARCHAR(20), -- 'ABERTO' ou 'LIQUIDADO'</text:span></text:span></text:p>
      <text:p text:style-name="Preformatted_20_Text"><text:span text:style-name="Source_20_Text"><text:span text:style-name="T39"><text:s text:c="4"/>data_vencimento DATE,</text:span></text:span></text:p>
      <text:p text:style-name="Preformatted_20_Text"><text:span text:style-name="Source_20_Text"><text:span text:style-name="T39"><text:s text:c="4"/>FOREIGN KEY (entidade_id) REFERENCES entidades(id)</text:span></text:span></text:p>
      <text:p text:style-name="Preformatted_20_Text"><text:span text:style-name="Source_20_Text"><text:span text:style-name="T39">);</text:span></text:span></text:p>
      <text:p text:style-name="P37"/>
      <text:p text:style-name="Preformatted_20_Text"><text:span text:style-name="Source_20_Text"><text:span text:style-name="T39">-- 3. Criação da Tabela de Fluxo de Caixa (Base para Tesouraria)</text:span></text:span></text:p>
      <text:p text:style-name="Preformatted_20_Text"><text:span text:style-name="Source_20_Text"><text:span text:style-name="T39">-- Aqui registramos o dinheiro real que já entrou ou saiu do banco</text:span></text:span></text:p>
      <text:p text:style-name="Preformatted_20_Text"><text:span text:style-name="Source_20_Text"><text:span text:style-name="T39">CREATE TABLE fluxo_caixa (</text:span></text:span></text:p>
      <text:p text:style-name="Preformatted_20_Text"><text:span text:style-name="Source_20_Text"><text:span text:style-name="T39"><text:s text:c="4"/>id INTEGER PRIMARY KEY,</text:span></text:span></text:p>
      <text:p text:style-name="Preformatted_20_Text"><text:span text:style-name="Source_20_Text"><text:span text:style-name="T39"><text:s text:c="4"/>lancamento_id INTEGER,</text:span></text:span></text:p>
      <text:p text:style-name="Preformatted_20_Text"><text:span text:style-name="Source_20_Text"><text:span text:style-name="T39"><text:s text:c="4"/>valor_pago DECIMAL(10,2),</text:span></text:span></text:p>
      <text:p text:style-name="Preformatted_20_Text"><text:span text:style-name="Source_20_Text"><text:span text:style-name="T39"><text:s text:c="4"/>tipo_movimentacao CHAR(1), -- 'E' para Entrada, 'S' para Saída</text:span></text:span></text:p>
      <text:p text:style-name="Preformatted_20_Text"><text:span text:style-name="Source_20_Text"><text:span text:style-name="T39"><text:s text:c="4"/>data_pagamento DATE,</text:span></text:span></text:p>
      <text:p text:style-name="Preformatted_20_Text"><text:span text:style-name="Source_20_Text"><text:span text:style-name="T39"><text:s text:c="4"/>FOREIGN KEY (lancamento_id) REFERENCES lancamentos_operacionais(id)</text:span></text:span></text:p>
      <text:p text:style-name="Preformatted_20_Text"><text:span text:style-name="Source_20_Text"><text:span text:style-name="T39">);</text:span></text:span></text:p>
      <text:p text:style-name="P37"/>
      <text:p text:style-name="Preformatted_20_Text"><text:span text:style-name="Source_20_Text"><text:span text:style-name="T39">-- ---------------------------------------------------------</text:span></text:span></text:p>
      <text:p text:style-name="Preformatted_20_Text"><text:span text:style-name="Source_20_Text"><text:span text:style-name="T39">-- INSERÇÃO DE DADOS PARA TESTE (ESTUDO DE CASO)</text:span></text:span></text:p>
      <text:p text:style-name="Preformatted_20_Text"><text:soft-page-break/><text:span text:style-name="Source_20_Text"><text:span text:style-name="T39">-- ---------------------------------------------------------</text:span></text:span></text:p>
      <text:p text:style-name="P37"/>
      <text:p text:style-name="Preformatted_20_Text"><text:span text:style-name="Source_20_Text"><text:span text:style-name="T39">INSERT INTO entidades VALUES (1, 'Cliente Alpha', 'CLIENTE');</text:span></text:span></text:p>
      <text:p text:style-name="Preformatted_20_Text"><text:span text:style-name="Source_20_Text"><text:span text:style-name="T39">INSERT INTO entidades VALUES (2, 'Fornecedor de Matéria-Prima', 'FORNECEDOR');</text:span></text:span></text:p>
      <text:p text:style-name="P37"/>
      <text:p text:style-name="Preformatted_20_Text"><text:span text:style-name="Source_20_Text"><text:span text:style-name="T39">-- Empresa vendeu R$ 10.000 mas ainda não recebeu (Ativo Circulante Operacional)</text:span></text:span></text:p>
      <text:p text:style-name="Preformatted_20_Text"><text:span text:style-name="Source_20_Text"><text:span text:style-name="T39">INSERT INTO lancamentos_operacionais VALUES (101, 1, 'VENDA', 10000.00, 'ABERTO', '2026-04-10');</text:span></text:span></text:p>
      <text:p text:style-name="P37"/>
      <text:p text:style-name="Preformatted_20_Text"><text:span text:style-name="Source_20_Text"><text:span text:style-name="T39">-- Empresa comprou R$ 4.000 em estoque e ainda não pagou (Passivo Circulante Operacional)</text:span></text:span></text:p>
      <text:p text:style-name="Preformatted_20_Text"><text:span text:style-name="Source_20_Text"><text:span text:style-name="T39">INSERT INTO lancamentos_operacionais VALUES (102, 2, 'FORNECEDOR', 4000.00, 'ABERTO', '2026-04-15');</text:span></text:span></text:p>
      <text:p text:style-name="P37"/>
      <text:p text:style-name="Preformatted_20_Text"><text:span text:style-name="Source_20_Text"><text:span text:style-name="T39">-- Empresa já tem R$ 2.000 em dinheiro no banco (Saldo de Tesouraria Inicial)</text:span></text:span></text:p>
      <text:p text:style-name="Preformatted_20_Text"><text:span text:style-name="Source_20_Text"><text:span text:style-name="T39">INSERT INTO fluxo_caixa VALUES (1, NULL, 2000.00, 'E', '2026-03-01');</text:span></text:span></text:p>
      <text:p text:style-name="P37"/>
      <text:p text:style-name="Preformatted_20_Text"><text:span text:style-name="Source_20_Text"><text:span text:style-name="T39">-- ---------------------------------------------------------</text:span></text:span></text:p>
      <text:p text:style-name="Preformatted_20_Text"><text:span text:style-name="Source_20_Text"><text:span text:style-name="T39">-- CONSULTA DE DASHBOARD (A INTELIGÊNCIA DO SISTEMA)</text:span></text:span></text:p>
      <text:p text:style-name="Preformatted_20_Text"><text:span text:style-name="Source_20_Text"><text:span text:style-name="T39">-- ---------------------------------------------------------</text:span></text:span></text:p>
      <text:p text:style-name="P37"/>
      <text:p text:style-name="Preformatted_20_Text"><text:span text:style-name="Source_20_Text"><text:span text:style-name="T39">SELECT </text:span></text:span></text:p>
      <text:p text:style-name="Preformatted_20_Text"><text:span text:style-name="Source_20_Text"><text:span text:style-name="T39"><text:s text:c="4"/>-- Cálculo do ACO (Ativo Circulante Operacional)</text:span></text:span></text:p>
      <text:p text:style-name="Preformatted_20_Text"><text:span text:style-name="Source_20_Text"><text:span text:style-name="T39"><text:s text:c="4"/>SUM(CASE WHEN categoria IN ('VENDA', 'ESTOQUE') AND status = 'ABERTO' THEN valor ELSE 0 END) AS Ativo_Operacional,</text:span></text:span></text:p>
      <text:p text:style-name="P37"/>
      <text:p text:style-name="Preformatted_20_Text"><text:span text:style-name="Source_20_Text"><text:span text:style-name="T39"><text:s text:c="4"/>-- Cálculo do PCO (Passivo Circulante Operacional)</text:span></text:span></text:p>
      <text:p text:style-name="Preformatted_20_Text"><text:span text:style-name="Source_20_Text"><text:span text:style-name="T39"><text:s text:c="4"/>SUM(CASE WHEN categoria IN ('FORNECEDOR', 'SALARIO') AND status = 'ABERTO' THEN valor ELSE 0 END) AS Passivo_Operacional,</text:span></text:span></text:p>
      <text:p text:style-name="P37"/>
      <text:p text:style-name="Preformatted_20_Text"><text:span text:style-name="Source_20_Text"><text:span text:style-name="T39"><text:s text:c="4"/>-- Cálculo da NCG (Necessidade de Capital de Giro)</text:span></text:span></text:p>
      <text:p text:style-name="Preformatted_20_Text"><text:span text:style-name="Source_20_Text"><text:span text:style-name="T39"><text:s text:c="4"/>(SUM(CASE WHEN categoria IN ('VENDA', 'ESTOQUE') AND status = 'ABERTO' THEN valor ELSE 0 END) - </text:span></text:span></text:p>
      <text:p text:style-name="Preformatted_20_Text"><text:span text:style-name="Source_20_Text"><text:span text:style-name="T39"><text:s text:c="5"/>SUM(CASE WHEN categoria IN ('FORNECEDOR', 'SALARIO') AND status = 'ABERTO' THEN valor ELSE 0 END)) AS NCG,</text:span></text:span></text:p>
      <text:p text:style-name="P37"/>
      <text:p text:style-name="Preformatted_20_Text"><text:span text:style-name="Source_20_Text"><text:span text:style-name="T39"><text:s text:c="4"/>-- Saldo de Tesouraria (Dinheiro disponível no banco)</text:span></text:span></text:p>
      <text:p text:style-name="Preformatted_20_Text"><text:span text:style-name="Source_20_Text"><text:span text:style-name="T39"><text:s text:c="4"/>(SELECT SUM(CASE WHEN tipo_movimentacao = 'E' THEN valor_pago ELSE -valor_pago END) FROM fluxo_caixa) AS Saldo_Tesouraria</text:span></text:span></text:p>
      <text:p text:style-name="P37"/>
      <text:p text:style-name="P35"><text:span text:style-name="Source_20_Text"><text:span text:style-name="T39">FROM lancamentos_operacionais;</text:span></text:span></text:p>
      <text:p text:style-name="P24"/>
      <text:h text:style-name="P22" text:outline-level="3">O que este script demonstra para o aluno de SI?</text:h>
      <text:list text:style-name="L11">
        <text:list-item>
          <text:p text:style-name="P150"><text:span text:style-name="T38">Visão de Engenharia:</text:span><text:span text:style-name="T39"> Como transformar conceitos abstratos (Capital de Giro) em colunas e tipos de dados (</text:span><text:span text:style-name="Source_20_Text"><text:span text:style-name="T39">DECIMAL</text:span></text:span><text:span text:style-name="T39">, </text:span><text:span text:style-name="Source_20_Text"><text:span text:style-name="T39">DATE</text:span></text:span><text:span text:style-name="T39">, </text:span><text:span text:style-name="Source_20_Text"><text:span text:style-name="T39">FK</text:span></text:span><text:span text:style-name="T39">).</text:span></text:p>
        </text:list-item>
        <text:list-item>
          <text:p text:style-name="P150"><text:span text:style-name="T38">Lógica de Negócio no SQL:</text:span><text:span text:style-name="T39"> O uso de </text:span><text:span text:style-name="Source_20_Text"><text:span text:style-name="T39">CASE WHEN</text:span></text:span><text:span text:style-name="T39"> para filtrar categorias financeiras sem precisar de múltiplas tabelas complexas.</text:span></text:p>
        </text:list-item>
        <text:list-item>
          <text:p text:style-name="P150"><text:span text:style-name="T38">Diferenciação de Dados:</text:span><text:span text:style-name="T39"> A separação entre </text:span><text:span text:style-name="Source_20_Text"><text:span text:style-name="T39">lancamentos_operacionais</text:span></text:span><text:span text:style-name="T39"> (o que vai acontecer) e </text:span><text:span text:style-name="Source_20_Text"><text:span text:style-name="T39">fluxo_caixa</text:span></text:span><text:span text:style-name="T39"> (o que já aconteceu).</text:span></text:p>
        </text:list-item>
      </text:list>
      <text:p text:style-name="P161">Gostaria que eu explicasse como criar uma "View" no banco de dados para que esse relatório fique sempre atualizado para o usuário final?</text:p>
      <text:p text:style-name="P44"/>
      <text:p text:style-name="P77">Uma <text:span text:style-name="T4">View</text:span> (ou Vista) é um dos recursos mais poderosos de <text:span text:style-name="T4">Sistemas de Informação</text:span>, pois ela funciona como uma "tabela virtual". Em vez de o desenvolvedor ter que escrever aquele SQL complexo toda vez que quiser mostrar os dados no Dashboard, ele simplesmente consulta a View.</text:p>
      <text:section text:style-name="Sect1" text:name="model-response-message-contentr_b883de91c7623170">
        <text:p text:style-name="P83">Para o gestor financeiro, isso garante que a <text:span text:style-name="T4">Necessidade de Capital de Giro (NCG)</text:span> e o <text:span text:style-name="T4">Saldo de Tesouraria</text:span> estejam sempre atualizados com base nos últimos lançamentos inseridos.</text:p>
        <text:p text:style-name="P96">Aqui está o script para criar essa camada de inteligência no seu banco de dados:</text:p>
        <text:p text:style-name="P24"/>
        <text:h text:style-name="P5" text:outline-level="3">Script: Criação da View de Saúde Financeira</text:h>
        <text:p text:style-name="P129">SQL</text:p>
        <text:p text:style-name="P25"><text:span text:style-name="Source_20_Text"><text:span text:style-name="T35">-- Criando a View que consolida os indicadores de NCG e Tesouraria</text:span></text:span></text:p>
        <text:p text:style-name="P26"><text:span text:style-name="Source_20_Text"><text:span text:style-name="T29">CREATE</text:span></text:span><text:span text:style-name="Source_20_Text"><text:span text:style-name="T30"> </text:span></text:span><text:span text:style-name="Source_20_Text"><text:span text:style-name="T29">VIEW</text:span></text:span><text:span text:style-name="Source_20_Text"><text:span text:style-name="T30"> v_dashboard_financeiro </text:span></text:span><text:span text:style-name="Source_20_Text"><text:span text:style-name="T29">AS</text:span></text:span></text:p>
        <text:p text:style-name="P26"><text:span text:style-name="Source_20_Text"><text:span text:style-name="T29">SELECT</text:span></text:span><text:span text:style-name="Source_20_Text"><text:span text:style-name="T30"> </text:span></text:span></text:p>
        <text:p text:style-name="P26"><text:span text:style-name="Source_20_Text"><text:span text:style-name="T31"><text:s text:c="4"/></text:span></text:span><text:span text:style-name="Source_20_Text"><text:span text:style-name="T35">-- 1. Ativo Circulante Operacional (Dinheiro a receber da operação)</text:span></text:span></text:p>
        <text:p text:style-name="P26"><text:span text:style-name="Source_20_Text"><text:span text:style-name="T31"><text:s text:c="4"/>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VENDA'</text:span></text:span><text:span text:style-name="Source_20_Text"><text:span text:style-name="T30">, </text:span></text:span><text:span text:style-name="Source_20_Text"><text:span text:style-name="T34">'ESTOQUE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 </text:span></text:span><text:span text:style-name="Source_20_Text"><text:span text:style-name="T29">AS</text:span></text:span><text:span text:style-name="Source_20_Text"><text:span text:style-name="T30"> ativo_operacional,</text:span></text:span></text:p>
        <text:p text:style-name="P36"/>
        <text:p text:style-name="P26"><text:span text:style-name="Source_20_Text"><text:span text:style-name="T31"><text:s text:c="4"/></text:span></text:span><text:span text:style-name="Source_20_Text"><text:span text:style-name="T35">-- 2. Passivo Circulante Operacional (Dívidas da operação)</text:span></text:span></text:p>
        <text:p text:style-name="P26"><text:span text:style-name="Source_20_Text"><text:span text:style-name="T31"><text:s text:c="4"/>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FORNECEDOR'</text:span></text:span><text:span text:style-name="Source_20_Text"><text:span text:style-name="T30">, </text:span></text:span><text:span text:style-name="Source_20_Text"><text:span text:style-name="T34">'SALARIO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 </text:span></text:span><text:span text:style-name="Source_20_Text"><text:span text:style-name="T29">AS</text:span></text:span><text:span text:style-name="Source_20_Text"><text:span text:style-name="T30"> passivo_operacional,</text:span></text:span></text:p>
        <text:p text:style-name="P36"/>
        <text:p text:style-name="P26"><text:span text:style-name="Source_20_Text"><text:span text:style-name="T31"><text:s text:c="4"/></text:span></text:span><text:span text:style-name="Source_20_Text"><text:span text:style-name="T35">-- 3. Cálculo da NCG (O 'gap' financeiro)</text:span></text:span></text:p>
        <text:p text:style-name="P26"><text:span text:style-name="Source_20_Text"><text:span text:style-name="T31"><text:s text:c="4"/></text:span></text:span><text:span text:style-name="Source_20_Text"><text:span text:style-name="T30">(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VENDA'</text:span></text:span><text:span text:style-name="Source_20_Text"><text:span text:style-name="T30">, </text:span></text:span><text:span text:style-name="Source_20_Text"><text:span text:style-name="T34">'ESTOQUE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 </text:span></text:span><text:span text:style-name="Source_20_Text"><text:span text:style-name="T33">-</text:span></text:span><text:span text:style-name="Source_20_Text"><text:span text:style-name="T30"> </text:span></text:span></text:p>
        <text:p text:style-name="P26"><text:span text:style-name="Source_20_Text"><text:span text:style-name="T31"><text:s text:c="5"/>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FORNECEDOR'</text:span></text:span><text:span text:style-name="Source_20_Text"><text:span text:style-name="T30">, </text:span></text:span><text:span text:style-name="Source_20_Text"><text:span text:style-name="T34">'SALARIO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) </text:span></text:span><text:span text:style-name="Source_20_Text"><text:span text:style-name="T29">AS</text:span></text:span><text:span text:style-name="Source_20_Text"><text:span text:style-name="T30"> ncg,</text:span></text:span></text:p>
        <text:p text:style-name="P36"/>
        <text:p text:style-name="P26"><text:soft-page-break/><text:span text:style-name="Source_20_Text"><text:span text:style-name="T31"><text:s text:c="4"/></text:span></text:span><text:span text:style-name="Source_20_Text"><text:span text:style-name="T35">-- 4. Saldo de Tesouraria Real (O que tem no banco agora)</text:span></text:span></text:p>
        <text:p text:style-name="P26"><text:span text:style-name="Source_20_Text"><text:span text:style-name="T31"><text:s text:c="4"/></text:span></text:span><text:span text:style-name="Source_20_Text"><text:span text:style-name="T30">(</text:span></text:span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tipo_movimentacao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E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_pago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3">-</text:span></text:span><text:span text:style-name="Source_20_Text"><text:span text:style-name="T30">valor_pago </text:span></text:span><text:span text:style-name="Source_20_Text"><text:span text:style-name="T29">END</text:span></text:span><text:span text:style-name="Source_20_Text"><text:span text:style-name="T30">) </text:span></text:span></text:p>
        <text:p text:style-name="P26"><text:span text:style-name="Source_20_Text"><text:span text:style-name="T31"><text:s text:c="5"/></text:span></text:span><text:span text:style-name="Source_20_Text"><text:span text:style-name="T29">FROM</text:span></text:span><text:span text:style-name="Source_20_Text"><text:span text:style-name="T30"> fluxo_caixa) </text:span></text:span><text:span text:style-name="Source_20_Text"><text:span text:style-name="T29">AS</text:span></text:span><text:span text:style-name="Source_20_Text"><text:span text:style-name="T30"> saldo_tesouraria,</text:span></text:span></text:p>
        <text:p text:style-name="P36"/>
        <text:p text:style-name="P26"><text:span text:style-name="Source_20_Text"><text:span text:style-name="T31"><text:s text:c="4"/></text:span></text:span><text:span text:style-name="Source_20_Text"><text:span text:style-name="T35">-- 5. Análise de Risco (Lógica de SI para o usuário)</text:span></text:span></text:p>
        <text:p text:style-name="P26"><text:span text:style-name="Source_20_Text"><text:span text:style-name="T31"><text:s text:c="4"/></text:span></text:span><text:span text:style-name="Source_20_Text"><text:span text:style-name="T29">CASE</text:span></text:span><text:span text:style-name="Source_20_Text"><text:span text:style-name="T30"> </text:span></text:span></text:p>
        <text:p text:style-name="P26"><text:span text:style-name="Source_20_Text"><text:span text:style-name="T31"><text:s text:c="8"/></text:span></text:span><text:span text:style-name="Source_20_Text"><text:span text:style-name="T29">WHEN</text:span></text:span><text:span text:style-name="Source_20_Text"><text:span text:style-name="T30"> (</text:span></text:span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tipo_movimentacao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E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_pago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3">-</text:span></text:span><text:span text:style-name="Source_20_Text"><text:span text:style-name="T30">valor_pago </text:span></text:span><text:span text:style-name="Source_20_Text"><text:span text:style-name="T29">END</text:span></text:span><text:span text:style-name="Source_20_Text"><text:span text:style-name="T30">) </text:span></text:span><text:span text:style-name="Source_20_Text"><text:span text:style-name="T29">FROM</text:span></text:span><text:span text:style-name="Source_20_Text"><text:span text:style-name="T30"> fluxo_caixa) </text:span></text:span><text:span text:style-name="Source_20_Text"><text:span text:style-name="T33">&lt;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/text:p>
        <text:p text:style-name="P26"><text:span text:style-name="Source_20_Text"><text:span text:style-name="T31"><text:s text:c="8"/></text:span></text:span><text:span text:style-name="Source_20_Text"><text:span text:style-name="T29">THEN</text:span></text:span><text:span text:style-name="Source_20_Text"><text:span text:style-name="T30"> </text:span></text:span><text:span text:style-name="Source_20_Text"><text:span text:style-name="T34">'RISCO: Dependente de Empréstimos'</text:span></text:span></text:p>
        <text:p text:style-name="P26"><text:span text:style-name="Source_20_Text"><text:span text:style-name="T31"><text:s text:c="8"/></text:span></text:span><text:span text:style-name="Source_20_Text"><text:span text:style-name="T29">WHEN</text:span></text:span><text:span text:style-name="Source_20_Text"><text:span text:style-name="T30"> (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VENDA'</text:span></text:span><text:span text:style-name="Source_20_Text"><text:span text:style-name="T30">, </text:span></text:span><text:span text:style-name="Source_20_Text"><text:span text:style-name="T34">'ESTOQUE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 </text:span></text:span><text:span text:style-name="Source_20_Text"><text:span text:style-name="T33">-</text:span></text:span><text:span text:style-name="Source_20_Text"><text:span text:style-name="T30"> </text:span></text:span></text:p>
        <text:p text:style-name="P26"><text:span text:style-name="Source_20_Text"><text:span text:style-name="T31"><text:s text:c="14"/>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FORNECEDOR'</text:span></text:span><text:span text:style-name="Source_20_Text"><text:span text:style-name="T30">, </text:span></text:span><text:span text:style-name="Source_20_Text"><text:span text:style-name="T34">'SALARIO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) </text:span></text:span><text:span text:style-name="Source_20_Text"><text:span text:style-name="T33">&gt;</text:span></text:span><text:span text:style-name="Source_20_Text"><text:span text:style-name="T30"> </text:span></text:span><text:span text:style-name="Source_20_Text"><text:span text:style-name="T36">5000</text:span></text:span><text:span text:style-name="Source_20_Text"><text:span text:style-name="T30"> </text:span></text:span></text:p>
        <text:p text:style-name="P26"><text:span text:style-name="Source_20_Text"><text:span text:style-name="T31"><text:s text:c="8"/></text:span></text:span><text:span text:style-name="Source_20_Text"><text:span text:style-name="T29">THEN</text:span></text:span><text:span text:style-name="Source_20_Text"><text:span text:style-name="T30"> </text:span></text:span><text:span text:style-name="Source_20_Text"><text:span text:style-name="T34">'ALERTA: NCG Elevada'</text:span></text:span></text:p>
        <text:p text:style-name="P26"><text:span text:style-name="Source_20_Text"><text:span text:style-name="T31"><text:s text:c="8"/>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4">'SAUDÁVEL'</text:span></text:span></text:p>
        <text:p text:style-name="P26"><text:span text:style-name="Source_20_Text"><text:span text:style-name="T31"><text:s text:c="4"/></text:span></text:span><text:span text:style-name="Source_20_Text"><text:span text:style-name="T29">END</text:span></text:span><text:span text:style-name="Source_20_Text"><text:span text:style-name="T30"> </text:span></text:span><text:span text:style-name="Source_20_Text"><text:span text:style-name="T29">AS</text:span></text:span><text:span text:style-name="Source_20_Text"><text:span text:style-name="T30"> status_empresa</text:span></text:span></text:p>
        <text:p text:style-name="P26"><text:span text:style-name="Source_20_Text"><text:span text:style-name="T29">FROM</text:span></text:span><text:span text:style-name="Source_20_Text"><text:span text:style-name="T30"> lancamentos_operacionais;</text:span></text:span></text:p>
        <text:p text:style-name="P24"/>
        <text:h text:style-name="P5" text:outline-level="3">Como utilizar no seu Sistema?</text:h>
        <text:p text:style-name="P96">Agora, no código do seu software (seja em Python, PHP, Java ou Node.js), você não precisa mais daquela lógica gigante. Basta chamar:</text:p>
        <text:p text:style-name="P129">SQL</text:p>
        <text:p text:style-name="P25"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3">*</text:span></text:span><text:span text:style-name="Source_20_Text"><text:span text:style-name="T30"> </text:span></text:span><text:span text:style-name="Source_20_Text"><text:span text:style-name="T29">FROM</text:span></text:span><text:span text:style-name="Source_20_Text"><text:span text:style-name="T30"> v_dashboard_financeiro;</text:span></text:span></text:p>
        <text:h text:style-name="P5" text:outline-level="3">Vantagens dessa Abordagem para SI:</text:h>
        <text:list text:style-name="L12">
          <text:list-item>
            <text:p text:style-name="P107"><text:span text:style-name="T4">Abstração:</text:span> O front-end não precisa conhecer as fórmulas financeiras, ele apenas consome o resultado da View.</text:p>
          </text:list-item>
          <text:list-item>
            <text:p text:style-name="P107"><text:span text:style-name="T4">Segurança:</text:span> Você pode dar permissão para um usuário ver a View, mas não as tabelas brutas de lançamentos.</text:p>
          </text:list-item>
          <text:list-item>
            <text:p text:style-name="P107"><text:span text:style-name="T4">Performance:</text:span> O banco de dados otimiza o plano de execução para essa consulta recorrente.</text:p>
          </text:list-item>
          <text:list-item>
            <text:p text:style-name="P107"><text:span text:style-name="T4">Padronização:</text:span> Se a regra de cálculo da NCG mudar (ex: inclusão de novos impostos), você altera apenas a View, e todos os relatórios do sistema se atualizam automaticamente.</text:p>
          </text:list-item>
        </text:list>
        <text:p text:style-name="P24"/>
        <text:p text:style-name="P125">Gostaria que eu demonstrasse como simular uma situação de "Risco Financeiro" inserindo novos dados para ver a View mudar de "Saudável" para "Risco"?</text:p>
      </text:section>
      <text:p text:style-name="P44"/>
      <text:p text:style-name="P77">Essa é a melhor parte de trabalhar com Bancos de Dados: ver como a inserção de um único registro altera instantaneamente a inteligência do negócio (o Dashboard).</text:p>
      <text:section text:style-name="Sect1" text:name="model-response-message-contentr_4380e87d32d64d34">
        <text:p text:style-name="P83">Vamos simular um cenário onde a empresa faz uma compra alta de estoque a prazo, aumentando sua <text:span text:style-name="T4">Necessidade de Capital de Giro (NCG)</text:span>, enquanto o dinheiro em conta (Tesouraria) diminui devido a um pagamento.</text:p>
        <text:p text:style-name="P24"/>
        <text:h text:style-name="P5" text:outline-level="3"><text:soft-page-break/>Passo 1: Inserindo Dados de "Risco"</text:h>
        <text:p text:style-name="P96">Execute estes comandos para simular a operação:</text:p>
        <text:p text:style-name="P129">SQL</text:p>
        <text:p text:style-name="P25"><text:span text:style-name="Source_20_Text"><text:span text:style-name="T35">-- 1. Empresa compra R$ 15.000 em estoque para pagar depois.</text:span></text:span></text:p>
        <text:p text:style-name="P26"><text:span text:style-name="Source_20_Text"><text:span text:style-name="T35">-- Isso aumenta drasticamente o Ativo Operacional (estoque parado) e a NCG.</text:span></text:span></text:p>
        <text:p text:style-name="P26"><text:span text:style-name="Source_20_Text"><text:span text:style-name="T29">INSERT</text:span></text:span><text:span text:style-name="Source_20_Text"><text:span text:style-name="T30"> </text:span></text:span><text:span text:style-name="Source_20_Text"><text:span text:style-name="T29">INTO</text:span></text:span><text:span text:style-name="Source_20_Text"><text:span text:style-name="T30"> lancamentos_operacionais (id, entidade_id, categoria, valor, status, data_vencimento)</text:span></text:span></text:p>
        <text:p text:style-name="P26"><text:span text:style-name="Source_20_Text"><text:span text:style-name="T29">VALUES</text:span></text:span><text:span text:style-name="Source_20_Text"><text:span text:style-name="T30"> (</text:span></text:span><text:span text:style-name="Source_20_Text"><text:span text:style-name="T36">103</text:span></text:span><text:span text:style-name="Source_20_Text"><text:span text:style-name="T30">, </text:span></text:span><text:span text:style-name="Source_20_Text"><text:span text:style-name="T36">2</text:span></text:span><text:span text:style-name="Source_20_Text"><text:span text:style-name="T30">, </text:span></text:span><text:span text:style-name="Source_20_Text"><text:span text:style-name="T34">'ESTOQUE'</text:span></text:span><text:span text:style-name="Source_20_Text"><text:span text:style-name="T30">, </text:span></text:span><text:span text:style-name="Source_20_Text"><text:span text:style-name="T36">15000.00</text:span></text:span><text:span text:style-name="Source_20_Text"><text:span text:style-name="T30">, </text:span></text:span><text:span text:style-name="Source_20_Text"><text:span text:style-name="T34">'ABERTO'</text:span></text:span><text:span text:style-name="Source_20_Text"><text:span text:style-name="T30">, </text:span></text:span><text:span text:style-name="Source_20_Text"><text:span text:style-name="T34">'2026-05-01'</text:span></text:span><text:span text:style-name="Source_20_Text"><text:span text:style-name="T30">);</text:span></text:span></text:p>
        <text:p text:style-name="P36"/>
        <text:p text:style-name="P26"><text:span text:style-name="Source_20_Text"><text:span text:style-name="T35">-- 2. Empresa paga uma conta de luz/aluguel de R$ 2.500 que não estava prevista.</text:span></text:span></text:p>
        <text:p text:style-name="P26"><text:span text:style-name="Source_20_Text"><text:span text:style-name="T35">-- Como o saldo anterior era R$ 2.000, a Tesouraria ficará NEGATIVA.</text:span></text:span></text:p>
        <text:p text:style-name="P26"><text:span text:style-name="Source_20_Text"><text:span text:style-name="T29">INSERT</text:span></text:span><text:span text:style-name="Source_20_Text"><text:span text:style-name="T30"> </text:span></text:span><text:span text:style-name="Source_20_Text"><text:span text:style-name="T29">INTO</text:span></text:span><text:span text:style-name="Source_20_Text"><text:span text:style-name="T30"> fluxo_caixa (id, lancamento_id, valor_pago, tipo_movimentacao, data_pagamento)</text:span></text:span></text:p>
        <text:p text:style-name="P26"><text:span text:style-name="Source_20_Text"><text:span text:style-name="T29">VALUES</text:span></text:span><text:span text:style-name="Source_20_Text"><text:span text:style-name="T30"> (</text:span></text:span><text:span text:style-name="Source_20_Text"><text:span text:style-name="T36">2</text:span></text:span><text:span text:style-name="Source_20_Text"><text:span text:style-name="T30">, </text:span></text:span><text:span text:style-name="Source_20_Text"><text:span text:style-name="T29">NULL</text:span></text:span><text:span text:style-name="Source_20_Text"><text:span text:style-name="T30">, </text:span></text:span><text:span text:style-name="Source_20_Text"><text:span text:style-name="T36">2500.00</text:span></text:span><text:span text:style-name="Source_20_Text"><text:span text:style-name="T30">, </text:span></text:span><text:span text:style-name="Source_20_Text"><text:span text:style-name="T34">'S'</text:span></text:span><text:span text:style-name="Source_20_Text"><text:span text:style-name="T30">, </text:span></text:span><text:span text:style-name="Source_20_Text"><text:span text:style-name="T34">'2026-03-26'</text:span></text:span><text:span text:style-name="Source_20_Text"><text:span text:style-name="T30">);</text:span></text:span></text:p>
        <text:p text:style-name="P24"/>
        <text:h text:style-name="P5" text:outline-level="3">Passo 2: Consultando a View (O Dashboard de SI)</text:h>
        <text:p text:style-name="P96">Agora, sem mudar uma linha de código no seu sistema, basta rodar a View novamente:</text:p>
        <text:p text:style-name="P129">SQL</text:p>
        <text:p text:style-name="P25"><text:span text:style-name="Source_20_Text"><text:span text:style-name="T29">SELECT</text:span></text:span><text:span text:style-name="Source_20_Text"><text:span text:style-name="T30"> </text:span></text:span><text:span text:style-name="Source_20_Text"><text:span text:style-name="T33">*</text:span></text:span><text:span text:style-name="Source_20_Text"><text:span text:style-name="T30"> </text:span></text:span><text:span text:style-name="Source_20_Text"><text:span text:style-name="T29">FROM</text:span></text:span><text:span text:style-name="Source_20_Text"><text:span text:style-name="T30"> v_dashboard_financeiro;</text:span></text:span></text:p>
        <text:p text:style-name="P125">O que o sistema deve retornar agora?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header-rows>
            <table:table-row>
              <table:table-cell table:style-name="Tabela2.A1" office:value-type="string">
                <text:p text:style-name="P71"><text:span text:style-name="Strong_20_Emphasis"><text:span text:style-name="T18">Ativo Operacional</text:span></text:span></text:p>
              </table:table-cell>
              <table:table-cell table:style-name="Tabela2.A1" office:value-type="string">
                <text:p text:style-name="P71"><text:span text:style-name="Strong_20_Emphasis"><text:span text:style-name="T18">Passivo Operacional</text:span></text:span></text:p>
              </table:table-cell>
              <table:table-cell table:style-name="Tabela2.A1" office:value-type="string">
                <text:p text:style-name="P71"><text:span text:style-name="Strong_20_Emphasis"><text:span text:style-name="T18">NCG</text:span></text:span></text:p>
              </table:table-cell>
              <table:table-cell table:style-name="Tabela2.A1" office:value-type="string">
                <text:p text:style-name="P71"><text:span text:style-name="Strong_20_Emphasis"><text:span text:style-name="T18">Saldo Tesouraria</text:span></text:span></text:p>
              </table:table-cell>
              <table:table-cell table:style-name="Tabela2.E1" office:value-type="string">
                <text:p text:style-name="P71"><text:span text:style-name="Strong_20_Emphasis"><text:span text:style-name="T18">Status Empresa</text:span></text:span></text:p>
              </table:table-cell>
            </table:table-row>
          </table:table-header-rows>
          <table:table-row>
            <table:table-cell table:style-name="Tabela2.A1" office:value-type="string">
              <text:p text:style-name="P75">25.000,00</text:p>
            </table:table-cell>
            <table:table-cell table:style-name="Tabela2.A1" office:value-type="string">
              <text:p text:style-name="P75">4.000,00</text:p>
            </table:table-cell>
            <table:table-cell table:style-name="Tabela2.A1" office:value-type="string">
              <text:p text:style-name="P75">21.000,00</text:p>
            </table:table-cell>
            <table:table-cell table:style-name="Tabela2.A1" office:value-type="string">
              <text:p text:style-name="P75">-500,00</text:p>
            </table:table-cell>
            <table:table-cell table:style-name="Tabela2.E1" office:value-type="string">
              <text:p text:style-name="P73">RISCO: Dependente de Empréstimos</text:p>
            </table:table-cell>
          </table:table-row>
        </table:table>
        <text:p text:style-name="P24"/>
        <text:h text:style-name="P5" text:outline-level="3">Análise Crítica para Alunos de SI</text:h>
        <text:list text:style-name="L13">
          <text:list-item>
            <text:p text:style-name="P147"><text:span text:style-name="T20">Gatilho de Status:</text:span><text:span text:style-name="T17"> Observe que a coluna </text:span><text:span text:style-name="Source_20_Text"><text:span text:style-name="T26">status_empresa</text:span></text:span><text:span text:style-name="T17"> mudou automaticamente. Em um sistema real, isso poderia disparar um </text:span><text:span text:style-name="T20">e-mail de alerta</text:span><text:span text:style-name="T17"> para o gestor ou bloquear novas compras no módulo de suprimentos.</text:span></text:p>
          </text:list-item>
          <text:list-item>
            <text:p text:style-name="P111"><text:span text:style-name="T4">O "Gap" Financeiro:</text:span> A NCG saltou para R$ 21.000. Isso significa que a empresa tem muito valor "no papel" (vendas a receber e estoque), mas não tem liquidez para pagar as contas imediatas.</text:p>
          </text:list-item>
          <text:list-item>
            <text:p text:style-name="P111"><text:span text:style-name="T4">Decisão Baseada em Dados:</text:span> Com essa View, o desenvolvedor de SI entregou uma ferramenta que mostra que a empresa está "morrendo de sede na frente de um copo d'água" (tem ativos, mas não tem caixa).</text:p>
          </text:list-item>
        </text:list>
        <text:p text:style-name="P24"/>
        <text:h text:style-name="P5" text:outline-level="3">Próximo Passo Sugerido</text:h>
        <text:p text:style-name="P83"><text:s text:c="5"/><text:tab/><text:span text:style-name="T37">Criando </text:span>um <text:span text:style-name="T11">Script de Trigger</text:span><text:span text:style-name="T4"> (Gatilho)</text:span>?</text:p>
        <text:p text:style-name="P83"><text:tab/>Ele pode, por exemplo, impedir que o usuário insira uma nova compra de estoque se a NCG calculada na View ultrapassar um limite de segurança (ex: R$ 30.000). <text:span text:style-name="T37">Como </text:span><text:span text:style-name="T4">automatizar essa trava de segurança no banco?</text:span></text:p>
      </text:section>
      <text:p text:style-name="P151"><text:soft-page-break/><text:span text:style-name="T12"/></text:p>
      <text:p text:style-name="P151"><text:span text:style-name="T12">No desenvolvimento de </text:span><text:span text:style-name="T13">Sistemas de Informação</text:span><text:span text:style-name="T12">, um </text:span><text:span text:style-name="T13">Trigger</text:span><text:span text:style-name="T12"> (Gatilho) é o nível máximo de automação de regras de negócio diretamente no Banco de Dados. Ele garante a </text:span><text:span text:style-name="T13">Integridade Operacional</text:span><text:span text:style-name="T12">: o sistema impede que um erro humano (ou uma decisão financeira arriscada) seja concretizado.</text:span></text:p>
      <text:section text:style-name="Sect1" text:name="model-response-message-contentr_a324f5ed4d62cb9f">
        <text:p text:style-name="P83"><text:tab/>Vamos criar um gatilho que <text:span text:style-name="T4">bloqueia</text:span> novas compras de estoque se a <text:span text:style-name="T4">Necessidade de Capital de Giro (NCG)</text:span> da empresa ultrapassar o limite de <text:span text:style-name="T4">R$ 30.000,00</text:span>.</text:p>
        <text:h text:style-name="P18" text:outline-level="3"><text:span text:style-name="T12"/></text:h>
        <text:h text:style-name="P19" text:outline-level="3"><text:span text:style-name="T14">Script:</text:span><text:span text:style-name="T12"> Automação de Trava de Segurança (Trigger)</text:span></text:h>
        <text:p text:style-name="P146"><text:span text:style-name="T17"><text:tab/>Este código monitora a tabela de </text:span><text:span text:style-name="Source_20_Text"><text:span text:style-name="T26">lancamentos_operacionais</text:span></text:span><text:span text:style-name="T17">. Antes de cada inserção de uma nova compra de estoque, ele calcula a NCG atual e decide se permite ou não o registro.</text:span></text:p>
        <text:p text:style-name="P129">SQL</text:p>
        <text:p text:style-name="P25"><text:span text:style-name="Source_20_Text"><text:span text:style-name="T30">DELIMITER </text:span></text:span><text:span text:style-name="Source_20_Text"><text:span text:style-name="T33">//</text:span></text:span></text:p>
        <text:p text:style-name="P36"/>
        <text:p text:style-name="P26"><text:span text:style-name="Source_20_Text"><text:span text:style-name="T29">CREATE</text:span></text:span><text:span text:style-name="Source_20_Text"><text:span text:style-name="T30"> </text:span></text:span><text:span text:style-name="Source_20_Text"><text:span text:style-name="T29">TRIGGER</text:span></text:span><text:span text:style-name="Source_20_Text"><text:span text:style-name="T30"> tg_trava_ncg_alta</text:span></text:span></text:p>
        <text:p text:style-name="P26"><text:span text:style-name="Source_20_Text"><text:span text:style-name="T30">BEFORE </text:span></text:span><text:span text:style-name="Source_20_Text"><text:span text:style-name="T29">INSERT</text:span></text:span><text:span text:style-name="Source_20_Text"><text:span text:style-name="T30"> </text:span></text:span><text:span text:style-name="Source_20_Text"><text:span text:style-name="T29">ON</text:span></text:span><text:span text:style-name="Source_20_Text"><text:span text:style-name="T30"> lancamentos_operacionais</text:span></text:span></text:p>
        <text:p text:style-name="P26"><text:span text:style-name="Source_20_Text"><text:span text:style-name="T29">FOR</text:span></text:span><text:span text:style-name="Source_20_Text"><text:span text:style-name="T30"> </text:span></text:span><text:span text:style-name="Source_20_Text"><text:span text:style-name="T29">EACH</text:span></text:span><text:span text:style-name="Source_20_Text"><text:span text:style-name="T30"> </text:span></text:span><text:span text:style-name="Source_20_Text"><text:span text:style-name="T29">ROW</text:span></text:span></text:p>
        <text:p text:style-name="P26"><text:span text:style-name="Source_20_Text"><text:span text:style-name="T29">BEGIN</text:span></text:span></text:p>
        <text:p text:style-name="P26"><text:span text:style-name="Source_20_Text"><text:span text:style-name="T31"><text:s text:c="4"/></text:span></text:span><text:span text:style-name="Source_20_Text"><text:span text:style-name="T29">DECLARE</text:span></text:span><text:span text:style-name="Source_20_Text"><text:span text:style-name="T30"> v_ncg_atual </text:span></text:span><text:span text:style-name="Source_20_Text"><text:span text:style-name="T29">DECIMAL</text:span></text:span><text:span text:style-name="Source_20_Text"><text:span text:style-name="T30">(</text:span></text:span><text:span text:style-name="Source_20_Text"><text:span text:style-name="T36">10</text:span></text:span><text:span text:style-name="Source_20_Text"><text:span text:style-name="T30">,</text:span></text:span><text:span text:style-name="Source_20_Text"><text:span text:style-name="T36">2</text:span></text:span><text:span text:style-name="Source_20_Text"><text:span text:style-name="T30">);</text:span></text:span></text:p>
        <text:p text:style-name="P36"/>
        <text:p text:style-name="P26"><text:span text:style-name="Source_20_Text"><text:span text:style-name="T31"><text:s text:c="4"/></text:span></text:span><text:span text:style-name="Source_20_Text"><text:span text:style-name="T35">-- 1. Calcula a NCG atual somando o que já existe no banco</text:span></text:span></text:p>
        <text:p text:style-name="P26"><text:span text:style-name="Source_20_Text"><text:span text:style-name="T31"><text:s text:c="4"/></text:span></text:span><text:span text:style-name="Source_20_Text"><text:span text:style-name="T29">SELECT</text:span></text:span><text:span text:style-name="Source_20_Text"><text:span text:style-name="T30"> </text:span></text:span></text:p>
        <text:p text:style-name="P26"><text:span text:style-name="Source_20_Text"><text:span text:style-name="T31"><text:s text:c="8"/>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VENDA'</text:span></text:span><text:span text:style-name="Source_20_Text"><text:span text:style-name="T30">, </text:span></text:span><text:span text:style-name="Source_20_Text"><text:span text:style-name="T34">'ESTOQUE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 </text:span></text:span><text:span text:style-name="Source_20_Text"><text:span text:style-name="T33">-</text:span></text:span></text:p>
        <text:p text:style-name="P26"><text:span text:style-name="Source_20_Text"><text:span text:style-name="T31"><text:s text:c="8"/></text:span></text:span><text:span text:style-name="Source_20_Text"><text:span text:style-name="T32">SUM</text:span></text:span><text:span text:style-name="Source_20_Text"><text:span text:style-name="T30">(</text:span></text:span><text:span text:style-name="Source_20_Text"><text:span text:style-name="T29">CASE</text:span></text:span><text:span text:style-name="Source_20_Text"><text:span text:style-name="T30"> </text:span></text:span><text:span text:style-name="Source_20_Text"><text:span text:style-name="T29">WHEN</text:span></text:span><text:span text:style-name="Source_20_Text"><text:span text:style-name="T30"> categoria </text:span></text:span><text:span text:style-name="Source_20_Text"><text:span text:style-name="T29">IN</text:span></text:span><text:span text:style-name="Source_20_Text"><text:span text:style-name="T30"> (</text:span></text:span><text:span text:style-name="Source_20_Text"><text:span text:style-name="T34">'FORNECEDOR'</text:span></text:span><text:span text:style-name="Source_20_Text"><text:span text:style-name="T30">, </text:span></text:span><text:span text:style-name="Source_20_Text"><text:span text:style-name="T34">'SALARIO'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status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ABERTO'</text:span></text:span><text:span text:style-name="Source_20_Text"><text:span text:style-name="T30"> </text:span></text:span><text:span text:style-name="Source_20_Text"><text:span text:style-name="T29">THEN</text:span></text:span><text:span text:style-name="Source_20_Text"><text:span text:style-name="T30"> valor </text:span></text:span><text:span text:style-name="Source_20_Text"><text:span text:style-name="T29">ELSE</text:span></text:span><text:span text:style-name="Source_20_Text"><text:span text:style-name="T30"> </text:span></text:span><text:span text:style-name="Source_20_Text"><text:span text:style-name="T36">0</text:span></text:span><text:span text:style-name="Source_20_Text"><text:span text:style-name="T30"> </text:span></text:span><text:span text:style-name="Source_20_Text"><text:span text:style-name="T29">END</text:span></text:span><text:span text:style-name="Source_20_Text"><text:span text:style-name="T30">)</text:span></text:span></text:p>
        <text:p text:style-name="P26"><text:span text:style-name="Source_20_Text"><text:span text:style-name="T31"><text:s text:c="4"/></text:span></text:span><text:span text:style-name="Source_20_Text"><text:span text:style-name="T29">INTO</text:span></text:span><text:span text:style-name="Source_20_Text"><text:span text:style-name="T30"> v_ncg_atual</text:span></text:span></text:p>
        <text:p text:style-name="P26"><text:span text:style-name="Source_20_Text"><text:span text:style-name="T31"><text:s text:c="4"/></text:span></text:span><text:span text:style-name="Source_20_Text"><text:span text:style-name="T29">FROM</text:span></text:span><text:span text:style-name="Source_20_Text"><text:span text:style-name="T30"> lancamentos_operacionais;</text:span></text:span></text:p>
        <text:p text:style-name="P36"/>
        <text:p text:style-name="P26"><text:span text:style-name="Source_20_Text"><text:span text:style-name="T31"><text:s text:c="4"/></text:span></text:span><text:span text:style-name="Source_20_Text"><text:span text:style-name="T35">-- 2. Regra de Negócio: Se a NCG for maior que 30 mil e o novo item for ESTOQUE</text:span></text:span></text:p>
        <text:p text:style-name="P26"><text:span text:style-name="Source_20_Text"><text:span text:style-name="T31"><text:s text:c="4"/></text:span></text:span><text:span text:style-name="Source_20_Text"><text:span text:style-name="T30">IF (v_ncg_atual </text:span></text:span><text:span text:style-name="Source_20_Text"><text:span text:style-name="T33">+</text:span></text:span><text:span text:style-name="Source_20_Text"><text:span text:style-name="T30"> NEW.valor </text:span></text:span><text:span text:style-name="Source_20_Text"><text:span text:style-name="T33">&gt;</text:span></text:span><text:span text:style-name="Source_20_Text"><text:span text:style-name="T30"> </text:span></text:span><text:span text:style-name="Source_20_Text"><text:span text:style-name="T36">30000.00</text:span></text:span><text:span text:style-name="Source_20_Text"><text:span text:style-name="T30">) </text:span></text:span><text:span text:style-name="Source_20_Text"><text:span text:style-name="T29">AND</text:span></text:span><text:span text:style-name="Source_20_Text"><text:span text:style-name="T30"> (NEW.categoria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ESTOQUE'</text:span></text:span><text:span text:style-name="Source_20_Text"><text:span text:style-name="T30">) </text:span></text:span><text:span text:style-name="Source_20_Text"><text:span text:style-name="T29">THEN</text:span></text:span></text:p>
        <text:p text:style-name="P26"><text:span text:style-name="Source_20_Text"><text:span text:style-name="T31"><text:s text:c="8"/></text:span></text:span><text:span text:style-name="Source_20_Text"><text:span text:style-name="T30">SIGNAL </text:span></text:span><text:span text:style-name="Source_20_Text"><text:span text:style-name="T29">SQLSTATE</text:span></text:span><text:span text:style-name="Source_20_Text"><text:span text:style-name="T30"> </text:span></text:span><text:span text:style-name="Source_20_Text"><text:span text:style-name="T34">'45000'</text:span></text:span><text:span text:style-name="Source_20_Text"><text:span text:style-name="T30"> </text:span></text:span></text:p>
        <text:p text:style-name="P26"><text:span text:style-name="Source_20_Text"><text:span text:style-name="T31"><text:s text:c="8"/></text:span></text:span><text:span text:style-name="Source_20_Text"><text:span text:style-name="T29">SET</text:span></text:span><text:span text:style-name="Source_20_Text"><text:span text:style-name="T30"> MESSAGE_TEXT </text:span></text:span><text:span text:style-name="Source_20_Text"><text:span text:style-name="T33">=</text:span></text:span><text:span text:style-name="Source_20_Text"><text:span text:style-name="T30"> </text:span></text:span><text:span text:style-name="Source_20_Text"><text:span text:style-name="T34">'ERRO: Operação Bloqueada. NCG excederá o limite de segurança de R$ 30.000!'</text:span></text:span><text:span text:style-name="Source_20_Text"><text:span text:style-name="T30">;</text:span></text:span></text:p>
        <text:p text:style-name="P26"><text:span text:style-name="Source_20_Text"><text:span text:style-name="T31"><text:s text:c="4"/></text:span></text:span><text:span text:style-name="Source_20_Text"><text:span text:style-name="T29">END</text:span></text:span><text:span text:style-name="Source_20_Text"><text:span text:style-name="T30"> IF;</text:span></text:span></text:p>
        <text:p text:style-name="P26"><text:span text:style-name="Source_20_Text"><text:span text:style-name="T29">END</text:span></text:span><text:span text:style-name="Source_20_Text"><text:span text:style-name="T30">; </text:span></text:span><text:span text:style-name="Source_20_Text"><text:span text:style-name="T33">//</text:span></text:span></text:p>
        <text:p text:style-name="P36"/>
        <text:p text:style-name="P33"><text:span text:style-name="Source_20_Text"><text:span text:style-name="T30">DELIMITER ;</text:span></text:span></text:p>
        <text:h text:style-name="P18" text:outline-level="3"><text:span text:style-name="T12"/></text:h>
        <text:h text:style-name="P23" text:outline-level="3"><text:span text:style-name="T12">Testando a Inteligência do Sistema</text:span></text:h>
        <text:p text:style-name="P83"><text:span text:style-name="T37">Exemplo: </text:span><text:s/>tentar inserir uma compra de estoque de <text:span text:style-name="T4">R$ 20.000,00</text:span>. Como já tínhamos uma NCG alta de R$ 21.000,00 (da simulação anterior), o sistema deve barrar:</text:p>
        <text:p text:style-name="P129">SQL</text:p>
        <text:p text:style-name="P25"><text:span text:style-name="Source_20_Text"><text:span text:style-name="T35">-- Tentativa de compra que estoura o limite</text:span></text:span></text:p>
        <text:p text:style-name="P26"><text:span text:style-name="Source_20_Text"><text:span text:style-name="T29">INSERT</text:span></text:span><text:span text:style-name="Source_20_Text"><text:span text:style-name="T30"> </text:span></text:span><text:span text:style-name="Source_20_Text"><text:span text:style-name="T29">INTO</text:span></text:span><text:span text:style-name="Source_20_Text"><text:span text:style-name="T30"> lancamentos_operacionais (id, entidade_id, categoria, valor, status, data_vencimento)</text:span></text:span></text:p>
        <text:p text:style-name="P26"><text:span text:style-name="Source_20_Text"><text:span text:style-name="T29">VALUES</text:span></text:span><text:span text:style-name="Source_20_Text"><text:span text:style-name="T30"> (</text:span></text:span><text:span text:style-name="Source_20_Text"><text:span text:style-name="T36">104</text:span></text:span><text:span text:style-name="Source_20_Text"><text:span text:style-name="T30">, </text:span></text:span><text:span text:style-name="Source_20_Text"><text:span text:style-name="T36">2</text:span></text:span><text:span text:style-name="Source_20_Text"><text:span text:style-name="T30">, </text:span></text:span><text:span text:style-name="Source_20_Text"><text:span text:style-name="T34">'ESTOQUE'</text:span></text:span><text:span text:style-name="Source_20_Text"><text:span text:style-name="T30">, </text:span></text:span><text:span text:style-name="Source_20_Text"><text:span text:style-name="T36">20000.00</text:span></text:span><text:span text:style-name="Source_20_Text"><text:span text:style-name="T30">, </text:span></text:span><text:span text:style-name="Source_20_Text"><text:span text:style-name="T34">'ABERTO'</text:span></text:span><text:span text:style-name="Source_20_Text"><text:span text:style-name="T30">, </text:span></text:span><text:span text:style-name="Source_20_Text"><text:span text:style-name="T34">'2026-06-01'</text:span></text:span><text:span text:style-name="Source_20_Text"><text:span text:style-name="T30">);</text:span></text:span></text:p>
        <text:p text:style-name="P125">Resultado esperado no console do banco:</text:p>
        <text:p text:style-name="P40"><text:span text:style-name="Source_20_Text"><text:span text:style-name="T26">Error: ERRO: Operação Bloqueada. NCG excederá o limite de segurança de R$ 30.000!</text:span></text:span></text:p>
        <text:h text:style-name="P18" text:outline-level="3"><text:span text:style-name="T12"/></text:h>
        <text:h text:style-name="P19" text:outline-level="3"><text:span text:style-name="T12">O Valor Estratégico para o Profissional de SI</text:span></text:h>
        <text:list text:style-name="L14">
          <text:list-item>
            <text:p text:style-name="P148"><text:span text:style-name="T20">Segurança de Dados vs. Segurança de Negócio:</text:span><text:span text:style-name="T17"> Você não está apenas garantindo que o campo </text:span><text:span text:style-name="Source_20_Text"><text:span text:style-name="T26">valor</text:span></text:span><text:span text:style-name="T17"> seja um número; você está garantindo que a empresa não tome uma decisão que comprometa sua sobrevivência.</text:span></text:p>
          </text:list-item>
          <text:list-item>
            <text:p text:style-name="P113"><text:span text:style-name="T4">Redução de Erros no Front-end:</text:span> Mesmo que o desenvolvedor do aplicativo esqueça de colocar essa validação na tela, o Banco de Dados (a "última linha de defesa") impedirá o erro.</text:p>
          </text:list-item>
          <text:list-item>
            <text:p text:style-name="P113"><text:span text:style-name="T4">Auditabilidade:</text:span> O uso de Triggers deixa claro para os auditores que existem regras sistêmicas rígidas governando os processos financeiros.</text:p>
          </text:list-item>
        </text:list>
        <text:p text:style-name="P24"/>
        <text:h text:style-name="P5" text:outline-level="3">Resumo da Aula Prática</text:h>
        <text:list text:style-name="L15">
          <text:list-item>
            <text:p text:style-name="P115">A <text:span text:style-name="T4">Estrutura de Tabelas</text:span> (Modelagem Relacional).</text:p>
          </text:list-item>
          <text:list-item>
            <text:p text:style-name="P115">A <text:span text:style-name="T4">Lógica de Cálculo</text:span> (SQL Avançado).</text:p>
          </text:list-item>
          <text:list-item>
            <text:p text:style-name="P115">A <text:span text:style-name="T4">Visualização de Indicadores</text:span> (Views de BI).</text:p>
          </text:list-item>
          <text:list-item>
            <text:p text:style-name="P115">A <text:span text:style-name="T4">Automação de Regras</text:span> (Triggers de Segurança).</text:p>
          </text:list-item>
        </text:list>
        <text:p text:style-name="P156"/>
      </text:section>
      <text:p text:style-name="P44"><text:soft-page-break/></text:p>
      <text:p text:style-name="P43"><text:span text:style-name="T3">REFERÊNCIAS</text:span></text:p>
      <text:p text:style-name="P44"/>
      <text:p text:style-name="P45"><text:span text:style-name="T2">FLEURIET, Michel; KEHDY, Ricardo; BLANC, Georges.</text:span> <text:span text:style-name="T8">O Modelo Dinâmico de Gestão Financeira</text:span>. 2. ed. Rio de Janeiro: Elsevier, 2003.</text:p>
      <text:p text:style-name="P45"><text:span text:style-name="T2">GITMAN, Lawrence J.</text:span> <text:span text:style-name="T8">Princípios de Administração Financeira</text:span>. 14. ed. São Paulo: Pearson Education, 2017.</text:p>
      <text:p text:style-name="P45"><text:span text:style-name="T2">HIGGINS, Robert C.</text:span> <text:span text:style-name="T8">Análise para a Gestão Financeira</text:span>. 10. ed. Porto Alegre: AMGH, 2014.</text:p>
      <text:p text:style-name="P45"><text:span text:style-name="T2">ROSS, Stephen A.; WESTERFIELD, Randolph W.; JAFFE, Jeffrey.</text:span> <text:span text:style-name="T8">Administração Financeira: Corporate Finance</text:span>. 10. ed. Porto Alegre: AMGH, 2015.</text:p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1.59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uiz Dalmonech</meta:initial-creator>
    <meta:editing-cycles>11</meta:editing-cycles>
    <meta:creation-date>2026-03-17T21:07:00</meta:creation-date>
    <dc:date>2026-03-26T12:55:25.435000000</dc:date>
    <meta:editing-duration>PT2H47M1S</meta:editing-duration>
    <meta:generator>MtscOffice/7.4.2.3$Windows_X86_64 LibreOffice_project/382eef1f22670f7f4118c8c2dd222ec7ad009daf</meta:generator>
    <meta:document-statistic meta:table-count="2" meta:image-count="1" meta:object-count="0" meta:page-count="16" meta:paragraph-count="409" meta:word-count="4225" meta:character-count="27011" meta:non-whitespace-character-count="22884"/>
    <meta:user-defined meta:name="AppVersion">16.0000</meta:user-defined>
    <meta:template xlink:type="simple" xlink:actuate="onRequest" xlink:title="Normal.dotm" xlink:href=""/>
  </office:meta>
</office:document-meta>
</file>