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000000068517EFEA2750934B0.png" manifest:media-type="image/png"/>
  <manifest:file-entry manifest:full-path="Pictures/10000000000003EB000002C9EB3D75DFF3904E4E.png" manifest:media-type="image/png"/>
  <manifest:file-entry manifest:full-path="Pictures/1000000000000316000002A852ECCF2BF914AB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oogle Sans Text" svg:font-family="'Google Sans Text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2.303cm" fo:break-before="auto" fo:break-after="auto" table:align="left" fo:keep-with-next="auto"/>
    </style:style>
    <style:style style:name="Tabela1.A" style:family="table-column">
      <style:table-column-properties style:column-width="3.628cm"/>
    </style:style>
    <style:style style:name="Tabela1.B" style:family="table-column">
      <style:table-column-properties style:column-width="4.075cm"/>
    </style:style>
    <style:style style:name="Tabela1.C" style:family="table-column">
      <style:table-column-properties style:column-width="4.6cm"/>
    </style:style>
    <style:style style:name="Tabela1.1" style:family="table-row">
      <style:table-row-properties style:min-row-height="1.499cm"/>
    </style:style>
    <style:style style:name="Tabela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ela1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ela1.2" style:family="table-row">
      <style:table-row-properties style:min-row-height="0.706cm"/>
    </style:style>
    <style:style style:name="Tabela2" style:family="table">
      <style:table-properties style:width="17cm" fo:break-before="auto" fo:break-after="auto" table:align="left" fo:keep-with-next="auto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5.085cm"/>
    </style:style>
    <style:style style:name="Tabela2.C" style:family="table-column">
      <style:table-column-properties style:column-width="8.608cm"/>
    </style:style>
    <style:style style:name="Tabela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ela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ela2.6" style:family="table-row">
      <style:table-row-properties style:min-row-height="1.522cm"/>
    </style:style>
    <style:style style:name="Tabela3" style:family="table">
      <style:table-properties style:width="17cm" fo:break-before="auto" fo:break-after="auto" table:align="left" fo:keep-with-next="auto"/>
    </style:style>
    <style:style style:name="Tabela3.A" style:family="table-column">
      <style:table-column-properties style:column-width="2.817cm"/>
    </style:style>
    <style:style style:name="Tabela3.B" style:family="table-column">
      <style:table-column-properties style:column-width="5.736cm"/>
    </style:style>
    <style:style style:name="Tabela3.C" style:family="table-column">
      <style:table-column-properties style:column-width="2.671cm"/>
    </style:style>
    <style:style style:name="Tabela3.D" style:family="table-column">
      <style:table-column-properties style:column-width="5.777cm"/>
    </style:style>
    <style:style style:name="Tabela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ela3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Heading_20_2">
      <style:paragraph-properties fo:margin-left="0cm" fo:margin-right="0cm" fo:line-height="120%" fo:orphans="2" fo:widows="2" fo:text-indent="0cm" style:auto-text-indent="false"/>
      <style:text-properties style:font-name="Arial1" fo:font-size="12pt" officeooo:rsid="0005e418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fo:font-style="italic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keep-with-next="auto"/>
      <style:text-properties fo:color="#1f1f1f" loext:opacity="100%" style:font-name="Google Sans Text" fo:font-style="italic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fo:font-size="10pt" fo:font-weight="bold" style:font-size-asian="10pt" style:font-size-complex="10pt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4%" fo:text-align="start" style:justify-single-word="false" fo:orphans="2" fo:widows="2" fo:text-indent="0cm" style:auto-text-indent="false" fo:keep-with-next="auto"/>
      <style:text-properties fo:color="#1f1f1f" loext:opacity="100%" style:font-name="Google Sans Text" fo:font-size="10pt" fo:font-weight="bold" style:font-size-asian="10pt" style:font-size-complex="10pt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fo:font-size="10pt" style:font-size-asian="10pt" style:font-size-complex="10pt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keep-with-next="auto"/>
      <style:text-properties fo:color="#1f1f1f" loext:opacity="100%" style:font-name="Arial1" fo:font-weight="bold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keep-with-next="auto"/>
      <style:text-properties fo:color="#1f1f1f" loext:opacity="100%" style:font-name="Arial1" loext:padding="0cm" loext:border="non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keep-with-next="auto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212529" loext:opacity="100%" style:font-name="Arial1" fo:font-size="12pt" fo:letter-spacing="normal" fo:font-style="normal" fo:font-weight="normal"/>
    </style:style>
    <style:style style:name="P16" style:family="paragraph" style:parent-style-name="Heading_20_3">
      <style:paragraph-properties fo:margin-top="0cm" fo:margin-bottom="0cm" style:contextual-spacing="false" fo:line-height="115%" fo:text-align="justify" style:justify-single-word="false"/>
      <style:text-properties style:font-name="Arial1" officeooo:rsid="0005e418" officeooo:paragraph-rsid="0005e418"/>
    </style:style>
    <style:style style:name="P1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Arial1" officeooo:rsid="0005e418" officeooo:paragraph-rsid="0005e418"/>
    </style:style>
    <style:style style:name="P18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Arial1" officeooo:rsid="0005e418" officeooo:paragraph-rsid="000ade8b"/>
    </style:style>
    <style:style style:name="P19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Arial1" officeooo:rsid="0005e418" officeooo:paragraph-rsid="0005e418"/>
    </style:style>
    <style:style style:name="P20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Arial1" officeooo:rsid="0005e418" officeooo:paragraph-rsid="0005e418"/>
    </style:style>
    <style:style style:name="P2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Arial1" fo:font-weight="bold" officeooo:rsid="0005e418" officeooo:paragraph-rsid="0005e418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Arial1" fo:font-weight="bold" officeooo:rsid="0005e418" officeooo:paragraph-rsid="000c9c63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Arial1" fo:font-weight="bold" officeooo:rsid="0005e418" officeooo:paragraph-rsid="0005e418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Arial1" fo:font-weight="bold" officeooo:rsid="0005e418" officeooo:paragraph-rsid="000c9c63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Arial1" fo:font-weight="bold" officeooo:rsid="0005e418" officeooo:paragraph-rsid="0005e418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Arial1" fo:font-weight="bold" officeooo:rsid="000c9c63" officeooo:paragraph-rsid="000c9c63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Arial1" fo:font-weight="bold" officeooo:rsid="000f0b0b" officeooo:paragraph-rsid="000f0b0b" style:font-weight-asian="bold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Arial1" fo:font-weight="bold" officeooo:rsid="0015d378" officeooo:paragraph-rsid="0015d378" style:font-weight-asian="bold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Arial1" fo:font-weight="normal" officeooo:rsid="000c9c63" officeooo:paragraph-rsid="000c9c63" style:font-weight-asian="normal" style:font-weight-complex="normal"/>
    </style:style>
    <style:style style:name="P30" style:family="paragraph" style:parent-style-name="Text_20_body" style:master-page-name="">
      <style:paragraph-properties fo:margin-top="0cm" fo:margin-bottom="0cm" style:contextual-spacing="false" fo:line-height="115%" fo:text-align="justify" style:justify-single-word="false" style:page-number="auto"/>
      <style:text-properties style:font-name="Arial1" officeooo:rsid="0005e418" officeooo:paragraph-rsid="0005e418"/>
    </style:style>
    <style:style style:name="P31" style:family="paragraph" style:parent-style-name="Standard">
      <style:paragraph-properties fo:text-align="center" style:justify-single-word="false"/>
      <style:text-properties style:font-name="Arial1" officeooo:rsid="0005e418" officeooo:paragraph-rsid="0005e418"/>
    </style:style>
    <style:style style:name="P32" style:family="paragraph" style:parent-style-name="Standard">
      <style:paragraph-properties fo:text-align="center" style:justify-single-word="false"/>
      <style:text-properties style:font-name="Arial1" fo:font-weight="bold" officeooo:rsid="0005e418" officeooo:paragraph-rsid="0005e418" style:font-weight-asian="bold" style:font-weight-complex="bold"/>
    </style:style>
    <style:style style:name="P33" style:family="paragraph" style:parent-style-name="Text_20_body">
      <style:text-properties style:font-name="Arial1"/>
    </style:style>
    <style:style style:name="P34" style:family="paragraph" style:parent-style-name="Text_20_body">
      <style:paragraph-properties fo:text-align="center" style:justify-single-word="false"/>
      <style:text-properties style:font-name="Arial1" officeooo:rsid="0005e418" officeooo:paragraph-rsid="0005e418"/>
    </style:style>
    <style:style style:name="P35" style:family="paragraph" style:parent-style-name="Text_20_body">
      <style:paragraph-properties fo:text-align="start" style:justify-single-word="false"/>
      <style:text-properties style:font-name="Arial1" fo:font-weight="bold" officeooo:rsid="0005e418" officeooo:paragraph-rsid="0005e418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font-name="Arial1"/>
    </style:style>
    <style:style style:name="P37" style:family="paragraph" style:parent-style-name="Text_20_body" style:list-style-name="L1">
      <style:text-properties style:font-name="Arial1"/>
    </style:style>
    <style:style style:name="P38" style:family="paragraph" style:parent-style-name="Text_20_body" style:list-style-name="L3"/>
    <style:style style:name="P39" style:family="paragraph" style:parent-style-name="Text_20_body" style:list-style-name="L3">
      <style:text-properties officeooo:rsid="001c3656" officeooo:paragraph-rsid="001c3656"/>
    </style:style>
    <style:style style:name="P40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Arial1" fo:font-weight="bold" officeooo:rsid="0005e418" officeooo:paragraph-rsid="0005e418" style:font-weight-asian="bold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Arial1" fo:font-weight="bold" officeooo:rsid="0005e418" officeooo:paragraph-rsid="000ade8b" style:font-weight-asian="bold" style:font-weight-complex="bold"/>
    </style:style>
    <style:style style:name="P42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style:font-name="Arial1" officeooo:rsid="0005e418" officeooo:paragraph-rsid="0005e418"/>
    </style:style>
    <style:style style:name="T1" style:family="text">
      <style:text-properties officeooo:rsid="0005e418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698c" style:font-weight-asian="bold" style:font-weight-complex="bold"/>
    </style:style>
    <style:style style:name="T5" style:family="text">
      <style:text-properties fo:font-weight="bold" officeooo:rsid="000ade8b" style:font-weight-asian="bold" style:font-weight-complex="bold"/>
    </style:style>
    <style:style style:name="T6" style:family="text">
      <style:text-properties fo:color="#1f1f1f" loext:opacity="100%" style:font-name="Google Sans Text" loext:padding="0cm" loext:border="none"/>
    </style:style>
    <style:style style:name="T7" style:family="text">
      <style:text-properties fo:color="#1f1f1f" loext:opacity="100%" style:font-name="Google Sans Text" fo:font-size="10pt" style:font-size-asian="10pt" style:font-size-complex="10pt" loext:padding="0cm" loext:border="none"/>
    </style:style>
    <style:style style:name="T8" style:family="text">
      <style:text-properties fo:color="#1f1f1f" loext:opacity="100%" style:font-name="Arial1" loext:padding="0cm" loext:border="none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6698c"/>
    </style:style>
    <style:style style:name="T12" style:family="text">
      <style:text-properties officeooo:rsid="0008191e"/>
    </style:style>
    <style:style style:name="T13" style:family="text">
      <style:text-properties officeooo:rsid="00081e23"/>
    </style:style>
    <style:style style:name="T14" style:family="text">
      <style:text-properties fo:font-variant="normal" fo:text-transform="none" fo:color="#212529" loext:opacity="100%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212529" loext:opacity="100%" fo:letter-spacing="normal" fo:font-style="normal" fo:font-weight="bold" officeooo:rsid="00081e23" style:font-weight-asian="bold" style:font-weight-complex="bold"/>
    </style:style>
    <style:style style:name="T16" style:family="text">
      <style:text-properties officeooo:rsid="000ade8b"/>
    </style:style>
    <style:style style:name="T17" style:family="text">
      <style:text-properties officeooo:rsid="000c9c63"/>
    </style:style>
    <style:style style:name="T18" style:family="text">
      <style:text-properties officeooo:rsid="001c36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space-before="0.748cm" text:min-label-width="0.499cm"/>
        <style:text-properties style:font-name="OpenSymbol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ula: Análise <text:span text:style-name="T11">Vertical </text:span>das Demonstrações Contábeis</text:p>
      <text:p text:style-name="P31"/>
      <text:p text:style-name="P32">Análise Vertical <text:span text:style-name="T13">(AV)</text:span></text:p>
      <text:p text:style-name="P34"/>
      <text:p text:style-name="P35">1. Conceito e Objetivo</text:p>
      <text:p text:style-name="P30"><text:tab/>Segundo Marion, a Análise Vertical (também chamada de análise de estrutura) foca no estudo da composição percentual de cada item das demonstrações em uma data específica.</text:p>
      <text:p text:style-name="P36"><text:tab/>A <text:span text:style-name="T2">Análise Vertical</text:span> é o "raio-x" que revela a estrutura e a estratégia de uma empresa em um momento específico. Em vez de olhar apenas para os valores em reais, ela transforma cada item em uma <text:span text:style-name="T2">proporção relativa (%)</text:span>, permitindo entender o peso de cada “<text:span text:style-name="T13">elemento patrimonial ou de resultado”</text:span> em relação ao todo.</text:p>
      <text:p text:style-name="P33">Sua aplicação se divide nos dois pilares da contabilidade:</text:p>
      <text:list xml:id="list3373938464" text:style-name="L1">
        <text:list-item>
          <text:p text:style-name="P37"><text:span text:style-name="T2">No Balanço Patrimonial (Estrutura de Recursos):</text:span> A base (100%) é o <text:span text:style-name="T2">Ativo Total</text:span>. A AV mostra como a empresa decidiu aplicar seu dinheiro. Por exemplo, se a AV do <text:span text:style-name="T9">Ativo Imobilizado</text:span> é 60%, você descobre que a empresa tem um perfil industrial pesado. No lado do Passivo, ela revela a origem dos recursos: se o <text:span text:style-name="T9">Patrimônio Líquido</text:span> representa 40%, você entende a proporção de capital próprio financiando o negócio.</text:p>
        </text:list-item>
        <text:list-item>
          <text:p text:style-name="P37"><text:span text:style-name="T2">Na DRE (Eficiência Operacional):</text:span> A base (100%) é a <text:span text:style-name="T2">Receita Líquida</text:span>. Aqui, a AV mede quanto de cada real vendido sobra após cada gasto. Se a AV das <text:span text:style-name="T9">Despesas Operacionais</text:span> é de 42%, isso significa que quase metade do faturamento é consumido para manter a estrutura funcionando. É a forma mais direta de visualizar as margens e a lucratividade real da operação.</text:p>
        </text:list-item>
      </text:list>
      <text:p text:style-name="P36"><text:span text:style-name="T2">Em resumo:</text:span> A Análise Vertical expõe a <text:span text:style-name="T2">composição do todo</text:span>. É a ferramenta que permite ao analista diagnosticar se a empresa está “inchada” em alguma conta específica ou se a sua estrutura de custos <text:span text:style-name="T13">e despesas </text:span>está devidamente equilibrada para gerar lucro. <text:span text:style-name="T13">Assim, e</text:span><text:span text:style-name="T1">nquanto a Análise Horizontal busca o crescimento no tempo (tendência), a Vertical busca medir a importância relativa de cada grupo de contas. </text:span></text:p>
      <text:h text:style-name="P1" text:outline-level="2"><text:bookmark text:name="para-que-serve"/><text:span text:style-name="T15">1.1 </text:span><text:span text:style-name="T14">Para que serve a Análise Vertical?</text:span></text:h>
      <text:p text:style-name="P15"><text:tab/>Quando uma empresa de capital aberto divulga a Demonstração do Resultado do Exercício (DRE), uma das primeiras informações que atrai olhares de interessados – inclusive é destaque nas notícias – <text:span text:style-name="T3">é o lucro ou prejuízo obtido no período observado</text:span>.</text:p>
      <text:p text:style-name="P15"><text:tab/>Esse número é resultado de uma análise vertical: existem receitas totais, despesas totais, um resultado bruto e a dedução dos impostos. O resultado é o lucro ou prejuízo da organização.</text:p>
      <text:p text:style-name="P15"><text:tab/>A Análise Vertical <text:span text:style-name="T13">na </text:span>DRE aqui serve para mapear o desempenho de uma empresa em um determinado período. Mas ela também serve de embasamento para o investidor sobre o lucro de uma organização e do setor em que ela está.</text:p>
      <text:p text:style-name="P17"/>
      <text:p text:style-name="P17"/>
      <text:p text:style-name="P17"><text:soft-page-break/></text:p>
      <text:p text:style-name="P17"/>
      <text:p text:style-name="P21">2. A Metodologia de Cálculo</text:p>
      <text:p text:style-name="P21"/>
      <text:p text:style-name="P17"><text:tab/>A lógica é simples: definimos uma conta-base (o “todo”) que equivalerá a 100%.</text:p>
      <text:p text:style-name="P17"><text:s text:c="4"/>• <text:span text:style-name="T3">No Balanço Patrimonial</text:span>: A base é o Ativo Total (para o Ativo) e o Passivo Total + Patrimônio Líquido (para o Passivo/PL).</text:p>
      <text:p text:style-name="P21"/>
      <text:p text:style-name="P17"><text:span text:style-name="T3"><text:s text:c="4"/>• Na DRE: A base é a </text:span>Receita Operacional Líquida (ou Vendas Líquidas).</text:p>
      <text:p text:style-name="P17">A fórmula geral é:</text:p>
      <text:p text:style-name="P17"><draw:frame draw:style-name="fr3" draw:name="Figura1" text:anchor-type="char" svg:x="5.189cm" svg:y="0.31cm" svg:width="6.906cm" svg:height="2.041cm" draw:z-index="0"><draw:image xlink:href="Pictures/100000000000016000000068517EFEA2750934B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21">3. Aplicação Prática</text:p>
      <text:p text:style-name="P21"/>
      <text:p text:style-name="P21"><text:span text:style-name="T11">3.1 </text:span>No Balanço Patrimonial (Estrutura de Ativos e Fontes)</text:p>
      <text:p text:style-name="P21"/>
      <text:p text:style-name="P17"><text:tab/>Aqui, analisa-<text:span text:style-name="T11">se </text:span>a estratégia de investimento e financiamento da empresa.</text:p>
      <text:p text:style-name="P19"><text:s text:c="4"/>•<text:span text:style-name="T3"> Ativo:</text:span> Se o Ativo Imobilizado tem uma AV de 70%, estamos diante de uma empresa pesada em capital (indústria). Se o Disponível é 2%, a liquidez imediata pode estar sob pressão.</text:p>
      <text:p text:style-name="P19"><text:s text:c="2"/><text:span text:style-name="T3"><text:s text:c="2"/>• Passivo:</text:span> Se o Passivo Circulante representa 60% do total, a empresa tem um perfil de endividamento de curto prazo, o que exige atenção ao capital de giro.</text:p>
      <text:p text:style-name="P19"/>
      <text:p text:style-name="P21"><text:span text:style-name="T11">3.2 </text:span>DRE (Eficiência e Margens)</text:p>
      <text:p text:style-name="P21"/>
      <text:p text:style-name="P17"><text:tab/>É aqui que Marion enfatiza a verificação da eficiência operacional. Ao fixar a Receita Líquida em 100%, conseguimos ver quanto “sobra” em cada etapa:</text:p>
      <text:p text:style-name="P17"><text:s text:c="4"/>•<text:span text:style-name="T3"> CPV</text:span> (Custo dos Produtos Vendidos): Se a AV do CPV é 60%, significa que para cada R$ 100 vendidos, R$ 60 foram para produzir.</text:p>
      <text:p text:style-name="P17"><text:s text:c="4"/>• <text:span text:style-name="T3">Lucro Líquido:</text:span> Se a AV final for 5%, essa é a margem líquida da empresa.</text:p>
      <text:p text:style-name="P17"/>
      <text:p text:style-name="P21"><text:span text:style-name="T11">3.3 </text:span>O “Olhar” do Analista segundo Marion</text:p>
      <text:p text:style-name="P21"/>
      <text:p text:style-name="P17"><text:tab/>Marion sugere que a análise vertical não deve ser feita de forma isolada. Ela serve para:</text:p>
      <text:list xml:id="list756279313" text:style-name="L2">
        <text:list-item>
          <text:p text:style-name="P42"><text:span text:style-name="T3">Identificar contas atípicas:</text:span> Se uma conta de “Despesas Administrativas” saltou de uma AV de 5% para 15% sem aumento proporcional de vendas, há um problema de controle.</text:p>
        </text:list-item>
        <text:list-item>
          <text:p text:style-name="P42"><text:span text:style-name="T3">Comparação Intersetorial:</text:span> Comparar a estrutura de uma empresa com a média do seu setor (<text:span text:style-name="T10">Benchmarking</text:span>).</text:p>
        </text:list-item>
        <text:list-item>
          <text:p text:style-name="P42"><text:span text:style-name="T3">Avaliar a política de crédito:</text:span> Verificar a representatividade de “Contas a Receber” no Ativo Total.</text:p>
        </text:list-item>
      </text:list>
      <text:p text:style-name="P17"/>
      <text:p text:style-name="P23"><text:soft-page-break/>Exemplo Rápido (DRE Simplificada)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14"><text:span text:style-name="Strong_20_Emphasis"><text:span text:style-name="T8">Conta</text:span></text:span></text:p>
            </table:table-cell>
            <table:table-cell table:style-name="Tabela1.A1" office:value-type="string">
              <text:p text:style-name="P14"><text:span text:style-name="Strong_20_Emphasis"><text:span text:style-name="T8">Valor (R$)</text:span></text:span></text:p>
            </table:table-cell>
            <table:table-cell table:style-name="Tabela1.C1" office:value-type="string">
              <text:p text:style-name="P14"><text:span text:style-name="Strong_20_Emphasis"><text:span text:style-name="T8">Análise Vertical (AV)</text:span></text:span></text:p>
            </table:table-cell>
          </table:table-row>
        </table:table-header-rows>
        <table:table-row table:style-name="Tabela1.2">
          <table:table-cell table:style-name="Tabela1.A1" office:value-type="string">
            <text:p text:style-name="P12">Receita Líquida</text:p>
          </table:table-cell>
          <table:table-cell table:style-name="Tabela1.A1" office:value-type="string">
            <text:p text:style-name="P12">100.000</text:p>
          </table:table-cell>
          <table:table-cell table:style-name="Tabela1.C1" office:value-type="string">
            <text:p text:style-name="P12">100,00%</text:p>
          </table:table-cell>
        </table:table-row>
        <table:table-row table:style-name="TableLine2254859094704">
          <table:table-cell table:style-name="Tabela1.A1" office:value-type="string">
            <text:p text:style-name="P13">(-) CPV</text:p>
          </table:table-cell>
          <table:table-cell table:style-name="Tabela1.A1" office:value-type="string">
            <text:p text:style-name="P13">(60.000)</text:p>
          </table:table-cell>
          <table:table-cell table:style-name="Tabela1.C1" office:value-type="string">
            <text:p text:style-name="P13">60,00%</text:p>
          </table:table-cell>
        </table:table-row>
        <table:table-row table:style-name="TableLine2254859089264">
          <table:table-cell table:style-name="Tabela1.A1" office:value-type="string">
            <text:p text:style-name="P12">Lucro Bruto</text:p>
          </table:table-cell>
          <table:table-cell table:style-name="Tabela1.A1" office:value-type="string">
            <text:p text:style-name="P12">40.000</text:p>
          </table:table-cell>
          <table:table-cell table:style-name="Tabela1.C1" office:value-type="string">
            <text:p text:style-name="P12">40,00%</text:p>
          </table:table-cell>
        </table:table-row>
        <table:table-row table:style-name="TableLine2254859089536">
          <table:table-cell table:style-name="Tabela1.A1" office:value-type="string">
            <text:p text:style-name="P13">(-) Despesas Op<text:span text:style-name="T13">eracionais</text:span></text:p>
          </table:table-cell>
          <table:table-cell table:style-name="Tabela1.A1" office:value-type="string">
            <text:p text:style-name="P13">(25.000)</text:p>
          </table:table-cell>
          <table:table-cell table:style-name="Tabela1.C1" office:value-type="string">
            <text:p text:style-name="P13">25,00%</text:p>
          </table:table-cell>
        </table:table-row>
        <table:table-row table:style-name="TableLine2254859100960">
          <table:table-cell table:style-name="Tabela1.A1" office:value-type="string">
            <text:p text:style-name="P12">Lucro Líquido</text:p>
          </table:table-cell>
          <table:table-cell table:style-name="Tabela1.A1" office:value-type="string">
            <text:p text:style-name="P12">15.000</text:p>
          </table:table-cell>
          <table:table-cell table:style-name="Tabela1.C1" office:value-type="string">
            <text:p text:style-name="P12">15,00%</text:p>
          </table:table-cell>
        </table:table-row>
      </table:table>
      <text:p text:style-name="P17"/>
      <text:p text:style-name="P17">Nota: Observe<text:span text:style-name="T12">m</text:span> que a AV nos diz instantaneamente que a margem bruta da empresa é de 40% e a lucratividade final é de 15%.</text:p>
      <text:p text:style-name="P17"/>
      <text:p text:style-name="P17"/>
      <text:p text:style-name="P18"><text:span text:style-name="T4">3.</text:span><text:span text:style-name="T5">4 </text:span><text:span text:style-name="T4"><text:s/></text:span><text:span text:style-name="T5">Indicadores usados na análise moderna</text:span></text:p>
      <text:p text:style-name="P41"/>
      <text:p text:style-name="P18"><text:span text:style-name="T16"><text:tab/>I</text:span>ndicadores fundamentais na análise moderna, pois permitem “limpar” o resultado da empresa para entender o que é realmente performance operacional e o que é efeito de impostos ou estrutura de capital.</text:p>
      <text:p text:style-name="P17"/>
      <text:p text:style-name="P21"><text:span text:style-name="T16">3.4.</text:span>1. EBIT</text:p>
      <text:p text:style-name="P17"/>
      <text:p text:style-name="P17"><text:tab/>É o lucro gerado exclusivamente pela operação do negócio, antes de considerar como a empresa é financiada (juros) e como ela é tributada.</text:p>
      <text:p text:style-name="P17"/>
      <text:p text:style-name="P17"><text:span text:style-name="T16">EBIT (</text:span><text:span text:style-name="T10">Earnings Before Interest and Taxes</text:span><text:span text:style-name="T16">) é traduzido em </text:span>Português <text:span text:style-name="T16">para </text:span>LAJIR <text:span text:style-name="T16">(</text:span>Lucro Antes dos Juros e Imposto de Renda). Representa o lucro operacional puro. Ele mostra se a operação da empresa é rentável por si só, independentemente de ela estar muito endividada ou de pagar muitos impostos.</text:p>
      <text:p text:style-name="P17"/>
      <text:p text:style-name="P26">Quadro 1; apurando resultados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ext:soft-page-break/>
          <table:table-row table:style-name="TableLine2254859101776">
            <table:table-cell table:style-name="Tabela2.A1" office:value-type="string">
              <text:p text:style-name="P2"><text:span text:style-name="Strong_20_Emphasis"><text:span text:style-name="T6">Palavra</text:span></text:span></text:p>
            </table:table-cell>
            <table:table-cell table:style-name="Tabela2.A1" office:value-type="string">
              <text:p text:style-name="P2"><text:span text:style-name="Strong_20_Emphasis"><text:span text:style-name="T6">Pronúncia Aproximada (Fonética em Português)</text:span></text:span></text:p>
            </table:table-cell>
            <table:table-cell table:style-name="Tabela2.C1" office:value-type="string">
              <text:p text:style-name="P2"><text:span text:style-name="Strong_20_Emphasis"><text:span text:style-name="T6">Dica de Entonação</text:span></text:span></text:p>
            </table:table-cell>
          </table:table-row>
        </table:table-header-rows>
        <table:table-row table:style-name="TableLine2254859099056">
          <table:table-cell table:style-name="Tabela2.A1" office:value-type="string">
            <text:p text:style-name="P3">Earnings</text:p>
          </table:table-cell>
          <table:table-cell table:style-name="Tabela2.A1" office:value-type="string">
            <text:p text:style-name="P7">Âr-ningz</text:p>
          </table:table-cell>
          <table:table-cell table:style-name="Tabela2.C1" office:value-type="string">
            <text:p text:style-name="P5">O "r" é aquele bem retroflexo (puxado), como no interior.</text:p>
          </table:table-cell>
        </table:table-row>
        <table:table-row table:style-name="TableLine2254859090624">
          <table:table-cell table:style-name="Tabela2.A1" office:value-type="string">
            <text:p text:style-name="P3">Before</text:p>
          </table:table-cell>
          <table:table-cell table:style-name="Tabela2.A1" office:value-type="string">
            <text:p text:style-name="P7">Bi-fór</text:p>
          </table:table-cell>
          <table:table-cell table:style-name="Tabela2.C1" office:value-type="string">
            <text:p text:style-name="P5">Som de "o" aberto no final.</text:p>
          </table:table-cell>
        </table:table-row>
        <table:table-row table:style-name="TableLine2254859086816">
          <table:table-cell table:style-name="Tabela2.A1" office:value-type="string">
            <text:p text:style-name="P3">Interest</text:p>
          </table:table-cell>
          <table:table-cell table:style-name="Tabela2.A1" office:value-type="string">
            <text:p text:style-name="P7">Ín-trest</text:p>
          </table:table-cell>
          <table:table-cell table:style-name="Tabela2.C1" office:value-type="string">
            <text:p text:style-name="P5"><text:span text:style-name="T2">Atenção:</text:span> Quase não se pronuncia o "e" do meio. É comum dizerem <text:span text:style-name="T9">ín-ter-est</text:span>, mas o nativo diz <text:span text:style-name="T9">ín-trest</text:span>.</text:p>
          </table:table-cell>
        </table:table-row>
        <table:table-row table:style-name="TableLine2254859087088">
          <table:table-cell table:style-name="Tabela2.A1" office:value-type="string">
            <text:p text:style-name="P3">And</text:p>
          </table:table-cell>
          <table:table-cell table:style-name="Tabela2.A1" office:value-type="string">
            <text:p text:style-name="P7">Énd</text:p>
          </table:table-cell>
          <table:table-cell table:style-name="Tabela2.C1" office:value-type="string">
            <text:p text:style-name="P5">Som de "e" entre o "a" e o "e".</text:p>
          </table:table-cell>
        </table:table-row>
        <table:table-row table:style-name="Tabela2.6">
          <table:table-cell table:style-name="Tabela2.A1" office:value-type="string">
            <text:p text:style-name="P4">Taxes</text:p>
          </table:table-cell>
          <table:table-cell table:style-name="Tabela2.A1" office:value-type="string">
            <text:p text:style-name="P8">Ték-siz</text:p>
          </table:table-cell>
          <table:table-cell table:style-name="Tabela2.C1" office:value-type="string">
            <text:p text:style-name="P6">O "a" tem som de "é" e o final termina com som de "z".</text:p>
          </table:table-cell>
        </table:table-row>
      </table:table>
      <text:p text:style-name="P17"/>
      <text:p text:style-name="P17"/>
      <text:p text:style-name="P21"><text:span text:style-name="T16">3.4.2 </text:span>EBITDA</text:p>
      <text:p text:style-name="P17"/>
      <text:p text:style-name="P17"><text:tab/>É o indicador mais utilizado pelo mercado para medir o <text:span text:style-name="T3">potencial de geração de caixa</text:span> <text:span text:style-name="T3">operacional</text:span>, pois ignora gastos que não saíram do caixa (Depreciação e Amortização).</text:p>
      <text:p text:style-name="P17"/>
      <text:p text:style-name="P17"><text:span text:style-name="T16"><text:tab/>EBITDA (</text:span>Earnings Before Interest, Taxes, Depreciation and Amortization<text:span text:style-name="T16">), e p</text:span>ortuguês <text:span text:style-name="T16">é </text:span>LAJIDA (Lucro Antes dos Juros, Impostos, Depreciação e Amortização). <text:span text:style-name="T16">EBITIDA é o E</text:span>BIT acrescido das despesas que não afetam o caixa (como o desgaste de máquinas). O EBITDA é um bom “termômetro” da capacidade da empresa de gerar recursos para pagar dívidas e investir.</text:p>
      <text:p text:style-name="P17"/>
      <text:p text:style-name="P21"><text:span text:style-name="T16">3.4.3 </text:span>NOPLAT <text:span text:style-name="T16">(Nô-plét)</text:span></text:p>
      <text:p text:style-name="P17"/>
      <text:p text:style-name="P17"><text:tab/>Este é um conceito mais refinado, muito usado em modelos de avaliação de empresas (<text:span text:style-name="T10">Valuation</text:span>) e no cálculo do ROI (<text:span text:style-name="T10">Retorno sobre Investimento</text:span>).</text:p>
      <text:p text:style-name="P17"><text:tab/><text:span text:style-name="T16">NOPLAT (</text:span><text:span text:style-name="T10">Net Operating Profit Less Adjusted Taxes</text:span><text:span text:style-name="T16">), em p</text:span>ortuguês: Lucro Operacional Líquido <text:span text:style-name="T16">m</text:span>enos Impostos Ajustados.</text:p>
      <text:p text:style-name="P17"><text:tab/>Descrição: É o lucro operacional (EBIT) como se a empresa não tivesse dívidas, ou seja, aplicando o imposto diretamente sobre o resultado da operação. Ele permite comparar a lucratividade real de duas empresas de forma justa, mesmo que uma use capital próprio e a outra use empréstimos bancários.</text:p>
      <text:p text:style-name="P17"/>
      <text:p text:style-name="P25"><text:soft-page-break/>Quadro Resumo Comparativo</text:p>
      <text:p text:style-name="P17"/>
      <text:p text:style-name="P17"/>
      <text:h text:style-name="P16" text:outline-level="3">Como calcular (Lógica em cascata):</text:h>
      <text:list xml:id="list2064752007" text:style-name="L3">
        <text:list-item>
          <text:p text:style-name="P38"><text:span text:style-name="T2">Receita Líquida - Custos/Despesas Operacionais</text:span> = <text:span text:style-name="T2">EBIT</text:span></text:p>
        </text:list-item>
        <text:list-item>
          <text:p text:style-name="P38"><text:span text:style-name="T2">EBIT + Depreciação + Amortização</text:span> = <text:span text:style-name="T2">EBITDA</text:span></text:p>
        </text:list-item>
        <text:list-item>
          <text:p text:style-name="P38"><text:span text:style-name="T2">EBIT × (1 - Alíquota de Impostos)</text:span> = <text:span text:style-name="T2">NOPLAT</text:span> (simplificadamente); <text:span text:style-name="T18">ou</text:span></text:p>
        </text:list-item>
        <text:list-item>
          <text:p text:style-name="P39"><text:span text:style-name="T3">EBIT </text:span>= Lucro Líquido + Juros + Impostos</text:p>
        </text:list-item>
      </text:list>
      <text:p text:style-name="P17"/>
      <text:p text:style-name="P24"><text:tab/><text:span text:style-name="T17">Quadro 2 – Resumo dos tipos de resultados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leLine2254859091440">
            <table:table-cell table:style-name="Tabela3.A1" office:value-type="string">
              <text:p text:style-name="P2"><text:span text:style-name="Strong_20_Emphasis"><text:span text:style-name="T7">Estágio</text:span></text:span></text:p>
            </table:table-cell>
            <table:table-cell table:style-name="Tabela3.A1" office:value-type="string">
              <text:p text:style-name="P2"><text:span text:style-name="Strong_20_Emphasis"><text:span text:style-name="T7">Componentes do Cálculo</text:span></text:span></text:p>
            </table:table-cell>
            <table:table-cell table:style-name="Tabela3.A1" office:value-type="string">
              <text:p text:style-name="P2"><text:span text:style-name="Strong_20_Emphasis"><text:span text:style-name="T7">Indicador Gerado</text:span></text:span></text:p>
            </table:table-cell>
            <table:table-cell table:style-name="Tabela3.D1" office:value-type="string">
              <text:p text:style-name="P2"><text:span text:style-name="Strong_20_Emphasis"><text:span text:style-name="T7">O que ele revela?</text:span></text:span></text:p>
            </table:table-cell>
          </table:table-row>
        </table:table-header-rows>
        <table:table-row table:style-name="TableLine2254859091712">
          <table:table-cell table:style-name="Tabela3.A1" office:value-type="string">
            <text:p text:style-name="P10">1. Comercial</text:p>
          </table:table-cell>
          <table:table-cell table:style-name="Tabela3.A1" office:value-type="string">
            <text:p text:style-name="P11">Receita Bruta (-) Deduções e Impostos sobre Vendas</text:p>
          </table:table-cell>
          <table:table-cell table:style-name="Tabela3.A1" office:value-type="string">
            <text:p text:style-name="P9">Receita Líquida</text:p>
          </table:table-cell>
          <table:table-cell table:style-name="Tabela3.D1" office:value-type="string">
            <text:p text:style-name="P11">O faturamento real que entra na empresa.</text:p>
          </table:table-cell>
        </table:table-row>
        <table:table-row table:style-name="TableLine2254859091984">
          <table:table-cell table:style-name="Tabela3.A1" office:value-type="string">
            <text:p text:style-name="P10">2. Industrial</text:p>
          </table:table-cell>
          <table:table-cell table:style-name="Tabela3.A1" office:value-type="string">
            <text:p text:style-name="P11">Receita Líquida (-) Custos (CPV/CSP/CMV)</text:p>
          </table:table-cell>
          <table:table-cell table:style-name="Tabela3.A1" office:value-type="string">
            <text:p text:style-name="P9">Lucro Bruto</text:p>
          </table:table-cell>
          <table:table-cell table:style-name="Tabela3.D1" office:value-type="string">
            <text:p text:style-name="P11">A margem direta do produto ou serviço.</text:p>
          </table:table-cell>
        </table:table-row>
        <table:table-row table:style-name="TableLine2254859098784">
          <table:table-cell table:style-name="Tabela3.A1" office:value-type="string">
            <text:p text:style-name="P10">3. Operacional</text:p>
          </table:table-cell>
          <table:table-cell table:style-name="Tabela3.A1" office:value-type="string">
            <text:p text:style-name="P11">Lucro Bruto (-) Despesas (Adm/Vendas/Gerais)</text:p>
          </table:table-cell>
          <table:table-cell table:style-name="Tabela3.A1" office:value-type="string">
            <text:p text:style-name="P9">EBIT (LAJIR)</text:p>
          </table:table-cell>
          <table:table-cell table:style-name="Tabela3.D1" office:value-type="string">
            <text:p text:style-name="P11">O lucro puro da operação, antes de juros e impostos.</text:p>
          </table:table-cell>
        </table:table-row>
        <table:table-row table:style-name="TableLine2254859099328">
          <table:table-cell table:style-name="Tabela3.A1" office:value-type="string">
            <text:p text:style-name="P10">4. Caixa</text:p>
          </table:table-cell>
          <table:table-cell table:style-name="Tabela3.A1" office:value-type="string">
            <text:p text:style-name="P11">EBIT (+) Depreciação (+) Amortização</text:p>
          </table:table-cell>
          <table:table-cell table:style-name="Tabela3.A1" office:value-type="string">
            <text:p text:style-name="P9">EBITDA (LAJIDA)</text:p>
          </table:table-cell>
          <table:table-cell table:style-name="Tabela3.D1" office:value-type="string">
            <text:p text:style-name="P11">O potencial de geração de caixa operacional.</text:p>
          </table:table-cell>
        </table:table-row>
        <table:table-row table:style-name="TableLine2254859104496">
          <table:table-cell table:style-name="Tabela3.A1" office:value-type="string">
            <text:p text:style-name="P10">5. Estrutural</text:p>
          </table:table-cell>
          <table:table-cell table:style-name="Tabela3.A1" office:value-type="string">
            <text:p text:style-name="P11">EBIT (+/-) Resultado Financeiro (Juros)</text:p>
          </table:table-cell>
          <table:table-cell table:style-name="Tabela3.A1" office:value-type="string">
            <text:p text:style-name="P9">LAIR</text:p>
          </table:table-cell>
          <table:table-cell table:style-name="Tabela3.D1" office:value-type="string">
            <text:p text:style-name="P11">O lucro após o custo da dívida, mas antes dos impostos.</text:p>
          </table:table-cell>
        </table:table-row>
        <table:table-row table:style-name="TableLine2254859103680">
          <table:table-cell table:style-name="Tabela3.A1" office:value-type="string">
            <text:p text:style-name="P10">6. Final</text:p>
          </table:table-cell>
          <table:table-cell table:style-name="Tabela3.A1" office:value-type="string">
            <text:p text:style-name="P11">LAIR (-) Provisão de IR e CSLL</text:p>
          </table:table-cell>
          <table:table-cell table:style-name="Tabela3.A1" office:value-type="string">
            <text:p text:style-name="P9">Lucro Líquido</text:p>
          </table:table-cell>
          <table:table-cell table:style-name="Tabela3.D1" office:value-type="string">
            <text:p text:style-name="P11">O resultado final destinado aos acionistas.</text:p>
          </table:table-cell>
        </table:table-row>
        <table:table-row table:style-name="TableLine2254859108848">
          <table:table-cell table:style-name="Tabela3.A1" office:value-type="string">
            <text:p text:style-name="P10">7. Eficiência</text:p>
          </table:table-cell>
          <table:table-cell table:style-name="Tabela3.A1" office:value-type="string">
            <text:p text:style-name="P11">EBIT × (1 - Alíquota de Impostos)</text:p>
          </table:table-cell>
          <table:table-cell table:style-name="Tabela3.A1" office:value-type="string">
            <text:p text:style-name="P9">NOPLAT</text:p>
          </table:table-cell>
          <table:table-cell table:style-name="Tabela3.D1" office:value-type="string">
            <text:p text:style-name="P11">O lucro operacional líquido “como se” não houvesse dívida.</text:p>
          </table:table-cell>
        </table:table-row>
      </table:table>
      <text:p text:style-name="P29"><text:soft-page-break/>Fonte: Gropelli e Nikbakht (2002); Ross, Westerfield e Jaffe (2008); Assaf Neto (2006).</text:p>
      <text:p text:style-name="P22"/>
      <text:p text:style-name="P22">Essa estrutura ajuda a organizar o pensamento, partindo do lucro bruto operacional até chegar na visão de caixa e eficiência tributária. </text:p>
      <text:p text:style-name="P22"><draw:frame draw:style-name="fr2" draw:name="Figura2" text:anchor-type="char" svg:x="0.519cm" svg:y="0.055cm" svg:width="17cm" svg:height="12.084cm" draw:z-index="1"><draw:image xlink:href="Pictures/10000000000003EB000002C9EB3D75DFF3904E4E.png" xlink:type="simple" xlink:show="embed" xlink:actuate="onLoad" draw:mime-type="image/png"/></draw:frame></text:p>
      <text:p text:style-name="P27">Exemplo:</text:p>
      <text:p text:style-name="P27"/>
      <text:p text:style-name="P27">Fonte: &lt;<text:a xlink:type="simple" xlink:href="https://www.suno.com.br/artigos/demonstracao-resultado-exercicio/" text:style-name="Internet_20_link" text:visited-style-name="Visited_20_Internet_20_Link">https://www.suno.com.br/artigos/demonstracao-resultado-exercicio/</text:a>&gt;.</text:p>
      <text:p text:style-name="P27"/>
      <text:p text:style-name="P27"/>
      <text:p text:style-name="P27"/>
      <text:p text:style-name="P28">Fazer os cálculos para os anos abaixo e interpretar os resultados. </text:p>
      <text:p text:style-name="P28"/>
      <text:p text:style-name="P28"><draw:frame draw:style-name="fr1" draw:name="Figura3" text:anchor-type="char" svg:width="17cm" svg:height="14.633cm" draw:z-index="2"><draw:image xlink:href="Pictures/1000000000000316000002A852ECCF2BF914ABC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oogle Sans Text" svg:font-family="'Google Sans Text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13T11:04:13.940000000</meta:creation-date>
    <dc:date>2026-05-14T10:10:36.161000000</dc:date>
    <meta:editing-duration>PT1H23M34S</meta:editing-duration>
    <meta:editing-cycles>6</meta:editing-cycles>
    <meta:generator>LibreOffice/7.1.4.2$Windows_X86_64 LibreOffice_project/a529a4fab45b75fefc5b6226684193eb000654f6</meta:generator>
    <meta:print-date>2026-05-13T15:09:57.069000000</meta:print-date>
    <meta:document-statistic meta:table-count="3" meta:image-count="3" meta:object-count="0" meta:page-count="7" meta:paragraph-count="127" meta:word-count="1360" meta:character-count="8254" meta:non-whitespace-character-count="6982"/>
  </office:meta>
</office:document-meta>
</file>