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780BBE3614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5cm" fo:break-before="auto" fo:break-after="auto" table:align="left" fo:keep-with-next="auto" style:writing-mode="lr-tb"/>
    </style:style>
    <style:style style:name="Tabela1.A" style:family="table-column">
      <style:table-column-properties style:column-width="5.115cm"/>
    </style:style>
    <style:style style:name="Tabela1.B" style:family="table-column">
      <style:table-column-properties style:column-width="9.885cm"/>
    </style:style>
    <style:style style:name="Tabela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ela1.B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Tabela2" style:family="table">
      <style:table-properties style:width="15cm" fo:break-before="auto" fo:break-after="auto" table:align="left" fo:keep-with-next="auto" style:writing-mode="lr-tb"/>
    </style:style>
    <style:style style:name="Tabela2.A" style:family="table-column">
      <style:table-column-properties style:column-width="2.97cm"/>
    </style:style>
    <style:style style:name="Tabela2.B" style:family="table-column">
      <style:table-column-properties style:column-width="3.089cm"/>
    </style:style>
    <style:style style:name="Tabela2.C" style:family="table-column">
      <style:table-column-properties style:column-width="2.071cm"/>
    </style:style>
    <style:style style:name="Tabela2.D" style:family="table-column">
      <style:table-column-properties style:column-width="2.658cm"/>
    </style:style>
    <style:style style:name="Tabela2.E" style:family="table-column">
      <style:table-column-properties style:column-width="4.212cm"/>
    </style:style>
    <style:style style:name="Tabela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ela2.E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rsid="000f224d" officeooo:paragraph-rsid="000f224d" fo:background-color="#ffff00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bold" officeooo:rsid="0014b468" officeooo:paragraph-rsid="000f224d" fo:background-color="#ffff00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color="#1f1f1f" loext:opacity="100%" style:font-name="Times New Roman" fo:font-size="12pt" officeooo:paragraph-rsid="000f224d" style:font-size-asian="12pt" style:font-size-complex="12pt"/>
    </style:style>
    <style:style style:name="P4" style:family="paragraph" style:parent-style-name="Heading_20_3">
      <style:paragraph-properties fo:margin-left="0cm" fo:margin-right="0cm" fo:text-align="justify" style:justify-single-word="false" fo:text-indent="1.249cm" style:auto-text-indent="false"/>
      <style:text-properties style:font-name="Times New Roman" fo:font-size="12pt" officeooo:paragraph-rsid="000f224d" style:font-size-asian="12pt" style:font-size-complex="12pt"/>
    </style:style>
    <style:style style:name="P5" style:family="paragraph" style:parent-style-name="Text_20_body" style:list-style-name="L1">
      <style:text-properties style:font-name="Times New Roman" fo:font-size="12pt" officeooo:paragraph-rsid="000f224d" style:font-size-asian="12pt" style:font-size-complex="12pt"/>
    </style:style>
    <style:style style:name="P6" style:family="paragraph" style:parent-style-name="Heading_20_2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 fo:keep-with-next="auto"/>
      <style:text-properties style:font-name="Times New Roman" fo:font-size="12pt" fo:font-weight="bold" officeooo:paragraph-rsid="000f224d" style:font-size-asian="12pt" style:font-weight-asian="bold" style:font-size-complex="12pt" style:font-weight-complex="bold"/>
    </style:style>
    <style:style style:name="P7" style:family="paragraph" style:parent-style-name="Text_20_body" style:master-page-name="">
      <style:paragraph-properties fo:margin-left="0cm" fo:margin-right="0cm" fo:margin-top="0cm" fo:margin-bottom="0cm" style:contextual-spacing="false" fo:line-height="114%" fo:text-align="justify" style:justify-single-word="false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8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f1f1f" loext:opacity="100%" style:font-name="Times New Roman" fo:font-size="12pt" officeooo:paragraph-rsid="000f224d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/>
      <style:text-properties fo:color="#1f1f1f" loext:opacity="100%" style:font-name="Times New Roman" fo:font-size="12pt" fo:font-weight="bold" officeooo:paragraph-rsid="000f224d" style:font-size-asian="12pt" style:font-weight-asian="bold" style:font-size-complex="12pt" style:font-weight-complex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1f1f1f" loext:opacity="100%" style:font-name="Times New Roman" fo:font-size="12pt" officeooo:paragraph-rsid="000f224d" style:font-size-asian="12pt" style:font-size-complex="12pt" loext:padding="0cm" loext:border="none"/>
    </style:style>
    <style:style style:name="P13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 fo:keep-with-next="auto"/>
      <style:text-properties style:font-name="Times New Roman" fo:font-size="12pt" officeooo:paragraph-rsid="000f224d" style:font-size-asian="12pt" style:font-size-complex="12pt"/>
    </style:style>
    <style:style style:name="P14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style:font-name="Times New Roman" fo:font-size="12pt" officeooo:paragraph-rsid="000f224d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fo:color="#1f1f1f" loext:opacity="100%" style:font-name="Times New Roman" fo:font-size="12pt" officeooo:paragraph-rsid="000f224d" style:font-size-asian="12pt" style:font-size-complex="12pt"/>
    </style:style>
    <style:style style:name="P16" style:family="paragraph" style:parent-style-name="Text_20_body" style:list-style-name="L3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17" style:family="paragraph" style:parent-style-name="Text_20_body" style:list-style-name="L3">
      <style:paragraph-properties fo:margin-top="0cm" fo:margin-bottom="0cm" style:contextual-spacing="false" fo:line-height="114%" fo:orphans="2" fo:widows="2" fo:padding="0cm" fo:border="none"/>
      <style:text-properties fo:color="#1f1f1f" loext:opacity="100%" style:font-name="Times New Roman" fo:font-size="12pt" officeooo:paragraph-rsid="000f224d" style:font-size-asian="12pt" style:font-size-complex="12pt"/>
    </style:style>
    <style:style style:name="P18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style:font-name="Times New Roman" fo:font-size="12pt" fo:font-weight="bold" officeooo:paragraph-rsid="000f224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officeooo:paragraph-rsid="000f224d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Times New Roman" fo:font-size="12pt" fo:font-weight="bold" officeooo:paragraph-rsid="000f224d" style:font-size-asian="12pt" style:font-size-complex="12pt" loext:padding="0cm" loext:border="none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Times New Roman" fo:font-size="12pt" officeooo:paragraph-rsid="000f224d" style:font-size-asian="12pt" style:font-size-complex="12pt" loext:padding="0cm" loext:border="none"/>
    </style:style>
    <style:style style:name="P22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23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f1f1f" loext:opacity="100%" style:font-name="Times New Roman" fo:font-size="12pt" officeooo:paragraph-rsid="000f224d" style:font-size-asian="12pt" style:font-size-complex="12pt"/>
    </style:style>
    <style:style style:name="P25" style:family="paragraph" style:parent-style-name="Quotations" style:master-page-name="">
      <style:paragraph-properties fo:margin-left="2.058cm" fo:margin-right="2.058cm" fo:margin-top="0cm" fo:margin-bottom="0cm" style:contextual-spacing="false" fo:line-height="114%" fo:text-align="justify" style:justify-single-word="false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2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" fo:font-size="12pt" officeooo:paragraph-rsid="000f224d" style:font-size-asian="12pt" style:font-size-complex="12pt"/>
    </style:style>
    <style:style style:name="P27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28" style:family="paragraph" style:parent-style-name="Heading_20_2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style:font-name="Times New Roman" fo:font-size="12pt" fo:font-weight="bold" officeooo:paragraph-rsid="000f224d" style:font-size-asian="12pt" style:font-weight-asian="bold" style:font-size-complex="12pt" style:font-weight-complex="bold"/>
    </style:style>
    <style:style style:name="P29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f224d"/>
    </style:style>
    <style:style style:name="P30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f224d"/>
    </style:style>
    <style:style style:name="P31" style:family="paragraph" style:parent-style-name="Heading_20_3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0f224d"/>
    </style:style>
    <style:style style:name="P32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f224d"/>
    </style:style>
    <style:style style:name="P33" style:family="paragraph" style:parent-style-name="Text_20_body" style:list-style-name="L6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0f224d"/>
    </style:style>
    <style:style style:name="P34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f224d"/>
    </style:style>
    <style:style style:name="P35" style:family="paragraph" style:parent-style-name="Heading_20_2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 fo:keep-with-next="auto"/>
      <style:text-properties style:font-name="Times New Roman" fo:font-size="12pt" officeooo:paragraph-rsid="000f224d" style:font-size-asian="12pt" style:font-size-complex="12pt"/>
    </style:style>
    <style:style style:name="P36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Times New Roman" fo:font-size="12pt" officeooo:paragraph-rsid="000f224d" style:font-size-asian="12pt" style:font-size-complex="12pt" loext:padding="0cm" loext:border="none"/>
    </style:style>
    <style:style style:name="P38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f224d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  <style:text-properties officeooo:paragraph-rsid="000f224d"/>
    </style:style>
    <style:style style:name="P40" style:family="paragraph" style:parent-style-name="Preformatted_20_Text">
      <style:paragraph-properties fo:margin-top="0cm" fo:margin-bottom="0cm" style:contextual-spacing="false" fo:line-height="114%" fo:orphans="2" fo:widows="2" fo:break-before="auto" fo:break-after="auto" fo:padding="0cm" fo:border="none" fo:keep-with-next="auto"/>
      <style:text-properties officeooo:paragraph-rsid="000f224d"/>
    </style:style>
    <style:style style:name="P41" style:family="paragraph" style:parent-style-name="Preformatted_20_Text">
      <style:paragraph-properties fo:margin-top="0cm" fo:margin-bottom="0cm" style:contextual-spacing="false" fo:line-height="114%" fo:orphans="2" fo:widows="2" fo:break-before="auto" fo:break-after="auto" fo:padding="0cm" fo:border="none" fo:keep-with-next="auto"/>
      <style:text-properties style:font-name="Times New Roman" fo:font-size="12pt" officeooo:paragraph-rsid="000f224d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style:font-name="Times New Roman" fo:font-size="12pt" fo:font-weight="bold" officeooo:paragraph-rsid="000f224d" style:font-size-asian="12pt" style:font-weight-asian="bold" style:font-size-complex="12pt" style:font-weight-complex="bold"/>
    </style:style>
    <style:style style:name="P43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44" style:family="paragraph" style:parent-style-name="Quotations" style:master-page-name="">
      <style:paragraph-properties fo:margin-left="2.058cm" fo:margin-right="2.058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style:font-name="Times New Roman" fo:font-size="12pt" officeooo:paragraph-rsid="000f224d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style:font-name="Times New Roman" fo:font-size="12pt" officeooo:paragraph-rsid="000f224d" style:font-size-asian="12pt" style:font-size-complex="12pt"/>
    </style:style>
    <style:style style:name="P47" style:family="paragraph" style:parent-style-name="Heading_20_3">
      <style:paragraph-properties fo:margin-top="0cm" fo:margin-bottom="0.247cm" style:contextual-spacing="false" fo:line-height="114%"/>
      <style:text-properties style:font-name="Times New Roman" fo:font-size="12pt" officeooo:paragraph-rsid="000f224d" style:font-size-asian="12pt" style:font-size-complex="12pt"/>
    </style:style>
    <style:style style:name="P48" style:family="paragraph" style:parent-style-name="Text_20_body">
      <style:paragraph-properties fo:margin-top="0cm" fo:margin-bottom="0.247cm" style:contextual-spacing="false" fo:line-height="114%"/>
      <style:text-properties style:font-name="Times New Roman" fo:font-size="12pt" officeooo:paragraph-rsid="000f224d" style:font-size-asian="12pt" style:font-size-complex="12pt"/>
    </style:style>
    <style:style style:name="P49" style:family="paragraph" style:parent-style-name="Text_20_body">
      <style:paragraph-properties fo:margin-top="0cm" fo:margin-bottom="0.247cm" style:contextual-spacing="false" fo:line-height="114%"/>
      <style:text-properties officeooo:paragraph-rsid="000f224d"/>
    </style:style>
    <style:style style:name="P50" style:family="paragraph" style:parent-style-name="Horizontal_20_Line">
      <style:text-properties style:font-name="Times New Roman" fo:font-size="12pt" officeooo:paragraph-rsid="000f224d" style:font-size-asian="12pt" style:font-size-complex="12pt"/>
    </style:style>
    <style:style style:name="P51" style:family="paragraph" style:parent-style-name="Heading_20_3">
      <style:paragraph-properties fo:margin-top="0cm" fo:margin-bottom="0.247cm" style:contextual-spacing="false" fo:line-height="114%"/>
      <style:text-properties style:font-name="Times New Roman" fo:font-size="12pt" fo:font-weight="bold" officeooo:paragraph-rsid="000f224d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margin-top="0cm" fo:margin-bottom="0cm" style:contextual-spacing="false" fo:line-height="114%"/>
      <style:text-properties officeooo:paragraph-rsid="000f224d"/>
    </style:style>
    <style:style style:name="P53" style:family="paragraph" style:parent-style-name="Text_20_body" style:list-style-name="L9">
      <style:paragraph-properties fo:margin-top="0cm" fo:margin-bottom="0.247cm" style:contextual-spacing="false" fo:line-height="114%" fo:padding="0cm" fo:border="none"/>
      <style:text-properties style:font-name="Times New Roman" fo:font-size="12pt" officeooo:paragraph-rsid="000f224d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officeooo:paragraph-rsid="000f224d" style:font-size-asian="12pt" style:font-size-complex="12pt"/>
    </style:style>
    <style:style style:name="P55" style:family="paragraph" style:parent-style-name="Text_20_body">
      <style:text-properties style:font-name="Times New Roman" fo:font-size="12pt" officeooo:paragraph-rsid="000f224d" style:font-size-asian="12pt" style:font-size-complex="12pt"/>
    </style:style>
    <style:style style:name="P56" style:family="paragraph" style:parent-style-name="Heading_20_3">
      <style:text-properties style:font-name="Times New Roman" fo:font-size="12pt" officeooo:paragraph-rsid="000f224d" style:font-size-asian="12pt" style:font-size-complex="12pt"/>
    </style:style>
    <style:style style:name="P57" style:family="paragraph" style:parent-style-name="Preformatted_20_Text">
      <style:text-properties officeooo:paragraph-rsid="000f224d"/>
    </style:style>
    <style:style style:name="P58" style:family="paragraph" style:parent-style-name="Preformatted_20_Text">
      <style:text-properties style:font-name="Times New Roman" fo:font-size="12pt" officeooo:paragraph-rsid="000f224d" style:font-size-asian="12pt" style:font-size-complex="12pt"/>
    </style:style>
    <style:style style:name="P59" style:family="paragraph" style:parent-style-name="Preformatted_20_Text">
      <style:paragraph-properties fo:margin-top="0cm" fo:margin-bottom="0.499cm" style:contextual-spacing="false"/>
      <style:text-properties officeooo:paragraph-rsid="000f224d"/>
    </style:style>
    <style:style style:name="P60" style:family="paragraph" style:parent-style-name="Text_20_body" style:list-style-name="L10">
      <style:text-properties officeooo:paragraph-rsid="000f224d"/>
    </style:style>
    <style:style style:name="P61" style:family="paragraph" style:parent-style-name="Text_20_body">
      <style:text-properties style:font-name="Times New Roman" fo:font-size="12pt" fo:font-weight="bold" officeooo:paragraph-rsid="000f224d" style:font-size-asian="12pt" style:font-size-complex="12pt"/>
    </style:style>
    <style:style style:name="P62" style:family="paragraph" style:parent-style-name="Text_20_body" style:list-style-name="L1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63" style:family="paragraph" style:parent-style-name="Horizontal_20_Line">
      <style:text-properties fo:color="#1f1f1f" loext:opacity="100%" style:font-name="Times New Roman" fo:font-size="12pt" fo:font-weight="bold" officeooo:paragraph-rsid="000f224d" style:font-size-asian="12pt" style:font-size-complex="12pt" loext:padding="0cm" loext:border="none"/>
    </style:style>
    <style:style style:name="P6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fo:font-weight="bold" officeooo:paragraph-rsid="000f224d" style:font-size-asian="12pt" style:font-size-complex="12pt" loext:padding="0cm" loext:border="none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officeooo:paragraph-rsid="000f224d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fo:font-size="12pt" officeooo:paragraph-rsid="000f224d" style:font-size-asian="12pt" style:font-size-complex="12pt" loext:padding="0cm" loext:border="none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fo:font-size="12pt" fo:font-weight="bold" officeooo:paragraph-rsid="000f224d" style:font-size-asian="12pt" style:font-size-complex="12pt" loext:padding="0cm" loext:border="none"/>
    </style:style>
    <style:style style:name="P68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f224d"/>
    </style:style>
    <style:style style:name="P69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7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f224d"/>
    </style:style>
    <style:style style:name="P71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fo:color="#1f1f1f" loext:opacity="100%" style:font-name="Times New Roman" fo:font-size="12pt" fo:font-weight="bold" officeooo:paragraph-rsid="000f224d" style:font-size-asian="12pt" style:font-weight-asian="bold" style:font-size-complex="12pt" style:font-weight-complex="bold"/>
    </style:style>
    <style:style style:name="P72" style:family="paragraph" style:parent-style-name="Quotations" style:master-page-name="">
      <style:paragraph-properties fo:margin-left="2.058cm" fo:margin-right="2.058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f224d"/>
    </style:style>
    <style:style style:name="P73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fo:color="#1f1f1f" loext:opacity="100%" style:font-name="Times New Roman" fo:font-size="12pt" officeooo:paragraph-rsid="000f224d" style:font-size-asian="12pt" style:font-size-complex="12pt"/>
    </style:style>
    <style:style style:name="P74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f224d"/>
    </style:style>
    <style:style style:name="P75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76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Times New Roman" fo:font-size="12pt" officeooo:paragraph-rsid="000f224d" style:font-size-asian="12pt" style:font-size-complex="12pt"/>
    </style:style>
    <style:style style:name="P7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style:font-name="Times New Roman" fo:font-size="12pt" officeooo:paragraph-rsid="000f224d" style:font-size-asian="12pt" style:font-size-complex="12pt"/>
    </style:style>
    <style:style style:name="P78" style:family="paragraph" style:parent-style-name="Standard">
      <style:text-properties style:font-name="Times New Roman" fo:font-size="12pt" fo:font-weight="bold" officeooo:paragraph-rsid="000f224d" style:font-size-asian="12pt" style:font-weight-asian="bold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Times New Roman" fo:font-size="12pt" officeooo:paragraph-rsid="000f224d" style:font-size-asian="12pt" style:font-size-complex="12pt"/>
    </style:style>
    <style:style style:name="T1" style:family="text">
      <style:text-properties officeooo:rsid="0014b468"/>
    </style:style>
    <style:style style:name="T2" style:family="text">
      <style:text-properties officeooo:rsid="00195270"/>
    </style:style>
    <style:style style:name="T3" style:family="text">
      <style:text-properties fo:font-weight="bold" loext:padding="0cm" loext:border="none"/>
    </style:style>
    <style:style style:name="T4" style:family="text">
      <style:text-properties fo:font-style="italic" fo:font-weight="bold" style:font-style-asian="italic" style:font-style-complex="italic" loext:padding="0cm" loext:border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1f1f1f" loext:opacity="100%" officeooo:rsid="00195270"/>
    </style:style>
    <style:style style:name="T7" style:family="text">
      <style:text-properties fo:color="#1f1f1f" loext:opacity="100%"/>
    </style:style>
    <style:style style:name="T8" style:family="text">
      <style:text-properties fo:font-weight="bold"/>
    </style:style>
    <style:style style:name="T9" style:family="text">
      <style:text-properties fo:color="#1f1f1f" loext:opacity="100%" officeooo:rsid="0014b468"/>
    </style:style>
    <style:style style:name="T10" style:family="text">
      <style:text-properties fo:color="#444746" loext:opacity="100%" officeooo:rsid="00195270"/>
    </style:style>
    <style:style style:name="T11" style:family="text">
      <style:text-properties fo:color="#444746" loext:opacity="100%"/>
    </style:style>
    <style:style style:name="T12" style:family="text">
      <style:text-properties fo:color="#1f1f1f" loext:opacity="100%" fo:font-weight="bold" officeooo:rsid="001588db" style:font-weight-asian="bold" style:font-weight-complex="bold"/>
    </style:style>
    <style:style style:name="T13" style:family="text">
      <style:text-properties fo:color="#1f1f1f" loext:opacity="100%" fo:font-weight="bold" style:font-weight-asian="bold" style:font-weight-complex="bold"/>
    </style:style>
    <style:style style:name="T14" style:family="text">
      <style:text-properties fo:font-style="italic" loext:padding="0cm" loext:border="none"/>
    </style:style>
    <style:style style:name="T15" style:family="text">
      <style:text-properties fo:font-style="italic" style:font-style-asian="italic" style:font-style-complex="italic" loext:padding="0cm" loext:border="none"/>
    </style:style>
    <style:style style:name="T16" style:family="text">
      <style:text-properties fo:color="#1f1f1f" loext:opacity="100%" style:font-name="Times New Roman" fo:font-size="12pt" style:font-size-asian="12pt" style:font-size-complex="12pt" loext:padding="0cm" loext:border="none"/>
    </style:style>
    <style:style style:name="T17" style:family="text">
      <style:text-properties fo:color="#1f1f1f" loext:opacity="100%" fo:font-weight="bold" loext:padding="0cm" loext:border="none"/>
    </style:style>
    <style:style style:name="T18" style:family="text">
      <style:text-properties fo:color="#1f1f1f" loext:opacity="100%" style:font-name="Times New Roman" fo:font-size="12pt" fo:font-weight="bold" officeooo:rsid="00195270" style:font-size-asian="12pt" style:font-weight-asian="bold" style:font-size-complex="12pt" style:font-weight-complex="bold"/>
    </style:style>
    <style:style style:name="T19" style:family="text">
      <style:text-properties fo:color="#1f1f1f" loext:opacity="100%" style:font-name="Times New Roman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444746" loext:opacity="100%" style:font-name="Times New Roman" fo:font-size="12pt" fo:font-weight="bold" style:font-size-asian="12pt" style:font-weight-asian="bold" style:font-size-complex="12pt" style:font-weight-complex="bold" loext:padding="0cm" loext:border="none"/>
    </style:style>
    <style:style style:name="T21" style:family="text">
      <style:text-properties fo:color="#1f1f1f" loext:opacity="100%" style:font-name="Times New Roman" fo:font-size="12pt" style:font-size-asian="12pt" style:font-size-complex="12pt"/>
    </style:style>
    <style:style style:name="T22" style:family="text">
      <style:text-properties fo:color="#444746" loext:opacity="100%" style:font-name="Times New Roman" fo:font-size="12pt" style:font-size-asian="12pt" style:font-size-complex="12pt" loext:padding="0cm" loext:border="none"/>
    </style:style>
    <style:style style:name="T23" style:family="text">
      <style:text-properties fo:font-variant="normal" fo:text-transform="none" fo:color="#8430ce" loext:opacity="100%" style:font-name="Times New Roman" fo:font-size="12pt" fo:font-style="normal" fo:font-weight="normal" style:font-size-asian="12pt" style:font-size-complex="12pt" loext:padding="0cm" loext:border="none"/>
    </style:style>
    <style:style style:name="T24" style:family="text">
      <style:text-properties fo:font-variant="normal" fo:text-transform="none" fo:color="#444746" loext:opacity="100%" style:font-name="Times New Roman" fo:font-size="12pt" fo:font-style="normal" fo:font-weight="normal" style:font-size-asian="12pt" style:font-size-complex="12pt" loext:padding="0cm" loext:border="none"/>
    </style:style>
    <style:style style:name="T25" style:family="text">
      <style:text-properties fo:font-variant="normal" fo:text-transform="none" fo:color="#444746" loext:opacity="100%" style:font-name="Times New Roman" fo:font-size="12pt" style:font-size-asian="12pt" style:font-size-complex="12pt" loext:padding="0cm" loext:border="none"/>
    </style:style>
    <style:style style:name="T26" style:family="text">
      <style:text-properties fo:font-variant="normal" fo:text-transform="none" fo:color="#1967d2" loext:opacity="100%" style:font-name="Times New Roman" fo:font-size="12pt" fo:font-style="normal" fo:font-weight="normal" style:font-size-asian="12pt" style:font-size-complex="12pt" loext:padding="0cm" loext:border="none"/>
    </style:style>
    <style:style style:name="T27" style:family="text">
      <style:text-properties fo:font-variant="normal" fo:text-transform="none" fo:color="#1f1f1f" loext:opacity="100%" style:font-name="Times New Roman" fo:font-size="12pt" fo:font-style="normal" fo:font-weight="normal" style:font-size-asian="12pt" style:font-size-complex="12pt" loext:padding="0cm" loext:border="none"/>
    </style:style>
    <style:style style:name="T28" style:family="text">
      <style:text-properties fo:font-variant="normal" fo:text-transform="none" fo:color="#188038" loext:opacity="100%" style:font-name="Times New Roman" fo:font-size="12pt" fo:font-style="normal" fo:font-weight="normal" style:font-size-asian="12pt" style:font-size-complex="12pt" loext:padding="0cm" loext:border="none"/>
    </style:style>
    <style:style style:name="T29" style:family="text">
      <style:text-properties fo:font-variant="normal" fo:text-transform="none" fo:color="#5f6368" loext:opacity="100%" style:font-name="Times New Roman" fo:font-size="12pt" fo:font-style="normal" fo:font-weight="normal" style:font-size-asian="12pt" style:font-size-complex="12pt" loext:padding="0cm" loext:border="none"/>
    </style:style>
    <style:style style:name="T30" style:family="text">
      <style:text-properties style:font-name="Times New Roman" fo:font-size="12pt" fo:font-weight="bold" style:font-size-asian="12pt" style:font-size-complex="12pt"/>
    </style:style>
    <style:style style:name="T31" style:family="text">
      <style:text-properties style:font-name="Times New Roman" fo:font-size="12pt" style:font-size-asian="12pt" style:font-size-complex="12pt"/>
    </style:style>
    <style:style style:name="T32" style:family="text">
      <style:text-properties officeooo:rsid="000f224d"/>
    </style:style>
    <style:style style:name="T33" style:family="text">
      <style:text-properties fo:font-style="italic"/>
    </style:style>
    <style:style style:name="T34" style:family="text">
      <style:text-properties fo:font-variant="normal" fo:text-transform="none" fo:color="#b55908" loext:opacity="100%" style:font-name="Times New Roman" fo:font-size="12pt" fo:font-style="normal" fo:font-weight="normal" style:font-size-asian="12pt" style:font-size-complex="12pt" loext:padding="0cm" loext:border="none"/>
    </style:style>
    <style:style style:name="T35" style:family="text">
      <style:text-properties officeooo:rsid="001c8f61"/>
    </style:style>
    <style:style style:name="T36" style:family="text">
      <style:text-properties fo:color="#1f1f1f" loext:opacity="100%" style:font-name="Times New Roman" fo:font-size="12pt" fo:font-weight="bold" style:font-size-asian="12pt" style:font-size-complex="12pt" loext:padding="0cm" loext:border="none"/>
    </style:style>
    <style:style style:name="T37" style:family="text">
      <style:text-properties fo:color="#1f1f1f" loext:opacity="100%" officeooo:rsid="000f224d"/>
    </style:style>
    <style:style style:name="T38" style:family="text">
      <style:text-properties fo:font-variant="normal" fo:text-transform="none" fo:color="#444746" loext:opacity="100%" style:font-name="Times New Roman" fo:font-size="12pt" fo:font-style="normal" fo:font-weight="normal" officeooo:rsid="001c8f61" style:font-size-asian="12pt" style:font-size-complex="12pt" loext:padding="0cm" loext:border="none"/>
    </style:style>
    <style:style style:name="T3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49cm" fo:border="0.06pt solid #e1e3e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para a próxima aula</text:p>
      <text:p text:style-name="P2"/>
      <text:p text:style-name="P2">8. Aplicação em Sistema de Informação</text:p>
      <text:p text:style-name="P3"><text:span text:style-name="T1">O</text:span> entendimento de Capital de Giro e Fluxo de Caixa não é apenas uma questão contábil <text:span text:style-name="T2">financeira</text:span>, mas a base para o desenvolvimento de <text:span text:style-name="T3">ERPs (</text:span><text:span text:style-name="T4">Enterprise Resource Planning)</text:span><text:span text:style-name="T5">,</text:span> dashboards de <text:span text:style-name="T4">Business Intelligence</text:span><text:span text:style-name="T3"> (BI)</text:span> e algoritmos de análise preditiva.</text:p>
      <text:h text:style-name="P4" text:outline-level="3"><text:span text:style-name="T6">O</text:span><text:span text:style-name="T7"> ERP é o "Coração" da NCG e do Fluxo de Caixa. </text:span><text:span text:style-name="T6">Ele </text:span>não é apenas um <text:span text:style-name="T5">software </text:span>de cadastro; ele é o motor que executa tudo o que criamos no SQL:</text:h>
      <text:list text:style-name="L1">
        <text:list-item>
          <text:p text:style-name="P5"><text:span text:style-name="T8">Módulo de Suprimentos:</text:span> Alimenta o <text:span text:style-name="T8">Estoque</text:span> (aumenta a NCG).</text:p>
        </text:list-item>
        <text:list-item>
          <text:p text:style-name="P5"><text:span text:style-name="T8">Módulo de Vendas:</text:span> Alimenta o <text:span text:style-name="T8">Contas a Receber</text:span> (aumenta a NCG).</text:p>
        </text:list-item>
        <text:list-item>
          <text:p text:style-name="P5"><text:span text:style-name="T8">Módulo Financeiro:</text:span> Alimenta o <text:span text:style-name="T8">Fluxo de Caixa</text:span> e faz a <text:span text:style-name="T8">Conciliação Bancária</text:span>.</text:p>
        </text:list-item>
        <text:list-item>
          <text:p text:style-name="P5"><text:span text:style-name="T8">Módulo Contábil:</text:span> Consolida o <text:span text:style-name="T8">Modelo Fleuriet</text:span> para gerar o balanço.</text:p>
        </text:list-item>
      </text:list>
      <text:p text:style-name="P3"/>
      <text:section text:style-name="Sect1" text:name="model-response-message-contentr_fda86e0403cee889">
        <text:h text:style-name="P6" text:outline-level="2"><text:span text:style-name="T9">8.1 </text:span><text:span text:style-name="T7">Engenharia de Dados Financeiros – Capital de Giro e Fluxo de Caixa</text:span></text:h>
        <text:p text:style-name="P7"><text:s text:c="4"/>Em SI, o <text:span text:style-name="T3">Capital de Giro (CG)</text:span> pode ser visualizado como o "<text:span text:style-name="T5">buffer</text:span>" ou a memória volátil de uma empresa. Ele representa os recursos necessários para que a operação não trave entre o momento da compra e o momento do recebimento.</text:p>
        <text:list text:style-name="L2">
          <text:list-item>
            <text:p text:style-name="P8"><text:span text:style-name="T3">Ativo Circulante :</text:span> Contas a receber, estoques e disponibilidades.</text:p>
          </text:list-item>
          <text:list-item>
            <text:p text:style-name="P8"><text:span text:style-name="T3">Passivo Circulante:</text:span> Fornecedores, salários e impostos a pagar.</text:p>
          </text:list-item>
        </text:list>
        <text:p text:style-name="P9"><text:span text:style-name="T3"/></text:p>
        <text:p text:style-name="P10"><text:span text:style-name="T3">A lógica do SI:</text:span> O sistema precisa calcular em tempo real a <text:span text:style-name="T3">Necessidade de Capital de Giro (NCG)</text:span>.</text:p>
        <text:p text:style-name="P11">NCG = (Contas a <text:s/>Receber + Estoques) - (Fornecedores + Obrigações Sociais)</text:p>
        <text:p text:style-name="P12"><draw:frame draw:style-name="fr1" draw:name="Figura1" text:anchor-type="as-char" svg:width="9.73cm" svg:height="9.118cm" draw:z-index="0"><draw:image xlink:href="Pictures/100000000000080000000780BBE3614E.jpg" xlink:type="simple" xlink:show="embed" xlink:actuate="onLoad" draw:mime-type="image/jpeg"/><svg:title>Working Capital Cycle Diagram, gerado pela IA</svg:title></draw:frame></text:p>
        <text:p text:style-name="P12"><text:span text:style-name="T10">Fonte: </text:span><text:span text:style-name="T11">Getty Images</text:span></text:p>
        <text:h text:style-name="P13" text:outline-level="3"><text:span text:style-name="T12"/></text:h>
        <text:h text:style-name="P14" text:outline-level="3"><text:soft-page-break/><text:span text:style-name="T12">8.</text:span><text:span text:style-name="T13">2. Fluxo de Caixa: O Log de Eventos Financeiros</text:span></text:h>
        <text:p text:style-name="P7"><text:tab/>Se o Capital de Giro é uma foto do momento, o <text:span text:style-name="T3">Fluxo de Caixa</text:span> é o <text:span text:style-name="T14">s</text:span><text:span text:style-name="T15">treaming</text:span><text:span text:style-name="T5"> </text:span>de dados. Para um desenvolvedor ou analista de sistemas, o Fluxo de Caixa é a base de dados que registra cada entrada e saída de numerário.</text:p>
        <text:p text:style-name="P15"/>
        <text:list text:style-name="L3">
          <text:list-item>
            <text:p text:style-name="P16"><text:span text:style-name="T3">Fluxo de Caixa Operacional:</text:span> A saúde do "core" do negócio.</text:p>
          </text:list-item>
          <text:list-item>
            <text:p text:style-name="P16"><text:span text:style-name="T3">Fluxo de Caixa de Investimento:</text:span> Aquisição de ativos.</text:p>
          </text:list-item>
          <text:list-item>
            <text:p text:style-name="P16"><text:span text:style-name="T3">Fluxo de Caixa de Financiamento:</text:span> Empréstimos ou aporte de capital.</text:p>
            <text:p text:style-name="P17"/>
          </text:list-item>
          <text:list-item>
            <text:p text:style-name="P16"><text:span text:style-name="T3">Integração em SI:</text:span> Um software financeiro robusto deve permitir o <text:span text:style-name="T4">Cash Flow Forecasting</text:span><text:span text:style-name="T5"> </text:span>(Previsão de Fluxo de Caixa) utilizando modelos matemáticos para antecipar períodos de escassez de liquidez.</text:p>
          </text:list-item>
        </text:list>
        <text:h text:style-name="P13" text:outline-level="3"><text:span text:style-name="T7"/></text:h>
        <text:h text:style-name="P18" text:outline-level="3"><text:span text:style-name="T6">8.</text:span><text:span text:style-name="T7">3. A Conexão: Modelo Fleuriet e Algoritmos de Decisão</text:span></text:h>
        <text:p text:style-name="P7"><text:tab/>O Modelo Fleuriet é especialmente interessante para SI porque ele permite classificar a situação da empresa em "ratings" (como Excelente, Sólida, Arriscada, etc.), algo facilmente traduzível para lógica de programação (<text:span text:style-name="T14">If Else</text:span> ou <text:span text:style-name="T14">Machine Learning</text:span>).</text:p>
        <table:table table:name="Tabela1" table:style-name="Tabela1">
          <table:table-column table:style-name="Tabela1.A"/>
          <table:table-column table:style-name="Tabela1.B"/>
          <table:table-header-rows>
            <table:table-row>
              <table:table-cell table:style-name="Tabela1.A1" office:value-type="string">
                <text:p text:style-name="P19"><text:span text:style-name="Strong_20_Emphasis"><text:span text:style-name="T16">Componente</text:span></text:span></text:p>
              </table:table-cell>
              <table:table-cell table:style-name="Tabela1.B1" office:value-type="string">
                <text:p text:style-name="P19"><text:span text:style-name="Strong_20_Emphasis"><text:span text:style-name="T16">Visão de SI</text:span></text:span></text:p>
              </table:table-cell>
            </table:table-row>
          </table:table-header-rows>
          <table:table-row>
            <table:table-cell table:style-name="Tabela1.A1" office:value-type="string">
              <text:p text:style-name="P20">Capital de Giro (CDG)</text:p>
            </table:table-cell>
            <table:table-cell table:style-name="Tabela1.B1" office:value-type="string">
              <text:p text:style-name="P21">Recursos de longo prazo financiando o curto prazo.</text:p>
            </table:table-cell>
          </table:table-row>
          <table:table-row>
            <table:table-cell table:style-name="Tabela1.A1" office:value-type="string">
              <text:p text:style-name="P20">Necessidade de CG (NCG)</text:p>
            </table:table-cell>
            <table:table-cell table:style-name="Tabela1.B1" office:value-type="string">
              <text:p text:style-name="P21">O volume de dados operacionais que "consome" caixa.</text:p>
            </table:table-cell>
          </table:table-row>
          <table:table-row>
            <table:table-cell table:style-name="Tabela1.A1" office:value-type="string">
              <text:p text:style-name="P20">Saldo de Tesouraria (ST)</text:p>
            </table:table-cell>
            <table:table-cell table:style-name="Tabela1.B1" office:value-type="string">
              <text:p text:style-name="P21">O valor final da variável de liquidez (ST = CDG - NCG).</text:p>
            </table:table-cell>
          </table:table-row>
        </table:table>
        <text:h text:style-name="P13" text:outline-level="3"><text:span text:style-name="T7"/></text:h>
        <text:h text:style-name="P18" text:outline-level="3"><text:span text:style-name="T6">8.</text:span><text:span text:style-name="T7">4. Aplicação Prática </text:span></text:h>
        <text:p text:style-name="P22">Para conectar esses mundos, o desenvolvimento de um sistema deve considerar:</text:p>
        <text:list text:style-name="L4">
          <text:list-item>
            <text:p text:style-name="P23"><text:span text:style-name="T3">Dashboard de Liquidez:</text:span> Transformar as fórmulas de NCG e ST em visualizações gráficas para o gestor.</text:p>
          </text:list-item>
          <text:list-item>
            <text:p text:style-name="P23"><text:span text:style-name="T3">Alertas de Gatilho:</text:span> Programar notificações quando o Ciclo Financeiro (tempo entre pagar fornecedor e receber do cliente) aumenta, o que exige mais Capital de Giro.</text:p>
          </text:list-item>
          <text:list-item>
            <text:p text:style-name="P23"><text:span text:style-name="T3">Automação de Conciliação:</text:span> Integrar o extrato bancário (Fluxo de Caixa).</text:p>
            <text:p text:style-name="P24"/>
          </text:list-item>
        </text:list>
        <text:p text:style-name="P25"><text:span text:style-name="T3">Nota para SI:</text:span> Entender a regra de negócio financeira é o que diferencia um "codificador" de um "arquiteto de soluções". Um sistema mal projetado pode ocultar uma NCG negativa, levando uma empresa saudável ao colapso por falta de caixa.</text:p>
      </text:section>
      <text:h text:style-name="P4" text:outline-level="3"><text:soft-page-break/></text:h>
      <text:p text:style-name="P26"><text:span text:style-name="T7">Para estruturar um banco de dados que suporte a análise de </text:span><text:span text:style-name="T17">Necessidade de Capital de Giro (NCG)</text:span><text:span text:style-name="T7"> e </text:span><text:span text:style-name="T17">Fluxo de Caixa</text:span><text:span text:style-name="T7">, precisamos de uma arquitetura que separe o que é </text:span><text:span text:style-name="T17">competência</text:span><text:span text:style-name="T7"> (o fato gerador, como uma venda) do que é </text:span><text:span text:style-name="T17">caixa</text:span><text:span text:style-name="T7"> (o movimento real do dinheiro).</text:span></text:p>
      <text:section text:style-name="Sect1" text:name="model-response-message-contentr_dd8beeb8cf2a047c">
        <text:p text:style-name="P27"><text:span text:style-name="T2"><text:s text:c="4"/><text:tab/>Pr</text:span>oposta de modelagem relacional simplificada para um ERP ou módulo financeiro:</text:p>
        <text:h text:style-name="P28" text:outline-level="2"><text:span text:style-name="T6">8.5 </text:span><text:span text:style-name="T7">Estrutura de Tabelas (Esquema Lógico)</text:span></text:h>
        <text:h text:style-name="P29" text:outline-level="3"><text:span text:style-name="T18">8.5.</text:span><text:span text:style-name="T19">1. Tabela </text:span><text:span text:style-name="Source_20_Text"><text:span text:style-name="T20">Entidades</text:span></text:span><text:span text:style-name="T19"> (Fornecedores e Clientes): </text:span><text:span text:style-name="T21">Armazena os stakeholders. É essencial para segmentar a NCG por setor ou tipo de parceiro.</text:span></text:h>
        <text:list text:style-name="L5">
          <text:list-item>
            <text:p text:style-name="P30"><text:span text:style-name="Source_20_Text"><text:span text:style-name="T22">entidade_id</text:span></text:span><text:span text:style-name="T21"> (PK)</text:span></text:p>
          </text:list-item>
          <text:list-item>
            <text:p text:style-name="P30"><text:span text:style-name="Source_20_Text"><text:span text:style-name="T22">nome</text:span></text:span></text:p>
          </text:list-item>
          <text:list-item>
            <text:p text:style-name="P30"><text:span text:style-name="Source_20_Text"><text:span text:style-name="T22">tipo</text:span></text:span><text:span text:style-name="T21"> (Cliente/Fornecedor)</text:span></text:p>
          </text:list-item>
        </text:list>
        <text:h text:style-name="P29" text:outline-level="3"><text:span text:style-name="T21"/></text:h>
        <text:h text:style-name="P31" text:outline-level="3"><text:span text:style-name="T18">8.5;</text:span><text:span text:style-name="T19">2. Tabela </text:span><text:span text:style-name="Source_20_Text"><text:span text:style-name="T20">Lancamentos_Operacionais</text:span></text:span><text:span text:style-name="T19"> (Base para NCG)</text:span></text:h>
        <text:p text:style-name="P22">Representa o faturamento e as compras. Aqui calcula-<text:span text:style-name="T2">se </text:span>o que a empresa tem a receber ou a pagar (Ativo e Passivo Circulante).</text:p>
        <text:list text:style-name="L6">
          <text:list-item>
            <text:p text:style-name="P32"><text:span text:style-name="Source_20_Text"><text:span text:style-name="T22">lancamento_id</text:span></text:span><text:span text:style-name="T21"> (PK)</text:span></text:p>
          </text:list-item>
          <text:list-item>
            <text:p text:style-name="P32"><text:span text:style-name="Source_20_Text"><text:span text:style-name="T22">entidade_id</text:span></text:span><text:span text:style-name="T21"> (FK)</text:span></text:p>
          </text:list-item>
          <text:list-item>
            <text:p text:style-name="P32"><text:span text:style-name="Source_20_Text"><text:span text:style-name="T22">data_emissao</text:span></text:span></text:p>
          </text:list-item>
          <text:list-item>
            <text:p text:style-name="P32"><text:span text:style-name="Source_20_Text"><text:span text:style-name="T22">valor_total</text:span></text:span></text:p>
          </text:list-item>
          <text:list-item>
            <text:p text:style-name="P32"><text:span text:style-name="Source_20_Text"><text:span text:style-name="T22">categoria</text:span></text:span><text:span text:style-name="T21"> (Ex: Estoque, Venda de Mercadoria, Salários)</text:span></text:p>
          </text:list-item>
          <text:list-item>
            <text:p text:style-name="P32"><text:span text:style-name="Source_20_Text"><text:span text:style-name="T22">status</text:span></text:span><text:span text:style-name="T21"> (Aberto/Liquidado)</text:span></text:p>
            <text:p text:style-name="P33"><text:span text:style-name="T21"/></text:p>
          </text:list-item>
        </text:list>
        <text:h text:style-name="P29" text:outline-level="3"><text:span text:style-name="T18">8.5.</text:span><text:span text:style-name="T19">3. Tabela </text:span><text:span text:style-name="Source_20_Text"><text:span text:style-name="T20">Fluxo_Caixa</text:span></text:span><text:span text:style-name="T19"> (Base para Tesouraria)</text:span></text:h>
        <text:p text:style-name="P22">Registra as entradas e saídas efetivas de dinheiro. É o "log" que alimenta o Saldo de Tesouraria.</text:p>
        <text:list text:style-name="L7">
          <text:list-item>
            <text:p text:style-name="P34"><text:span text:style-name="Source_20_Text"><text:span text:style-name="T22">movimento_id</text:span></text:span><text:span text:style-name="T21"> (PK)</text:span></text:p>
          </text:list-item>
          <text:list-item>
            <text:p text:style-name="P34"><text:span text:style-name="Source_20_Text"><text:span text:style-name="T22">lancamento_id</text:span></text:span><text:span text:style-name="T21"> (FK - Opcional, para conciliação)</text:span></text:p>
          </text:list-item>
          <text:list-item>
            <text:p text:style-name="P34"><text:span text:style-name="Source_20_Text"><text:span text:style-name="T22">data_pagamento</text:span></text:span></text:p>
          </text:list-item>
          <text:list-item>
            <text:p text:style-name="P34"><text:span text:style-name="Source_20_Text"><text:span text:style-name="T22">valor_pago</text:span></text:span></text:p>
          </text:list-item>
          <text:list-item>
            <text:p text:style-name="P34"><text:span text:style-name="Source_20_Text"><text:span text:style-name="T22">tipo_movimentacao</text:span></text:span><text:span text:style-name="T21"> (Entrada/Saída)</text:span></text:p>
          </text:list-item>
          <text:list-item>
            <text:p text:style-name="P34"><text:span text:style-name="Source_20_Text"><text:span text:style-name="T22">conta_bancaria_id</text:span></text:span></text:p>
          </text:list-item>
        </text:list>
        <text:h text:style-name="P35" text:outline-level="2"><text:span text:style-name="T7"/></text:h>
        <text:h text:style-name="P28" text:outline-level="2"><text:span text:style-name="T6">8.5.4 </text:span><text:span text:style-name="T7">Relacionamento e Lógica de Consulta (SQL)</text:span></text:h>
        <text:p text:style-name="P9">Para um sistema de SI gerar o relatório de <text:span text:style-name="T3">Necessidade de Capital de Giro</text:span>, o software executaria uma lógica similar a esta:</text:p>
        <text:h text:style-name="P36" text:outline-level="3">Cálculo da NCG via SQL:</text:h>
        <text:p text:style-name="P37">SQL</text:p>
        <text:p text:style-name="P38"><text:span text:style-name="Source_20_Text"><text:span text:style-name="T23">SELECT</text:span></text:span><text:span text:style-name="Source_20_Text"><text:span text:style-name="T24"> </text:span></text:span></text:p>
        <text:p text:style-name="P39"><text:span text:style-name="Source_20_Text"><text:span text:style-name="T25"><text:s text:c="4"/></text:span></text:span><text:span text:style-name="Source_20_Text"><text:span text:style-name="T24">(</text:span></text:span><text:span text:style-name="Source_20_Text"><text:span text:style-name="T23">SELECT</text:span></text:span><text:span text:style-name="Source_20_Text"><text:span text:style-name="T24"> </text:span></text:span><text:span text:style-name="Source_20_Text"><text:span text:style-name="T26">SUM</text:span></text:span><text:span text:style-name="Source_20_Text"><text:span text:style-name="T24">(valor_total) </text:span></text:span><text:span text:style-name="Source_20_Text"><text:span text:style-name="T23">FROM</text:span></text:span><text:span text:style-name="Source_20_Text"><text:span text:style-name="T24"> Lancamentos_Operacionais </text:span></text:span></text:p>
        <text:p text:style-name="P39"><text:span text:style-name="Source_20_Text"><text:span text:style-name="T25"><text:s text:c="5"/></text:span></text:span><text:span text:style-name="Source_20_Text"><text:span text:style-name="T23">WHERE</text:span></text:span><text:span text:style-name="Source_20_Text"><text:span text:style-name="T24"> categoria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Vendas'</text:span></text:span><text:span text:style-name="Source_20_Text"><text:span text:style-name="T24">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) </text:span></text:span><text:span text:style-name="Source_20_Text"><text:span text:style-name="T23">AS</text:span></text:span><text:span text:style-name="Source_20_Text"><text:span text:style-name="T24"> Ativo_Circulante_Operacional,</text:span></text:span></text:p>
        <text:p text:style-name="P40"><text:span text:style-name="Source_20_Text"><text:span text:style-name="T25"><text:s text:c="5"/></text:span></text:span></text:p>
        <text:p text:style-name="P39"><text:span text:style-name="Source_20_Text"><text:span text:style-name="T25"><text:s text:c="4"/></text:span></text:span><text:span text:style-name="Source_20_Text"><text:span text:style-name="T24">(</text:span></text:span><text:span text:style-name="Source_20_Text"><text:span text:style-name="T23">SELECT</text:span></text:span><text:span text:style-name="Source_20_Text"><text:span text:style-name="T24"> </text:span></text:span><text:span text:style-name="Source_20_Text"><text:span text:style-name="T26">SUM</text:span></text:span><text:span text:style-name="Source_20_Text"><text:span text:style-name="T24">(valor_total) </text:span></text:span><text:span text:style-name="Source_20_Text"><text:span text:style-name="T23">FROM</text:span></text:span><text:span text:style-name="Source_20_Text"><text:span text:style-name="T24"> Lancamentos_Operacionais </text:span></text:span></text:p>
        <text:p text:style-name="P39"><text:soft-page-break/><text:span text:style-name="Source_20_Text"><text:span text:style-name="T25"><text:s text:c="5"/></text:span></text:span><text:span text:style-name="Source_20_Text"><text:span text:style-name="T23">WHERE</text:span></text:span><text:span text:style-name="Source_20_Text"><text:span text:style-name="T24"> categoria </text:span></text:span><text:span text:style-name="Source_20_Text"><text:span text:style-name="T23">IN</text:span></text:span><text:span text:style-name="Source_20_Text"><text:span text:style-name="T24"> (</text:span></text:span><text:span text:style-name="Source_20_Text"><text:span text:style-name="T28">'Fornecedores'</text:span></text:span><text:span text:style-name="Source_20_Text"><text:span text:style-name="T24">, </text:span></text:span><text:span text:style-name="Source_20_Text"><text:span text:style-name="T28">'Salarios'</text:span></text:span><text:span text:style-name="Source_20_Text"><text:span text:style-name="T24">)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) </text:span></text:span><text:span text:style-name="Source_20_Text"><text:span text:style-name="T23">AS</text:span></text:span><text:span text:style-name="Source_20_Text"><text:span text:style-name="T24"> Passivo_Circulante_Operacional,</text:span></text:span></text:p>
        <text:p text:style-name="P41"/>
        <text:p text:style-name="P39"><text:span text:style-name="Source_20_Text"><text:span text:style-name="T25"><text:s text:c="4"/></text:span></text:span><text:span text:style-name="Source_20_Text"><text:span text:style-name="T29">-- A diferença resulta na NCG</text:span></text:span></text:p>
        <text:p text:style-name="P39"><text:span text:style-name="Source_20_Text"><text:span text:style-name="T25"><text:s text:c="4"/></text:span></text:span><text:span text:style-name="Source_20_Text"><text:span text:style-name="T24">((</text:span></text:span><text:span text:style-name="Source_20_Text"><text:span text:style-name="T23">SELECT</text:span></text:span><text:span text:style-name="Source_20_Text"><text:span text:style-name="T24"> </text:span></text:span><text:span text:style-name="Source_20_Text"><text:span text:style-name="T26">SUM</text:span></text:span><text:span text:style-name="Source_20_Text"><text:span text:style-name="T24">(valor_total) </text:span></text:span><text:span text:style-name="Source_20_Text"><text:span text:style-name="T23">FROM</text:span></text:span><text:span text:style-name="Source_20_Text"><text:span text:style-name="T24"> Lancamentos_Operacionais </text:span></text:span><text:span text:style-name="Source_20_Text"><text:span text:style-name="T23">WHERE</text:span></text:span><text:span text:style-name="Source_20_Text"><text:span text:style-name="T24"> categoria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Vendas'</text:span></text:span><text:span text:style-name="Source_20_Text"><text:span text:style-name="T24">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) </text:span></text:span><text:span text:style-name="Source_20_Text"><text:span text:style-name="T27">-</text:span></text:span><text:span text:style-name="Source_20_Text"><text:span text:style-name="T24"> </text:span></text:span></text:p>
        <text:p text:style-name="P39"><text:span text:style-name="Source_20_Text"><text:span text:style-name="T25"><text:s text:c="5"/></text:span></text:span><text:span text:style-name="Source_20_Text"><text:span text:style-name="T24">(</text:span></text:span><text:span text:style-name="Source_20_Text"><text:span text:style-name="T23">SELECT</text:span></text:span><text:span text:style-name="Source_20_Text"><text:span text:style-name="T24"> </text:span></text:span><text:span text:style-name="Source_20_Text"><text:span text:style-name="T26">SUM</text:span></text:span><text:span text:style-name="Source_20_Text"><text:span text:style-name="T24">(valor_total) </text:span></text:span><text:span text:style-name="Source_20_Text"><text:span text:style-name="T23">FROM</text:span></text:span><text:span text:style-name="Source_20_Text"><text:span text:style-name="T24"> Lancamentos_Operacionais </text:span></text:span><text:span text:style-name="Source_20_Text"><text:span text:style-name="T23">WHERE</text:span></text:span><text:span text:style-name="Source_20_Text"><text:span text:style-name="T24"> categoria </text:span></text:span><text:span text:style-name="Source_20_Text"><text:span text:style-name="T23">IN</text:span></text:span><text:span text:style-name="Source_20_Text"><text:span text:style-name="T24"> (</text:span></text:span><text:span text:style-name="Source_20_Text"><text:span text:style-name="T28">'Fornecedores'</text:span></text:span><text:span text:style-name="Source_20_Text"><text:span text:style-name="T24">, </text:span></text:span><text:span text:style-name="Source_20_Text"><text:span text:style-name="T28">'Salarios'</text:span></text:span><text:span text:style-name="Source_20_Text"><text:span text:style-name="T24">)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)) </text:span></text:span><text:span text:style-name="Source_20_Text"><text:span text:style-name="T23">AS</text:span></text:span><text:span text:style-name="Source_20_Text"><text:span text:style-name="T24"> NCG</text:span></text:span></text:p>
        <text:h text:style-name="P35" text:outline-level="2"><text:span text:style-name="T7"/></text:h>
        <text:h text:style-name="P28" text:outline-level="2"><text:span text:style-name="T6">8.5.5. </text:span><text:span text:style-name="T7">Integração com Business Intelligence (BI)</text:span></text:h>
        <text:p text:style-name="P42"/>
        <text:p text:style-name="P9"><text:span text:style-name="T2"><text:tab/>Os</text:span> esses dados brutos do banco devem ser transformados em <text:span text:style-name="T3">KPIs (Key Performance Indicators)</text:span>:</text:p>
        <text:list text:style-name="L8">
          <text:list-item>
            <text:p text:style-name="P43"><text:span text:style-name="T3">DSO (Days Sales Outstanding):</text:span> Média de dias que o sistema registra entre a emissão e o pagamento (afeta diretamente o Capital de Giro).</text:p>
          </text:list-item>
          <text:list-item>
            <text:p text:style-name="P43"><text:span text:style-name="T3">Giro de Estoque:</text:span> Integração entre o módulo de compras e vendas para otimizar o capital imobilizado.</text:p>
          </text:list-item>
          <text:list-item>
            <text:p text:style-name="P43"><text:span text:style-name="T3">Análise de Liquidez Corrente:</text:span> Comparativo em tempo real entre Ativos e Passivos de curto prazo.</text:p>
          </text:list-item>
        </text:list>
        <text:p text:style-name="P44"><text:span text:style-name="T3">Insight de Arquitetura:</text:span> Ao desenhar o sistema <text:span text:style-name="T2">é preciso garantir </text:span>a <text:span text:style-name="T3">Integridade Referencial</text:span>. Se um registro de "Contas a Receber" for deletado sem a devida baixa, o cálculo da NCG será corrompido, levando o gestor a tomar decisões erradas sobre empréstimos ou investimentos.</text:p>
        <text:p text:style-name="P45"><text:span text:style-name="T17"/></text:p>
        <text:p text:style-name="P46"><text:span text:style-name="T17"/></text:p>
        <text:h text:style-name="P47" text:outline-level="3">2. Modelagem de Dados (Entity-Relationship)</text:h>
        <text:p text:style-name="P48">Abaixo, a estrutura de tabelas sugerida para suportar esses cálculos:</text:p>
        <text:p text:style-name="P49"><text:span text:style-name="T30">Tabela: </text:span><text:span text:style-name="Source_20_Text"><text:span text:style-name="T30">lancamentos_operacionais</text:span></text:span><text:span text:style-name="T30"> (Base da NCG)</text:span></text:p>
        <text:p text:style-name="P48">| Coluna | Tipo | Descrição |</text:p>
        <text:p text:style-name="P48">| :--- | :--- | :--- |</text:p>
        <text:p text:style-name="P49"><text:span text:style-name="T31">| </text:span><text:span text:style-name="Source_20_Text"><text:span text:style-name="T31">id</text:span></text:span><text:span text:style-name="T31"> | PK (INT) | Identificador único do lançamento. |</text:span></text:p>
        <text:p text:style-name="P49"><text:span text:style-name="T31">| </text:span><text:span text:style-name="Source_20_Text"><text:span text:style-name="T31">data_vencimento</text:span></text:span><text:span text:style-name="T31"> | DATE | Data prevista para entrada/saída. |</text:span></text:p>
        <text:p text:style-name="P49"><text:span text:style-name="T31">| </text:span><text:span text:style-name="Source_20_Text"><text:span text:style-name="T31">valor</text:span></text:span><text:span text:style-name="T31"> | DECIMAL | Valor nominal do título. |</text:span></text:p>
        <text:p text:style-name="P49"><text:span text:style-name="T31">| </text:span><text:span text:style-name="Source_20_Text"><text:span text:style-name="T31">categoria</text:span></text:span><text:span text:style-name="T31"> | VARCHAR | 'CLIENTE', 'ESTOQUE', 'FORNECEDOR', 'SALARIO'. |</text:span></text:p>
        <text:p text:style-name="P49"><text:span text:style-name="T31">| </text:span><text:span text:style-name="Source_20_Text"><text:span text:style-name="T31">status</text:span></text:span><text:span text:style-name="T31"> | VARCHAR | 'ABERTO', 'LIQUIDADO'. |</text:span></text:p>
        <text:p text:style-name="P49"><text:span text:style-name="T30">Tabela: </text:span><text:span text:style-name="Source_20_Text"><text:span text:style-name="T30">fluxo_caixa</text:span></text:span><text:span text:style-name="T30"> (Base da Tesouraria)</text:span></text:p>
        <text:p text:style-name="P48">| Coluna | Tipo | Descrição |</text:p>
        <text:p text:style-name="P48">| :--- | :--- | :--- |</text:p>
        <text:p text:style-name="P49"><text:span text:style-name="T31">| </text:span><text:span text:style-name="Source_20_Text"><text:span text:style-name="T31">id</text:span></text:span><text:span text:style-name="T31"> | PK (INT) | Identificador do movimento de caixa. |</text:span></text:p>
        <text:p text:style-name="P49"><text:span text:style-name="T31">| </text:span><text:span text:style-name="Source_20_Text"><text:span text:style-name="T31">lancamento_id</text:span></text:span><text:span text:style-name="T31"> | FK (INT) | Relacionamento com a tabela de lançamentos. |</text:span></text:p>
        <text:p text:style-name="P49"><text:soft-page-break/><text:span text:style-name="T31">| </text:span><text:span text:style-name="Source_20_Text"><text:span text:style-name="T31">data_pagamento</text:span></text:span><text:span text:style-name="T31"> | DATE | Data real em que o dinheiro entrou/saiu. |</text:span></text:p>
        <text:p text:style-name="P49"><text:span text:style-name="T31">| </text:span><text:span text:style-name="Source_20_Text"><text:span text:style-name="T31">valor_pago</text:span></text:span><text:span text:style-name="T31"> | DECIMAL | Valor efetivamente movimentado (líquido). |</text:span></text:p>
        <text:p text:style-name="P49"><text:span text:style-name="T31">| </text:span><text:span text:style-name="Source_20_Text"><text:span text:style-name="T31">tipo</text:span></text:span><text:span text:style-name="T31"> | CHAR(1) | 'E' (Entrada) ou 'S' (Saída). |</text:span></text:p>
        <text:p text:style-name="P50"/>
        <text:h text:style-name="P51" text:outline-level="3">Lógica de Implementação (SQL)</text:h>
        <text:p text:style-name="P48">Exemplo de consulta para o Dashboard de NCG:</text:p>
        <text:p text:style-name="P48">SQL</text:p>
        <text:p text:style-name="P52"><text:span text:style-name="Source_20_Text"><text:span text:style-name="T31">SELECT </text:span></text:span></text:p>
        <text:p text:style-name="P52"><text:span text:style-name="Source_20_Text"><text:span text:style-name="T31"><text:s text:c="4"/>-- Soma do que a empresa tem a receber e em estoque (ACO)</text:span></text:span></text:p>
        <text:p text:style-name="P52"><text:span text:style-name="Source_20_Text"><text:span text:style-name="T31"><text:s text:c="4"/>SUM(CASE WHEN categoria IN ('CLIENTE', 'ESTOQUE') AND status = 'ABERTO' THEN valor ELSE 0 END) AS ACO,</text:span></text:span></text:p>
        <text:p text:style-name="P52"><text:span text:style-name="Source_20_Text"><text:span text:style-name="T31"><text:s text:c="4"/></text:span></text:span></text:p>
        <text:p text:style-name="P52"><text:span text:style-name="Source_20_Text"><text:span text:style-name="T31"><text:s text:c="4"/>-- Soma do que a empresa deve para fornecedores e funcionários (PCO)</text:span></text:span></text:p>
        <text:p text:style-name="P52"><text:span text:style-name="Source_20_Text"><text:span text:style-name="T31"><text:s text:c="4"/>SUM(CASE WHEN categoria IN ('FORNECEDOR', 'SALARIO') AND status = 'ABERTO' THEN valor ELSE 0 END) AS PCO,</text:span></text:span></text:p>
        <text:p text:style-name="P52"><text:span text:style-name="Source_20_Text"><text:span text:style-name="T31"><text:s text:c="4"/></text:span></text:span></text:p>
        <text:p text:style-name="P52"><text:span text:style-name="Source_20_Text"><text:span text:style-name="T31"><text:s text:c="4"/>-- Cálculo final da Necessidade de Capital de Giro</text:span></text:span></text:p>
        <text:p text:style-name="P52"><text:span text:style-name="Source_20_Text"><text:span text:style-name="T31"><text:s text:c="4"/>(SUM(CASE WHEN categoria IN ('CLIENTE', 'ESTOQUE') AND status = 'ABERTO' THEN valor ELSE 0 END) - </text:span></text:span></text:p>
        <text:p text:style-name="P52"><text:span text:style-name="Source_20_Text"><text:span text:style-name="T31"><text:s text:c="5"/>SUM(CASE WHEN categoria IN ('FORNECEDOR', 'SALARIO') AND status = 'ABERTO' THEN valor ELSE 0 END)) AS NCG</text:span></text:span></text:p>
        <text:p text:style-name="P52"><text:span text:style-name="Source_20_Text"><text:span text:style-name="T31">FROM lancamentos_operacionais;</text:span></text:span></text:p>
        <text:p text:style-name="P50"/>
        <text:h text:style-name="P47" text:outline-level="3">4. <text:span text:style-name="T32">O </text:span>Papel do SI)</text:h>
        <text:list text:style-name="L9">
          <text:list-item>
            <text:p text:style-name="P53"><text:span text:style-name="T8">O sistema não apenas registra:</text:span> Ele prevê cenários. Se o <text:span text:style-name="T33">lead time</text:span> do fornecedor aumenta no banco de dados, a NCG sobe automaticamente.</text:p>
          </text:list-item>
          <text:list-item>
            <text:p text:style-name="P53"><text:span text:style-name="T8">Integridade é tudo:</text:span> Um erro de input no "Contas a Receber" gera um falso positivo de liquidez, podendo levar a empresa à falência técnica.</text:p>
          </text:list-item>
          <text:list-item>
            <text:p text:style-name="P53"><text:span text:style-name="T8">Dashboards de BI:</text:span> Devem mostrar o <text:span text:style-name="T8">Saldo de Tesouraria ($ST = CDG - NCG$)</text:span> como o indicador de saúde máxima da empresa.</text:p>
          </text:list-item>
        </text:list>
        <text:p text:style-name="P50"/>
        <text:p text:style-name="P48"/>
      </text:section>
      <text:p text:style-name="P54"/>
      <text:p text:style-name="P54"/>
      <text:p text:style-name="P26"><text:span text:style-name="T32">Modelo de </text:span>um script SQL. <text:s/>Ele cria o banco de dados de exemplo, insere dados de teste e realiza os cálculos de <text:span text:style-name="T8">Necessidade de Capital de Giro (NCG)</text:span> e <text:span text:style-name="T8">Saldo de Tesouraria</text:span>.</text:p>
      <text:p text:style-name="P55">Você pode executar este código em qualquer gerenciador de banco de dados (como MySQL, PostgreSQL ou SQLite).</text:p>
      <text:h text:style-name="P56" text:outline-level="3"><text:soft-page-break/>Script SQL: Sistema de Gestão de Capital de Giro</text:h>
      <text:p text:style-name="P55">SQL</text:p>
      <text:p text:style-name="P57"><text:span text:style-name="Source_20_Text"><text:span text:style-name="T31">-- 1. Criação da Tabela de Entidades (Clientes e Fornecedores)</text:span></text:span></text:p>
      <text:p text:style-name="P57"><text:span text:style-name="Source_20_Text"><text:span text:style-name="T31">CREATE TABLE entidades (</text:span></text:span></text:p>
      <text:p text:style-name="P57"><text:span text:style-name="Source_20_Text"><text:span text:style-name="T31"><text:s text:c="4"/>id INTEGER PRIMARY KEY,</text:span></text:span></text:p>
      <text:p text:style-name="P57"><text:span text:style-name="Source_20_Text"><text:span text:style-name="T31"><text:s text:c="4"/>nome VARCHAR(100),</text:span></text:span></text:p>
      <text:p text:style-name="P57"><text:span text:style-name="Source_20_Text"><text:span text:style-name="T31"><text:s text:c="4"/>tipo VARCHAR(20) -- 'CLIENTE' ou 'FORNECEDOR'</text:span></text:span></text:p>
      <text:p text:style-name="P57"><text:span text:style-name="Source_20_Text"><text:span text:style-name="T31">);</text:span></text:span></text:p>
      <text:p text:style-name="P58"/>
      <text:p text:style-name="P57"><text:span text:style-name="Source_20_Text"><text:span text:style-name="T31">-- 2. Criação da Tabela de Lançamentos Operacionais (Base para NCG)</text:span></text:span></text:p>
      <text:p text:style-name="P57"><text:span text:style-name="Source_20_Text"><text:span text:style-name="T31">-- Aqui registramos o que a empresa "tem para receber" ou "tem para pagar"</text:span></text:span></text:p>
      <text:p text:style-name="P57"><text:span text:style-name="Source_20_Text"><text:span text:style-name="T31">CREATE TABLE lancamentos_operacionais (</text:span></text:span></text:p>
      <text:p text:style-name="P57"><text:span text:style-name="Source_20_Text"><text:span text:style-name="T31"><text:s text:c="4"/>id INTEGER PRIMARY KEY,</text:span></text:span></text:p>
      <text:p text:style-name="P57"><text:span text:style-name="Source_20_Text"><text:span text:style-name="T31"><text:s text:c="4"/>entidade_id INTEGER,</text:span></text:span></text:p>
      <text:p text:style-name="P57"><text:span text:style-name="Source_20_Text"><text:span text:style-name="T31"><text:s text:c="4"/>categoria VARCHAR(50), -- 'VENDA', 'ESTOQUE', 'FORNECEDOR', 'SALARIO'</text:span></text:span></text:p>
      <text:p text:style-name="P57"><text:span text:style-name="Source_20_Text"><text:span text:style-name="T31"><text:s text:c="4"/>valor DECIMAL(10,2),</text:span></text:span></text:p>
      <text:p text:style-name="P57"><text:span text:style-name="Source_20_Text"><text:span text:style-name="T31"><text:s text:c="4"/>status VARCHAR(20), -- 'ABERTO' ou 'LIQUIDADO'</text:span></text:span></text:p>
      <text:p text:style-name="P57"><text:span text:style-name="Source_20_Text"><text:span text:style-name="T31"><text:s text:c="4"/>data_vencimento DATE,</text:span></text:span></text:p>
      <text:p text:style-name="P57"><text:span text:style-name="Source_20_Text"><text:span text:style-name="T31"><text:s text:c="4"/>FOREIGN KEY (entidade_id) REFERENCES entidades(id)</text:span></text:span></text:p>
      <text:p text:style-name="P57"><text:span text:style-name="Source_20_Text"><text:span text:style-name="T31">);</text:span></text:span></text:p>
      <text:p text:style-name="P58"/>
      <text:p text:style-name="P57"><text:span text:style-name="Source_20_Text"><text:span text:style-name="T31">-- 3. Criação da Tabela de Fluxo de Caixa (Base para Tesouraria)</text:span></text:span></text:p>
      <text:p text:style-name="P57"><text:span text:style-name="Source_20_Text"><text:span text:style-name="T31">-- Aqui registramos o dinheiro real que já entrou ou saiu do banco</text:span></text:span></text:p>
      <text:p text:style-name="P57"><text:span text:style-name="Source_20_Text"><text:span text:style-name="T31">CREATE TABLE fluxo_caixa (</text:span></text:span></text:p>
      <text:p text:style-name="P57"><text:span text:style-name="Source_20_Text"><text:span text:style-name="T31"><text:s text:c="4"/>id INTEGER PRIMARY KEY,</text:span></text:span></text:p>
      <text:p text:style-name="P57"><text:span text:style-name="Source_20_Text"><text:span text:style-name="T31"><text:s text:c="4"/>lancamento_id INTEGER,</text:span></text:span></text:p>
      <text:p text:style-name="P57"><text:span text:style-name="Source_20_Text"><text:span text:style-name="T31"><text:s text:c="4"/>valor_pago DECIMAL(10,2),</text:span></text:span></text:p>
      <text:p text:style-name="P57"><text:span text:style-name="Source_20_Text"><text:span text:style-name="T31"><text:s text:c="4"/>tipo_movimentacao CHAR(1), -- 'E' para Entrada, 'S' para Saída</text:span></text:span></text:p>
      <text:p text:style-name="P57"><text:span text:style-name="Source_20_Text"><text:span text:style-name="T31"><text:s text:c="4"/>data_pagamento DATE,</text:span></text:span></text:p>
      <text:p text:style-name="P57"><text:span text:style-name="Source_20_Text"><text:span text:style-name="T31"><text:s text:c="4"/>FOREIGN KEY (lancamento_id) REFERENCES lancamentos_operacionais(id)</text:span></text:span></text:p>
      <text:p text:style-name="P57"><text:span text:style-name="Source_20_Text"><text:span text:style-name="T31">);</text:span></text:span></text:p>
      <text:p text:style-name="P58"/>
      <text:p text:style-name="P57"><text:span text:style-name="Source_20_Text"><text:span text:style-name="T31">-- ---------------------------------------------------------</text:span></text:span></text:p>
      <text:p text:style-name="P57"><text:span text:style-name="Source_20_Text"><text:span text:style-name="T31">-- INSERÇÃO DE DADOS PARA TESTE (ESTUDO DE CASO)</text:span></text:span></text:p>
      <text:p text:style-name="P57"><text:span text:style-name="Source_20_Text"><text:span text:style-name="T31">-- ---------------------------------------------------------</text:span></text:span></text:p>
      <text:p text:style-name="P58"/>
      <text:p text:style-name="P57"><text:span text:style-name="Source_20_Text"><text:span text:style-name="T31">INSERT INTO entidades VALUES (1, 'Cliente Alpha', 'CLIENTE');</text:span></text:span></text:p>
      <text:p text:style-name="P57"><text:span text:style-name="Source_20_Text"><text:span text:style-name="T31">INSERT INTO entidades VALUES (2, 'Fornecedor de Matéria-Prima', 'FORNECEDOR');</text:span></text:span></text:p>
      <text:p text:style-name="P58"/>
      <text:p text:style-name="P57"><text:span text:style-name="Source_20_Text"><text:span text:style-name="T31">-- Empresa vendeu R$ 10.000 mas ainda não recebeu (Ativo Circulante Operacional)</text:span></text:span></text:p>
      <text:p text:style-name="P57"><text:span text:style-name="Source_20_Text"><text:span text:style-name="T31">INSERT INTO lancamentos_operacionais VALUES (101, 1, 'VENDA', 10000.00, 'ABERTO', '2026-04-10');</text:span></text:span></text:p>
      <text:p text:style-name="P58"/>
      <text:p text:style-name="P57"><text:span text:style-name="Source_20_Text"><text:span text:style-name="T31">-- Empresa comprou R$ 4.000 em estoque e ainda não pagou (Passivo Circulante Operacional)</text:span></text:span></text:p>
      <text:p text:style-name="P57"><text:span text:style-name="Source_20_Text"><text:span text:style-name="T31">INSERT INTO lancamentos_operacionais VALUES (102, 2, 'FORNECEDOR', 4000.00, 'ABERTO', '2026-04-15');</text:span></text:span></text:p>
      <text:p text:style-name="P58"/>
      <text:p text:style-name="P57"><text:span text:style-name="Source_20_Text"><text:span text:style-name="T31">-- Empresa já tem R$ 2.000 em dinheiro no banco (Saldo de Tesouraria Inicial)</text:span></text:span></text:p>
      <text:p text:style-name="P57"><text:span text:style-name="Source_20_Text"><text:span text:style-name="T31">INSERT INTO fluxo_caixa VALUES (1, NULL, 2000.00, 'E', '2026-03-01');</text:span></text:span></text:p>
      <text:p text:style-name="P58"/>
      <text:p text:style-name="P57"><text:span text:style-name="Source_20_Text"><text:span text:style-name="T31">-- ---------------------------------------------------------</text:span></text:span></text:p>
      <text:p text:style-name="P57"><text:soft-page-break/><text:span text:style-name="Source_20_Text"><text:span text:style-name="T31">-- CONSULTA DE DASHBOARD (A INTELIGÊNCIA DO SISTEMA)</text:span></text:span></text:p>
      <text:p text:style-name="P57"><text:span text:style-name="Source_20_Text"><text:span text:style-name="T31">-- ---------------------------------------------------------</text:span></text:span></text:p>
      <text:p text:style-name="P58"/>
      <text:p text:style-name="P57"><text:span text:style-name="Source_20_Text"><text:span text:style-name="T31">SELECT </text:span></text:span></text:p>
      <text:p text:style-name="P57"><text:span text:style-name="Source_20_Text"><text:span text:style-name="T31"><text:s text:c="4"/>-- Cálculo do ACO (Ativo Circulante Operacional)</text:span></text:span></text:p>
      <text:p text:style-name="P57"><text:span text:style-name="Source_20_Text"><text:span text:style-name="T31"><text:s text:c="4"/>SUM(CASE WHEN categoria IN ('VENDA', 'ESTOQUE') AND status = 'ABERTO' THEN valor ELSE 0 END) AS Ativo_Operacional,</text:span></text:span></text:p>
      <text:p text:style-name="P58"/>
      <text:p text:style-name="P57"><text:span text:style-name="Source_20_Text"><text:span text:style-name="T31"><text:s text:c="4"/>-- Cálculo do PCO (Passivo Circulante Operacional)</text:span></text:span></text:p>
      <text:p text:style-name="P57"><text:span text:style-name="Source_20_Text"><text:span text:style-name="T31"><text:s text:c="4"/>SUM(CASE WHEN categoria IN ('FORNECEDOR', 'SALARIO') AND status = 'ABERTO' THEN valor ELSE 0 END) AS Passivo_Operacional,</text:span></text:span></text:p>
      <text:p text:style-name="P58"/>
      <text:p text:style-name="P57"><text:span text:style-name="Source_20_Text"><text:span text:style-name="T31"><text:s text:c="4"/>-- Cálculo da NCG (Necessidade de Capital de Giro)</text:span></text:span></text:p>
      <text:p text:style-name="P57"><text:span text:style-name="Source_20_Text"><text:span text:style-name="T31"><text:s text:c="4"/>(SUM(CASE WHEN categoria IN ('VENDA', 'ESTOQUE') AND status = 'ABERTO' THEN valor ELSE 0 END) - </text:span></text:span></text:p>
      <text:p text:style-name="P57"><text:span text:style-name="Source_20_Text"><text:span text:style-name="T31"><text:s text:c="5"/>SUM(CASE WHEN categoria IN ('FORNECEDOR', 'SALARIO') AND status = 'ABERTO' THEN valor ELSE 0 END)) AS NCG,</text:span></text:span></text:p>
      <text:p text:style-name="P58"/>
      <text:p text:style-name="P57"><text:span text:style-name="Source_20_Text"><text:span text:style-name="T31"><text:s text:c="4"/>-- Saldo de Tesouraria (Dinheiro disponível no banco)</text:span></text:span></text:p>
      <text:p text:style-name="P57"><text:span text:style-name="Source_20_Text"><text:span text:style-name="T31"><text:s text:c="4"/>(SELECT SUM(CASE WHEN tipo_movimentacao = 'E' THEN valor_pago ELSE -valor_pago END) FROM fluxo_caixa) AS Saldo_Tesouraria</text:span></text:span></text:p>
      <text:p text:style-name="P58"/>
      <text:p text:style-name="P59"><text:span text:style-name="Source_20_Text"><text:span text:style-name="T31">FROM lancamentos_operacionais;</text:span></text:span></text:p>
      <text:h text:style-name="P56" text:outline-level="3">O que este script demonstra <text:span text:style-name="T32">para o discente</text:span>?</text:h>
      <text:list text:style-name="L10">
        <text:list-item>
          <text:p text:style-name="P60"><text:span text:style-name="T30">Visão de Engenharia:</text:span><text:span text:style-name="T31"> Como transformar conceitos abstratos (Capital de Giro) em colunas e tipos de dados (</text:span><text:span text:style-name="Source_20_Text"><text:span text:style-name="T31">DECIMAL</text:span></text:span><text:span text:style-name="T31">, </text:span><text:span text:style-name="Source_20_Text"><text:span text:style-name="T31">DATE</text:span></text:span><text:span text:style-name="T31">, </text:span><text:span text:style-name="Source_20_Text"><text:span text:style-name="T31">FK</text:span></text:span><text:span text:style-name="T31">).</text:span></text:p>
        </text:list-item>
        <text:list-item>
          <text:p text:style-name="P60"><text:span text:style-name="T30">Lógica de Negócio no SQL:</text:span><text:span text:style-name="T31"> O uso de </text:span><text:span text:style-name="Source_20_Text"><text:span text:style-name="T31">CASE WHEN</text:span></text:span><text:span text:style-name="T31"> para filtrar categorias financeiras sem precisar de múltiplas tabelas complexas.</text:span></text:p>
        </text:list-item>
        <text:list-item>
          <text:p text:style-name="P60"><text:span text:style-name="T30">Diferenciação de Dados:</text:span><text:span text:style-name="T31"> A separação entre </text:span><text:span text:style-name="Source_20_Text"><text:span text:style-name="T31">lancamentos_operacionais</text:span></text:span><text:span text:style-name="T31"> (o que vai acontecer) e </text:span><text:span text:style-name="Source_20_Text"><text:span text:style-name="T31">fluxo_caixa</text:span></text:span><text:span text:style-name="T31"> (o que já aconteceu).</text:span></text:p>
        </text:list-item>
      </text:list>
      <text:p text:style-name="P61"><text:span text:style-name="T32">Co</text:span>mo criar uma "View" no banco de dados para que esse relatório fique sempre atualizado para o usuário final?</text:p>
      <text:p text:style-name="P26"><text:span text:style-name="T7">Uma </text:span><text:span text:style-name="T17">View</text:span><text:span text:style-name="T7"> é um dos recursos mais poderosos de </text:span><text:span text:style-name="T17">Sistemas de Informação</text:span><text:span text:style-name="T7">, pois ela funciona como uma "tabela virtual". Em vez de o desenvolvedor ter que escrever aquele SQL complexo toda vez que quiser mostrar os dados no Dashboard, ele simplesmente consulta a View.</text:span></text:p>
      <text:section text:style-name="Sect1" text:name="model-response-message-contentr_b883de91c7623170">
        <text:p text:style-name="P9">Para o gestor financeiro, isso garante que a <text:span text:style-name="T3">Necessidade de Capital de Giro (NCG)</text:span> e o <text:span text:style-name="T3">Saldo de Tesouraria</text:span> estejam sempre atualizados com base nos últimos lançamentos inseridos.</text:p>
        <text:p text:style-name="P27">Aqui está o script para criar essa camada de inteligência no seu banco de dados:</text:p>
        <text:p text:style-name="P50"/>
        <text:h text:style-name="P36" text:outline-level="3">Script: Criação da View de Saúde Financeira</text:h>
        <text:p text:style-name="P37">SQL</text:p>
        <text:p text:style-name="P38"><text:span text:style-name="Source_20_Text"><text:span text:style-name="T29">-- Criando a View que consolida os indicadores de NCG e Tesouraria</text:span></text:span></text:p>
        <text:p text:style-name="P39"><text:span text:style-name="Source_20_Text"><text:span text:style-name="T23">CREATE</text:span></text:span><text:span text:style-name="Source_20_Text"><text:span text:style-name="T24"> </text:span></text:span><text:span text:style-name="Source_20_Text"><text:span text:style-name="T23">VIEW</text:span></text:span><text:span text:style-name="Source_20_Text"><text:span text:style-name="T24"> v_dashboard_financeiro </text:span></text:span><text:span text:style-name="Source_20_Text"><text:span text:style-name="T23">AS</text:span></text:span></text:p>
        <text:p text:style-name="P39"><text:soft-page-break/><text:span text:style-name="Source_20_Text"><text:span text:style-name="T23">SELECT</text:span></text:span><text:span text:style-name="Source_20_Text"><text:span text:style-name="T24"> </text:span></text:span></text:p>
        <text:p text:style-name="P39"><text:span text:style-name="Source_20_Text"><text:span text:style-name="T25"><text:s text:c="4"/></text:span></text:span><text:span text:style-name="Source_20_Text"><text:span text:style-name="T29">-- 1. Ativo Circulante Operacional (Dinheiro a receber da operação)</text:span></text:span></text:p>
        <text:p text:style-name="P39"><text:span text:style-name="Source_20_Text"><text:span text:style-name="T25"><text:s text:c="4"/></text:span></text:span><text:span text:style-name="Source_20_Text"><text:span text:style-name="T26">SUM</text:span></text:span><text:span text:style-name="Source_20_Text"><text:span text:style-name="T24">(</text:span></text:span><text:span text:style-name="Source_20_Text"><text:span text:style-name="T23">CASE</text:span></text:span><text:span text:style-name="Source_20_Text"><text:span text:style-name="T24"> </text:span></text:span><text:span text:style-name="Source_20_Text"><text:span text:style-name="T23">WHEN</text:span></text:span><text:span text:style-name="Source_20_Text"><text:span text:style-name="T24"> categoria </text:span></text:span><text:span text:style-name="Source_20_Text"><text:span text:style-name="T23">IN</text:span></text:span><text:span text:style-name="Source_20_Text"><text:span text:style-name="T24"> (</text:span></text:span><text:span text:style-name="Source_20_Text"><text:span text:style-name="T28">'VENDA'</text:span></text:span><text:span text:style-name="Source_20_Text"><text:span text:style-name="T24">, </text:span></text:span><text:span text:style-name="Source_20_Text"><text:span text:style-name="T28">'ESTOQUE'</text:span></text:span><text:span text:style-name="Source_20_Text"><text:span text:style-name="T24">)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 </text:span></text:span><text:span text:style-name="Source_20_Text"><text:span text:style-name="T23">THEN</text:span></text:span><text:span text:style-name="Source_20_Text"><text:span text:style-name="T24"> valor </text:span></text:span><text:span text:style-name="Source_20_Text"><text:span text:style-name="T23">ELSE</text:span></text:span><text:span text:style-name="Source_20_Text"><text:span text:style-name="T24"> </text:span></text:span><text:span text:style-name="Source_20_Text"><text:span text:style-name="T34">0</text:span></text:span><text:span text:style-name="Source_20_Text"><text:span text:style-name="T24"> </text:span></text:span><text:span text:style-name="Source_20_Text"><text:span text:style-name="T23">END</text:span></text:span><text:span text:style-name="Source_20_Text"><text:span text:style-name="T24">) </text:span></text:span><text:span text:style-name="Source_20_Text"><text:span text:style-name="T23">AS</text:span></text:span><text:span text:style-name="Source_20_Text"><text:span text:style-name="T24"> ativo_operacional,</text:span></text:span></text:p>
        <text:p text:style-name="P41"/>
        <text:p text:style-name="P39"><text:span text:style-name="Source_20_Text"><text:span text:style-name="T25"><text:s text:c="4"/></text:span></text:span><text:span text:style-name="Source_20_Text"><text:span text:style-name="T29">-- 2. Passivo Circulante Operacional (Dívidas da operação)</text:span></text:span></text:p>
        <text:p text:style-name="P39"><text:span text:style-name="Source_20_Text"><text:span text:style-name="T25"><text:s text:c="4"/></text:span></text:span><text:span text:style-name="Source_20_Text"><text:span text:style-name="T26">SUM</text:span></text:span><text:span text:style-name="Source_20_Text"><text:span text:style-name="T24">(</text:span></text:span><text:span text:style-name="Source_20_Text"><text:span text:style-name="T23">CASE</text:span></text:span><text:span text:style-name="Source_20_Text"><text:span text:style-name="T24"> </text:span></text:span><text:span text:style-name="Source_20_Text"><text:span text:style-name="T23">WHEN</text:span></text:span><text:span text:style-name="Source_20_Text"><text:span text:style-name="T24"> categoria </text:span></text:span><text:span text:style-name="Source_20_Text"><text:span text:style-name="T23">IN</text:span></text:span><text:span text:style-name="Source_20_Text"><text:span text:style-name="T24"> (</text:span></text:span><text:span text:style-name="Source_20_Text"><text:span text:style-name="T28">'FORNECEDOR'</text:span></text:span><text:span text:style-name="Source_20_Text"><text:span text:style-name="T24">, </text:span></text:span><text:span text:style-name="Source_20_Text"><text:span text:style-name="T28">'SALARIO'</text:span></text:span><text:span text:style-name="Source_20_Text"><text:span text:style-name="T24">)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 </text:span></text:span><text:span text:style-name="Source_20_Text"><text:span text:style-name="T23">THEN</text:span></text:span><text:span text:style-name="Source_20_Text"><text:span text:style-name="T24"> valor </text:span></text:span><text:span text:style-name="Source_20_Text"><text:span text:style-name="T23">ELSE</text:span></text:span><text:span text:style-name="Source_20_Text"><text:span text:style-name="T24"> </text:span></text:span><text:span text:style-name="Source_20_Text"><text:span text:style-name="T34">0</text:span></text:span><text:span text:style-name="Source_20_Text"><text:span text:style-name="T24"> </text:span></text:span><text:span text:style-name="Source_20_Text"><text:span text:style-name="T23">END</text:span></text:span><text:span text:style-name="Source_20_Text"><text:span text:style-name="T24">) </text:span></text:span><text:span text:style-name="Source_20_Text"><text:span text:style-name="T23">AS</text:span></text:span><text:span text:style-name="Source_20_Text"><text:span text:style-name="T24"> passivo_operacional,</text:span></text:span></text:p>
        <text:p text:style-name="P41"/>
        <text:p text:style-name="P39"><text:span text:style-name="Source_20_Text"><text:span text:style-name="T25"><text:s text:c="4"/></text:span></text:span><text:span text:style-name="Source_20_Text"><text:span text:style-name="T29">-- 3. Cálculo da NCG (O 'gap' financeiro)</text:span></text:span></text:p>
        <text:p text:style-name="P39"><text:span text:style-name="Source_20_Text"><text:span text:style-name="T25"><text:s text:c="4"/></text:span></text:span><text:span text:style-name="Source_20_Text"><text:span text:style-name="T24">(</text:span></text:span><text:span text:style-name="Source_20_Text"><text:span text:style-name="T26">SUM</text:span></text:span><text:span text:style-name="Source_20_Text"><text:span text:style-name="T24">(</text:span></text:span><text:span text:style-name="Source_20_Text"><text:span text:style-name="T23">CASE</text:span></text:span><text:span text:style-name="Source_20_Text"><text:span text:style-name="T24"> </text:span></text:span><text:span text:style-name="Source_20_Text"><text:span text:style-name="T23">WHEN</text:span></text:span><text:span text:style-name="Source_20_Text"><text:span text:style-name="T24"> categoria </text:span></text:span><text:span text:style-name="Source_20_Text"><text:span text:style-name="T23">IN</text:span></text:span><text:span text:style-name="Source_20_Text"><text:span text:style-name="T24"> (</text:span></text:span><text:span text:style-name="Source_20_Text"><text:span text:style-name="T28">'VENDA'</text:span></text:span><text:span text:style-name="Source_20_Text"><text:span text:style-name="T24">, </text:span></text:span><text:span text:style-name="Source_20_Text"><text:span text:style-name="T28">'ESTOQUE'</text:span></text:span><text:span text:style-name="Source_20_Text"><text:span text:style-name="T24">)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 </text:span></text:span><text:span text:style-name="Source_20_Text"><text:span text:style-name="T23">THEN</text:span></text:span><text:span text:style-name="Source_20_Text"><text:span text:style-name="T24"> valor </text:span></text:span><text:span text:style-name="Source_20_Text"><text:span text:style-name="T23">ELSE</text:span></text:span><text:span text:style-name="Source_20_Text"><text:span text:style-name="T24"> </text:span></text:span><text:span text:style-name="Source_20_Text"><text:span text:style-name="T34">0</text:span></text:span><text:span text:style-name="Source_20_Text"><text:span text:style-name="T24"> </text:span></text:span><text:span text:style-name="Source_20_Text"><text:span text:style-name="T23">END</text:span></text:span><text:span text:style-name="Source_20_Text"><text:span text:style-name="T24">) </text:span></text:span><text:span text:style-name="Source_20_Text"><text:span text:style-name="T27">-</text:span></text:span><text:span text:style-name="Source_20_Text"><text:span text:style-name="T24"> </text:span></text:span></text:p>
        <text:p text:style-name="P39"><text:span text:style-name="Source_20_Text"><text:span text:style-name="T25"><text:s text:c="5"/></text:span></text:span><text:span text:style-name="Source_20_Text"><text:span text:style-name="T26">SUM</text:span></text:span><text:span text:style-name="Source_20_Text"><text:span text:style-name="T24">(</text:span></text:span><text:span text:style-name="Source_20_Text"><text:span text:style-name="T23">CASE</text:span></text:span><text:span text:style-name="Source_20_Text"><text:span text:style-name="T24"> </text:span></text:span><text:span text:style-name="Source_20_Text"><text:span text:style-name="T23">WHEN</text:span></text:span><text:span text:style-name="Source_20_Text"><text:span text:style-name="T24"> categoria </text:span></text:span><text:span text:style-name="Source_20_Text"><text:span text:style-name="T23">IN</text:span></text:span><text:span text:style-name="Source_20_Text"><text:span text:style-name="T24"> (</text:span></text:span><text:span text:style-name="Source_20_Text"><text:span text:style-name="T28">'FORNECEDOR'</text:span></text:span><text:span text:style-name="Source_20_Text"><text:span text:style-name="T24">, </text:span></text:span><text:span text:style-name="Source_20_Text"><text:span text:style-name="T28">'SALARIO'</text:span></text:span><text:span text:style-name="Source_20_Text"><text:span text:style-name="T24">)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 </text:span></text:span><text:span text:style-name="Source_20_Text"><text:span text:style-name="T23">THEN</text:span></text:span><text:span text:style-name="Source_20_Text"><text:span text:style-name="T24"> valor </text:span></text:span><text:span text:style-name="Source_20_Text"><text:span text:style-name="T23">ELSE</text:span></text:span><text:span text:style-name="Source_20_Text"><text:span text:style-name="T24"> </text:span></text:span><text:span text:style-name="Source_20_Text"><text:span text:style-name="T34">0</text:span></text:span><text:span text:style-name="Source_20_Text"><text:span text:style-name="T24"> </text:span></text:span><text:span text:style-name="Source_20_Text"><text:span text:style-name="T23">END</text:span></text:span><text:span text:style-name="Source_20_Text"><text:span text:style-name="T24">)) </text:span></text:span><text:span text:style-name="Source_20_Text"><text:span text:style-name="T23">AS</text:span></text:span><text:span text:style-name="Source_20_Text"><text:span text:style-name="T24"> ncg,</text:span></text:span></text:p>
        <text:p text:style-name="P41"/>
        <text:p text:style-name="P39"><text:span text:style-name="Source_20_Text"><text:span text:style-name="T25"><text:s text:c="4"/></text:span></text:span><text:span text:style-name="Source_20_Text"><text:span text:style-name="T29">-- 4. Saldo de Tesouraria Real (O que tem no banco agora)</text:span></text:span></text:p>
        <text:p text:style-name="P39"><text:span text:style-name="Source_20_Text"><text:span text:style-name="T25"><text:s text:c="4"/></text:span></text:span><text:span text:style-name="Source_20_Text"><text:span text:style-name="T24">(</text:span></text:span><text:span text:style-name="Source_20_Text"><text:span text:style-name="T23">SELECT</text:span></text:span><text:span text:style-name="Source_20_Text"><text:span text:style-name="T24"> </text:span></text:span><text:span text:style-name="Source_20_Text"><text:span text:style-name="T26">SUM</text:span></text:span><text:span text:style-name="Source_20_Text"><text:span text:style-name="T24">(</text:span></text:span><text:span text:style-name="Source_20_Text"><text:span text:style-name="T23">CASE</text:span></text:span><text:span text:style-name="Source_20_Text"><text:span text:style-name="T24"> </text:span></text:span><text:span text:style-name="Source_20_Text"><text:span text:style-name="T23">WHEN</text:span></text:span><text:span text:style-name="Source_20_Text"><text:span text:style-name="T24"> tipo_movimentacao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E'</text:span></text:span><text:span text:style-name="Source_20_Text"><text:span text:style-name="T24"> </text:span></text:span><text:span text:style-name="Source_20_Text"><text:span text:style-name="T23">THEN</text:span></text:span><text:span text:style-name="Source_20_Text"><text:span text:style-name="T24"> valor_pago </text:span></text:span><text:span text:style-name="Source_20_Text"><text:span text:style-name="T23">ELSE</text:span></text:span><text:span text:style-name="Source_20_Text"><text:span text:style-name="T24"> </text:span></text:span><text:span text:style-name="Source_20_Text"><text:span text:style-name="T27">-</text:span></text:span><text:span text:style-name="Source_20_Text"><text:span text:style-name="T24">valor_pago </text:span></text:span><text:span text:style-name="Source_20_Text"><text:span text:style-name="T23">END</text:span></text:span><text:span text:style-name="Source_20_Text"><text:span text:style-name="T24">) </text:span></text:span></text:p>
        <text:p text:style-name="P39"><text:span text:style-name="Source_20_Text"><text:span text:style-name="T25"><text:s text:c="5"/></text:span></text:span><text:span text:style-name="Source_20_Text"><text:span text:style-name="T23">FROM</text:span></text:span><text:span text:style-name="Source_20_Text"><text:span text:style-name="T24"> fluxo_caixa) </text:span></text:span><text:span text:style-name="Source_20_Text"><text:span text:style-name="T23">AS</text:span></text:span><text:span text:style-name="Source_20_Text"><text:span text:style-name="T24"> saldo_tesouraria,</text:span></text:span></text:p>
        <text:p text:style-name="P41"/>
        <text:p text:style-name="P39"><text:span text:style-name="Source_20_Text"><text:span text:style-name="T25"><text:s text:c="4"/></text:span></text:span><text:span text:style-name="Source_20_Text"><text:span text:style-name="T29">-- 5. Análise de Risco (Lógica de SI para o usuário)</text:span></text:span></text:p>
        <text:p text:style-name="P39"><text:span text:style-name="Source_20_Text"><text:span text:style-name="T25"><text:s text:c="4"/></text:span></text:span><text:span text:style-name="Source_20_Text"><text:span text:style-name="T23">CASE</text:span></text:span><text:span text:style-name="Source_20_Text"><text:span text:style-name="T24"> </text:span></text:span></text:p>
        <text:p text:style-name="P39"><text:span text:style-name="Source_20_Text"><text:span text:style-name="T25"><text:s text:c="8"/></text:span></text:span><text:span text:style-name="Source_20_Text"><text:span text:style-name="T23">WHEN</text:span></text:span><text:span text:style-name="Source_20_Text"><text:span text:style-name="T24"> (</text:span></text:span><text:span text:style-name="Source_20_Text"><text:span text:style-name="T23">SELECT</text:span></text:span><text:span text:style-name="Source_20_Text"><text:span text:style-name="T24"> </text:span></text:span><text:span text:style-name="Source_20_Text"><text:span text:style-name="T26">SUM</text:span></text:span><text:span text:style-name="Source_20_Text"><text:span text:style-name="T24">(</text:span></text:span><text:span text:style-name="Source_20_Text"><text:span text:style-name="T23">CASE</text:span></text:span><text:span text:style-name="Source_20_Text"><text:span text:style-name="T24"> </text:span></text:span><text:span text:style-name="Source_20_Text"><text:span text:style-name="T23">WHEN</text:span></text:span><text:span text:style-name="Source_20_Text"><text:span text:style-name="T24"> tipo_movimentacao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E'</text:span></text:span><text:span text:style-name="Source_20_Text"><text:span text:style-name="T24"> </text:span></text:span><text:span text:style-name="Source_20_Text"><text:span text:style-name="T23">THEN</text:span></text:span><text:span text:style-name="Source_20_Text"><text:span text:style-name="T24"> valor_pago </text:span></text:span><text:span text:style-name="Source_20_Text"><text:span text:style-name="T23">ELSE</text:span></text:span><text:span text:style-name="Source_20_Text"><text:span text:style-name="T24"> </text:span></text:span><text:span text:style-name="Source_20_Text"><text:span text:style-name="T27">-</text:span></text:span><text:span text:style-name="Source_20_Text"><text:span text:style-name="T24">valor_pago </text:span></text:span><text:span text:style-name="Source_20_Text"><text:span text:style-name="T23">END</text:span></text:span><text:span text:style-name="Source_20_Text"><text:span text:style-name="T24">) </text:span></text:span><text:span text:style-name="Source_20_Text"><text:span text:style-name="T23">FROM</text:span></text:span><text:span text:style-name="Source_20_Text"><text:span text:style-name="T24"> fluxo_caixa) </text:span></text:span><text:span text:style-name="Source_20_Text"><text:span text:style-name="T27">&lt;</text:span></text:span><text:span text:style-name="Source_20_Text"><text:span text:style-name="T24"> </text:span></text:span><text:span text:style-name="Source_20_Text"><text:span text:style-name="T34">0</text:span></text:span><text:span text:style-name="Source_20_Text"><text:span text:style-name="T24"> </text:span></text:span></text:p>
        <text:p text:style-name="P39"><text:span text:style-name="Source_20_Text"><text:span text:style-name="T25"><text:s text:c="8"/></text:span></text:span><text:span text:style-name="Source_20_Text"><text:span text:style-name="T23">THEN</text:span></text:span><text:span text:style-name="Source_20_Text"><text:span text:style-name="T24"> </text:span></text:span><text:span text:style-name="Source_20_Text"><text:span text:style-name="T28">'RISCO: Dependente de Empréstimos'</text:span></text:span></text:p>
        <text:p text:style-name="P39"><text:span text:style-name="Source_20_Text"><text:span text:style-name="T25"><text:s text:c="8"/></text:span></text:span><text:span text:style-name="Source_20_Text"><text:span text:style-name="T23">WHEN</text:span></text:span><text:span text:style-name="Source_20_Text"><text:span text:style-name="T24"> (</text:span></text:span><text:span text:style-name="Source_20_Text"><text:span text:style-name="T26">SUM</text:span></text:span><text:span text:style-name="Source_20_Text"><text:span text:style-name="T24">(</text:span></text:span><text:span text:style-name="Source_20_Text"><text:span text:style-name="T23">CASE</text:span></text:span><text:span text:style-name="Source_20_Text"><text:span text:style-name="T24"> </text:span></text:span><text:span text:style-name="Source_20_Text"><text:span text:style-name="T23">WHEN</text:span></text:span><text:span text:style-name="Source_20_Text"><text:span text:style-name="T24"> categoria </text:span></text:span><text:span text:style-name="Source_20_Text"><text:span text:style-name="T23">IN</text:span></text:span><text:span text:style-name="Source_20_Text"><text:span text:style-name="T24"> (</text:span></text:span><text:span text:style-name="Source_20_Text"><text:span text:style-name="T28">'VENDA'</text:span></text:span><text:span text:style-name="Source_20_Text"><text:span text:style-name="T24">, </text:span></text:span><text:span text:style-name="Source_20_Text"><text:span text:style-name="T28">'ESTOQUE'</text:span></text:span><text:span text:style-name="Source_20_Text"><text:span text:style-name="T24">)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 </text:span></text:span><text:span text:style-name="Source_20_Text"><text:span text:style-name="T23">THEN</text:span></text:span><text:span text:style-name="Source_20_Text"><text:span text:style-name="T24"> valor </text:span></text:span><text:span text:style-name="Source_20_Text"><text:span text:style-name="T23">ELSE</text:span></text:span><text:span text:style-name="Source_20_Text"><text:span text:style-name="T24"> </text:span></text:span><text:span text:style-name="Source_20_Text"><text:span text:style-name="T34">0</text:span></text:span><text:span text:style-name="Source_20_Text"><text:span text:style-name="T24"> </text:span></text:span><text:span text:style-name="Source_20_Text"><text:span text:style-name="T23">END</text:span></text:span><text:span text:style-name="Source_20_Text"><text:span text:style-name="T24">) </text:span></text:span><text:span text:style-name="Source_20_Text"><text:span text:style-name="T27">-</text:span></text:span><text:span text:style-name="Source_20_Text"><text:span text:style-name="T24"> </text:span></text:span></text:p>
        <text:p text:style-name="P39"><text:span text:style-name="Source_20_Text"><text:span text:style-name="T25"><text:s text:c="14"/></text:span></text:span><text:span text:style-name="Source_20_Text"><text:span text:style-name="T26">SUM</text:span></text:span><text:span text:style-name="Source_20_Text"><text:span text:style-name="T24">(</text:span></text:span><text:span text:style-name="Source_20_Text"><text:span text:style-name="T23">CASE</text:span></text:span><text:span text:style-name="Source_20_Text"><text:span text:style-name="T24"> </text:span></text:span><text:span text:style-name="Source_20_Text"><text:span text:style-name="T23">WHEN</text:span></text:span><text:span text:style-name="Source_20_Text"><text:span text:style-name="T24"> categoria </text:span></text:span><text:span text:style-name="Source_20_Text"><text:span text:style-name="T23">IN</text:span></text:span><text:span text:style-name="Source_20_Text"><text:span text:style-name="T24"> (</text:span></text:span><text:span text:style-name="Source_20_Text"><text:span text:style-name="T28">'FORNECEDOR'</text:span></text:span><text:span text:style-name="Source_20_Text"><text:span text:style-name="T24">, </text:span></text:span><text:span text:style-name="Source_20_Text"><text:span text:style-name="T28">'SALARIO'</text:span></text:span><text:span text:style-name="Source_20_Text"><text:span text:style-name="T24">)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 </text:span></text:span><text:span text:style-name="Source_20_Text"><text:span text:style-name="T23">THEN</text:span></text:span><text:span text:style-name="Source_20_Text"><text:span text:style-name="T24"> valor </text:span></text:span><text:span text:style-name="Source_20_Text"><text:span text:style-name="T23">ELSE</text:span></text:span><text:span text:style-name="Source_20_Text"><text:span text:style-name="T24"> </text:span></text:span><text:span text:style-name="Source_20_Text"><text:span text:style-name="T34">0</text:span></text:span><text:span text:style-name="Source_20_Text"><text:span text:style-name="T24"> </text:span></text:span><text:span text:style-name="Source_20_Text"><text:span text:style-name="T23">END</text:span></text:span><text:span text:style-name="Source_20_Text"><text:span text:style-name="T24">)) </text:span></text:span><text:span text:style-name="Source_20_Text"><text:span text:style-name="T27">&gt;</text:span></text:span><text:span text:style-name="Source_20_Text"><text:span text:style-name="T24"> </text:span></text:span><text:span text:style-name="Source_20_Text"><text:span text:style-name="T34">5000</text:span></text:span><text:span text:style-name="Source_20_Text"><text:span text:style-name="T24"> </text:span></text:span></text:p>
        <text:p text:style-name="P39"><text:span text:style-name="Source_20_Text"><text:span text:style-name="T25"><text:s text:c="8"/></text:span></text:span><text:span text:style-name="Source_20_Text"><text:span text:style-name="T23">THEN</text:span></text:span><text:span text:style-name="Source_20_Text"><text:span text:style-name="T24"> </text:span></text:span><text:span text:style-name="Source_20_Text"><text:span text:style-name="T28">'ALERTA: NCG Elevada'</text:span></text:span></text:p>
        <text:p text:style-name="P39"><text:span text:style-name="Source_20_Text"><text:span text:style-name="T25"><text:s text:c="8"/></text:span></text:span><text:span text:style-name="Source_20_Text"><text:span text:style-name="T23">ELSE</text:span></text:span><text:span text:style-name="Source_20_Text"><text:span text:style-name="T24"> </text:span></text:span><text:span text:style-name="Source_20_Text"><text:span text:style-name="T28">'SAUDÁVEL'</text:span></text:span></text:p>
        <text:p text:style-name="P39"><text:span text:style-name="Source_20_Text"><text:span text:style-name="T25"><text:s text:c="4"/></text:span></text:span><text:span text:style-name="Source_20_Text"><text:span text:style-name="T23">END</text:span></text:span><text:span text:style-name="Source_20_Text"><text:span text:style-name="T24"> </text:span></text:span><text:span text:style-name="Source_20_Text"><text:span text:style-name="T23">AS</text:span></text:span><text:span text:style-name="Source_20_Text"><text:span text:style-name="T24"> status_empresa</text:span></text:span></text:p>
        <text:p text:style-name="P39"><text:span text:style-name="Source_20_Text"><text:span text:style-name="T23">FROM</text:span></text:span><text:span text:style-name="Source_20_Text"><text:span text:style-name="T24"> lancamentos_operacionais;</text:span></text:span></text:p>
        <text:p text:style-name="P50"/>
        <text:h text:style-name="P36" text:outline-level="3">Como utilizar no seu Sistema?</text:h>
        <text:p text:style-name="P27">Agora, no código do seu software (seja em Python, PHP, Java ou Node.js) <text:span text:style-name="T35">é </text:span>precis<text:span text:style-name="T35">o</text:span> <text:span text:style-name="T32">da </text:span>lógica: </text:p>
        <text:p text:style-name="P37">SQL</text:p>
        <text:p text:style-name="P38"><text:span text:style-name="Source_20_Text"><text:span text:style-name="T23">SELECT</text:span></text:span><text:span text:style-name="Source_20_Text"><text:span text:style-name="T24"> </text:span></text:span><text:span text:style-name="Source_20_Text"><text:span text:style-name="T27">*</text:span></text:span><text:span text:style-name="Source_20_Text"><text:span text:style-name="T24"> </text:span></text:span><text:span text:style-name="Source_20_Text"><text:span text:style-name="T23">FROM</text:span></text:span><text:span text:style-name="Source_20_Text"><text:span text:style-name="T24"> v_dashboard_financeiro;</text:span></text:span></text:p>
        <text:h text:style-name="P36" text:outline-level="3">Vantagens dessa Abordagem para SI:</text:h>
        <text:list text:style-name="L11">
          <text:list-item>
            <text:p text:style-name="P62"><text:span text:style-name="T3">Abstração:</text:span> O front-end não precisa conhecer as fórmulas financeiras, ele apenas consome o resultado da View.</text:p>
          </text:list-item>
          <text:list-item>
            <text:p text:style-name="P62"><text:span text:style-name="T3">Segurança:</text:span> Você pode dar permissão para um usuário ver a View, mas não as tabelas brutas de lançamentos.</text:p>
          </text:list-item>
          <text:list-item>
            <text:p text:style-name="P62"><text:span text:style-name="T3">Performance:</text:span> O banco de dados otimiza o plano de execução para essa consulta recorrente.</text:p>
          </text:list-item>
          <text:list-item>
            <text:p text:style-name="P62"><text:soft-page-break/><text:span text:style-name="T3">Padronização:</text:span> Se a regra de cálculo da NCG mudar (ex: inclusão de novos impostos), você altera apenas a View, e todos os relatórios do sistema se atualizam automaticamente.</text:p>
          </text:list-item>
        </text:list>
        <text:p text:style-name="P63"/>
      </text:section>
      <text:p text:style-name="P54"/>
      <text:p text:style-name="P3">Essa é a melhor parte de trabalhar com Bancos de Dados: ver como a inserção de um único registro altera instantaneamente a inteligência do negócio (o Dashboard).</text:p>
      <text:section text:style-name="Sect1" text:name="model-response-message-contentr_4380e87d32d64d34">
        <text:p text:style-name="P9"><text:span text:style-name="T32">S</text:span>imular um cenário onde a empresa faz uma compra alta de estoque a prazo, aumentando sua <text:span text:style-name="T3">Necessidade de Capital de Giro (NCG)</text:span>, enquanto o dinheiro em conta (Tesouraria) diminui devido a um pagamento.</text:p>
        <text:p text:style-name="P50"/>
        <text:h text:style-name="P36" text:outline-level="3">Passo 1: Inserindo Dados de "Risco"</text:h>
        <text:p text:style-name="P27">Execute estes comandos para simular a operação:</text:p>
        <text:p text:style-name="P37">SQL</text:p>
        <text:p text:style-name="P38"><text:span text:style-name="Source_20_Text"><text:span text:style-name="T29">-- 1. Empresa compra R$ 15.000 em estoque para pagar depois.</text:span></text:span></text:p>
        <text:p text:style-name="P39"><text:span text:style-name="Source_20_Text"><text:span text:style-name="T29">-- Isso aumenta drasticamente o Ativo Operacional (estoque parado) e a NCG.</text:span></text:span></text:p>
        <text:p text:style-name="P39"><text:span text:style-name="Source_20_Text"><text:span text:style-name="T23">INSERT</text:span></text:span><text:span text:style-name="Source_20_Text"><text:span text:style-name="T24"> </text:span></text:span><text:span text:style-name="Source_20_Text"><text:span text:style-name="T23">INTO</text:span></text:span><text:span text:style-name="Source_20_Text"><text:span text:style-name="T24"> lancamentos_operacionais (id, entidade_id, categoria, valor, status, data_vencimento)</text:span></text:span></text:p>
        <text:p text:style-name="P39"><text:span text:style-name="Source_20_Text"><text:span text:style-name="T23">VALUES</text:span></text:span><text:span text:style-name="Source_20_Text"><text:span text:style-name="T24"> (</text:span></text:span><text:span text:style-name="Source_20_Text"><text:span text:style-name="T34">103</text:span></text:span><text:span text:style-name="Source_20_Text"><text:span text:style-name="T24">, </text:span></text:span><text:span text:style-name="Source_20_Text"><text:span text:style-name="T34">2</text:span></text:span><text:span text:style-name="Source_20_Text"><text:span text:style-name="T24">, </text:span></text:span><text:span text:style-name="Source_20_Text"><text:span text:style-name="T28">'ESTOQUE'</text:span></text:span><text:span text:style-name="Source_20_Text"><text:span text:style-name="T24">, </text:span></text:span><text:span text:style-name="Source_20_Text"><text:span text:style-name="T34">15000.00</text:span></text:span><text:span text:style-name="Source_20_Text"><text:span text:style-name="T24">, </text:span></text:span><text:span text:style-name="Source_20_Text"><text:span text:style-name="T28">'ABERTO'</text:span></text:span><text:span text:style-name="Source_20_Text"><text:span text:style-name="T24">, </text:span></text:span><text:span text:style-name="Source_20_Text"><text:span text:style-name="T28">'2026-05-01'</text:span></text:span><text:span text:style-name="Source_20_Text"><text:span text:style-name="T24">);</text:span></text:span></text:p>
        <text:p text:style-name="P41"/>
        <text:p text:style-name="P39"><text:span text:style-name="Source_20_Text"><text:span text:style-name="T29">-- 2. Empresa paga uma conta de luz/aluguel de R$ 2.500 que não estava prevista.</text:span></text:span></text:p>
        <text:p text:style-name="P39"><text:span text:style-name="Source_20_Text"><text:span text:style-name="T29">-- Como o saldo anterior era R$ 2.000, a Tesouraria ficará NEGATIVA.</text:span></text:span></text:p>
        <text:p text:style-name="P39"><text:span text:style-name="Source_20_Text"><text:span text:style-name="T23">INSERT</text:span></text:span><text:span text:style-name="Source_20_Text"><text:span text:style-name="T24"> </text:span></text:span><text:span text:style-name="Source_20_Text"><text:span text:style-name="T23">INTO</text:span></text:span><text:span text:style-name="Source_20_Text"><text:span text:style-name="T24"> fluxo_caixa (id, lancamento_id, valor_pago, tipo_movimentacao, data_pagamento)</text:span></text:span></text:p>
        <text:p text:style-name="P39"><text:span text:style-name="Source_20_Text"><text:span text:style-name="T23">VALUES</text:span></text:span><text:span text:style-name="Source_20_Text"><text:span text:style-name="T24"> (</text:span></text:span><text:span text:style-name="Source_20_Text"><text:span text:style-name="T34">2</text:span></text:span><text:span text:style-name="Source_20_Text"><text:span text:style-name="T24">, </text:span></text:span><text:span text:style-name="Source_20_Text"><text:span text:style-name="T23">NULL</text:span></text:span><text:span text:style-name="Source_20_Text"><text:span text:style-name="T24">, </text:span></text:span><text:span text:style-name="Source_20_Text"><text:span text:style-name="T34">2500.00</text:span></text:span><text:span text:style-name="Source_20_Text"><text:span text:style-name="T24">, </text:span></text:span><text:span text:style-name="Source_20_Text"><text:span text:style-name="T28">'S'</text:span></text:span><text:span text:style-name="Source_20_Text"><text:span text:style-name="T24">, </text:span></text:span><text:span text:style-name="Source_20_Text"><text:span text:style-name="T28">'2026-03-26'</text:span></text:span><text:span text:style-name="Source_20_Text"><text:span text:style-name="T24">);</text:span></text:span></text:p>
        <text:p text:style-name="P50"/>
        <text:h text:style-name="P36" text:outline-level="3">Passo 2: Consultando a View (O Dashboard de SI)</text:h>
        <text:p text:style-name="P27">Agora, sem mudar uma linha de código no seu sistema, basta rodar a View novamente:</text:p>
        <text:p text:style-name="P37">SQL</text:p>
        <text:p text:style-name="P38"><text:span text:style-name="Source_20_Text"><text:span text:style-name="T23">SELECT</text:span></text:span><text:span text:style-name="Source_20_Text"><text:span text:style-name="T24"> </text:span></text:span><text:span text:style-name="Source_20_Text"><text:span text:style-name="T27">*</text:span></text:span><text:span text:style-name="Source_20_Text"><text:span text:style-name="T24"> </text:span></text:span><text:span text:style-name="Source_20_Text"><text:span text:style-name="T23">FROM</text:span></text:span><text:span text:style-name="Source_20_Text"><text:span text:style-name="T24"> v_dashboard_financeiro;</text:span></text:span></text:p>
        <text:p text:style-name="P64">O que o sistema deve retornar agora?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header-rows>
            <table:table-row>
              <table:table-cell table:style-name="Tabela2.A1" office:value-type="string">
                <text:p text:style-name="P65"><text:span text:style-name="Strong_20_Emphasis"><text:span text:style-name="T16">Ativo Operacional</text:span></text:span></text:p>
              </table:table-cell>
              <table:table-cell table:style-name="Tabela2.A1" office:value-type="string">
                <text:p text:style-name="P65"><text:span text:style-name="Strong_20_Emphasis"><text:span text:style-name="T16">Passivo Operacional</text:span></text:span></text:p>
              </table:table-cell>
              <table:table-cell table:style-name="Tabela2.A1" office:value-type="string">
                <text:p text:style-name="P65"><text:span text:style-name="Strong_20_Emphasis"><text:span text:style-name="T16">NCG</text:span></text:span></text:p>
              </table:table-cell>
              <table:table-cell table:style-name="Tabela2.A1" office:value-type="string">
                <text:p text:style-name="P65"><text:span text:style-name="Strong_20_Emphasis"><text:span text:style-name="T16">Saldo Tesouraria</text:span></text:span></text:p>
              </table:table-cell>
              <table:table-cell table:style-name="Tabela2.E1" office:value-type="string">
                <text:p text:style-name="P65"><text:span text:style-name="Strong_20_Emphasis"><text:span text:style-name="T16">Status Empresa</text:span></text:span></text:p>
              </table:table-cell>
            </table:table-row>
          </table:table-header-rows>
          <table:table-row>
            <table:table-cell table:style-name="Tabela2.A1" office:value-type="string">
              <text:p text:style-name="P66">25.000,00</text:p>
            </table:table-cell>
            <table:table-cell table:style-name="Tabela2.A1" office:value-type="string">
              <text:p text:style-name="P66">4.000,00</text:p>
            </table:table-cell>
            <table:table-cell table:style-name="Tabela2.A1" office:value-type="string">
              <text:p text:style-name="P66">21.000,00</text:p>
            </table:table-cell>
            <table:table-cell table:style-name="Tabela2.A1" office:value-type="string">
              <text:p text:style-name="P66">-500,00</text:p>
            </table:table-cell>
            <table:table-cell table:style-name="Tabela2.E1" office:value-type="string">
              <text:p text:style-name="P67">RISCO: Dependente de Empréstimos</text:p>
            </table:table-cell>
          </table:table-row>
        </table:table>
        <text:p text:style-name="P50"/>
        <text:h text:style-name="P36" text:outline-level="3">Análise Crítica </text:h>
        <text:list text:style-name="L12">
          <text:list-item>
            <text:p text:style-name="P68"><text:soft-page-break/><text:span text:style-name="T36">Gatilho de Status:</text:span><text:span text:style-name="T21"> Observe que a coluna </text:span><text:span text:style-name="Source_20_Text"><text:span text:style-name="T22">status_empresa</text:span></text:span><text:span text:style-name="T21"> mudou automaticamente. Em um sistema real, isso poderia disparar um </text:span><text:span text:style-name="T36">e-mail de alerta</text:span><text:span text:style-name="T21"> para o gestor ou bloquear novas compras no módulo de suprimentos.</text:span></text:p>
          </text:list-item>
          <text:list-item>
            <text:p text:style-name="P69"><text:span text:style-name="T3">O "Gap" Financeiro:</text:span> A NCG saltou para R$ 21.000. Isso significa que a empresa tem muito valor "no papel" (vendas a receber e estoque), mas não tem liquidez para pagar as contas imediatas.</text:p>
          </text:list-item>
          <text:list-item>
            <text:p text:style-name="P69"><text:span text:style-name="T3">Decisão Baseada em Dados:</text:span> Com essa View, o desenvolvedor de SI entregou uma ferramenta que mostra que a empresa está "morrendo de sede na frente de um copo d'água" (tem ativos, mas não tem caixa).</text:p>
          </text:list-item>
        </text:list>
        <text:p text:style-name="P50"/>
        <text:p text:style-name="P9"><text:s text:c="5"/><text:tab/><text:span text:style-name="T2">Criando </text:span>um <text:span text:style-name="T4">Script de Trigger</text:span><text:span text:style-name="T3"> (Gatilho)</text:span>? <text:tab/>Ele pode, por exemplo, impedir que o usuário insira uma nova compra de estoque se a NCG calculada na View ultrapassar um limite de segurança (ex: R$ 30.000). <text:span text:style-name="T2">Como </text:span><text:span text:style-name="T3">automatizar essa trava de segurança no banco?</text:span></text:p>
      </text:section>
      <text:p text:style-name="P26"><text:span text:style-name="T7"/></text:p>
      <text:section text:style-name="Sect1" text:name="model-response-message-contentr_a324f5ed4d62cb9f">
        <text:p text:style-name="P45"><text:span text:style-name="T7"><text:tab/></text:span><text:span text:style-name="T37">Exemplo de gatilho: o </text:span><text:span text:style-name="T7">gatilho que </text:span><text:span text:style-name="T17">bloqueia</text:span><text:span text:style-name="T7"> novas compras de estoque se a </text:span><text:span text:style-name="T17">Necessidade de Capital de Giro (NCG)</text:span><text:span text:style-name="T7"> da empresa ultrapassar o limite de </text:span><text:span text:style-name="T17">R$ 30.000,00</text:span><text:span text:style-name="T7">.</text:span></text:p>
        <text:h text:style-name="P13" text:outline-level="3"><text:span text:style-name="T7"/></text:h>
        <text:h text:style-name="P14" text:outline-level="3"><text:span text:style-name="T13">Script:</text:span><text:span text:style-name="T7"> Automação de Trava de Segurança (Trigger)</text:span></text:h>
        <text:p text:style-name="P70"><text:span text:style-name="T21"><text:tab/>Este código monitora a tabela de </text:span><text:span text:style-name="Source_20_Text"><text:span text:style-name="T22">lancamentos_operacionais</text:span></text:span><text:span text:style-name="T21">. Antes de cada inserção de uma nova compra de estoque, ele calcula a NCG atual e decide se permite ou não o registro.</text:span></text:p>
        <text:p text:style-name="P37">SQL</text:p>
        <text:p text:style-name="P38"><text:span text:style-name="Source_20_Text"><text:span text:style-name="T24">DELIMITER </text:span></text:span><text:span text:style-name="Source_20_Text"><text:span text:style-name="T27">//</text:span></text:span></text:p>
        <text:p text:style-name="P41"/>
        <text:p text:style-name="P39"><text:span text:style-name="Source_20_Text"><text:span text:style-name="T23">CREATE</text:span></text:span><text:span text:style-name="Source_20_Text"><text:span text:style-name="T24"> </text:span></text:span><text:span text:style-name="Source_20_Text"><text:span text:style-name="T23">TRIGGER</text:span></text:span><text:span text:style-name="Source_20_Text"><text:span text:style-name="T24"> tg_trava_ncg_alta</text:span></text:span></text:p>
        <text:p text:style-name="P39"><text:span text:style-name="Source_20_Text"><text:span text:style-name="T24">BEFORE </text:span></text:span><text:span text:style-name="Source_20_Text"><text:span text:style-name="T23">INSERT</text:span></text:span><text:span text:style-name="Source_20_Text"><text:span text:style-name="T24"> </text:span></text:span><text:span text:style-name="Source_20_Text"><text:span text:style-name="T23">ON</text:span></text:span><text:span text:style-name="Source_20_Text"><text:span text:style-name="T24"> lancamentos_operacionais</text:span></text:span></text:p>
        <text:p text:style-name="P39"><text:span text:style-name="Source_20_Text"><text:span text:style-name="T23">FOR</text:span></text:span><text:span text:style-name="Source_20_Text"><text:span text:style-name="T24"> </text:span></text:span><text:span text:style-name="Source_20_Text"><text:span text:style-name="T23">EACH</text:span></text:span><text:span text:style-name="Source_20_Text"><text:span text:style-name="T24"> </text:span></text:span><text:span text:style-name="Source_20_Text"><text:span text:style-name="T23">ROW</text:span></text:span></text:p>
        <text:p text:style-name="P39"><text:span text:style-name="Source_20_Text"><text:span text:style-name="T23">BEGIN</text:span></text:span></text:p>
        <text:p text:style-name="P39"><text:span text:style-name="Source_20_Text"><text:span text:style-name="T25"><text:s text:c="4"/></text:span></text:span><text:span text:style-name="Source_20_Text"><text:span text:style-name="T23">DECLARE</text:span></text:span><text:span text:style-name="Source_20_Text"><text:span text:style-name="T24"> v_ncg_atual </text:span></text:span><text:span text:style-name="Source_20_Text"><text:span text:style-name="T23">DECIMAL</text:span></text:span><text:span text:style-name="Source_20_Text"><text:span text:style-name="T24">(</text:span></text:span><text:span text:style-name="Source_20_Text"><text:span text:style-name="T34">10</text:span></text:span><text:span text:style-name="Source_20_Text"><text:span text:style-name="T24">,</text:span></text:span><text:span text:style-name="Source_20_Text"><text:span text:style-name="T34">2</text:span></text:span><text:span text:style-name="Source_20_Text"><text:span text:style-name="T24">);</text:span></text:span></text:p>
        <text:p text:style-name="P41"/>
        <text:p text:style-name="P39"><text:span text:style-name="Source_20_Text"><text:span text:style-name="T25"><text:s text:c="4"/></text:span></text:span><text:span text:style-name="Source_20_Text"><text:span text:style-name="T29">-- 1. Calcula a NCG atual somando o que já existe no banco</text:span></text:span></text:p>
        <text:p text:style-name="P39"><text:span text:style-name="Source_20_Text"><text:span text:style-name="T25"><text:s text:c="4"/></text:span></text:span><text:span text:style-name="Source_20_Text"><text:span text:style-name="T23">SELECT</text:span></text:span><text:span text:style-name="Source_20_Text"><text:span text:style-name="T24"> </text:span></text:span></text:p>
        <text:p text:style-name="P39"><text:span text:style-name="Source_20_Text"><text:span text:style-name="T25"><text:s text:c="8"/></text:span></text:span><text:span text:style-name="Source_20_Text"><text:span text:style-name="T26">SUM</text:span></text:span><text:span text:style-name="Source_20_Text"><text:span text:style-name="T24">(</text:span></text:span><text:span text:style-name="Source_20_Text"><text:span text:style-name="T23">CASE</text:span></text:span><text:span text:style-name="Source_20_Text"><text:span text:style-name="T24"> </text:span></text:span><text:span text:style-name="Source_20_Text"><text:span text:style-name="T23">WHEN</text:span></text:span><text:span text:style-name="Source_20_Text"><text:span text:style-name="T24"> categoria </text:span></text:span><text:span text:style-name="Source_20_Text"><text:span text:style-name="T23">IN</text:span></text:span><text:span text:style-name="Source_20_Text"><text:span text:style-name="T24"> (</text:span></text:span><text:span text:style-name="Source_20_Text"><text:span text:style-name="T28">'VENDA'</text:span></text:span><text:span text:style-name="Source_20_Text"><text:span text:style-name="T24">, </text:span></text:span><text:span text:style-name="Source_20_Text"><text:span text:style-name="T28">'ESTOQUE'</text:span></text:span><text:span text:style-name="Source_20_Text"><text:span text:style-name="T24">)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 </text:span></text:span><text:span text:style-name="Source_20_Text"><text:span text:style-name="T23">THEN</text:span></text:span><text:span text:style-name="Source_20_Text"><text:span text:style-name="T24"> valor </text:span></text:span><text:span text:style-name="Source_20_Text"><text:span text:style-name="T23">ELSE</text:span></text:span><text:span text:style-name="Source_20_Text"><text:span text:style-name="T24"> </text:span></text:span><text:span text:style-name="Source_20_Text"><text:span text:style-name="T34">0</text:span></text:span><text:span text:style-name="Source_20_Text"><text:span text:style-name="T24"> </text:span></text:span><text:span text:style-name="Source_20_Text"><text:span text:style-name="T23">END</text:span></text:span><text:span text:style-name="Source_20_Text"><text:span text:style-name="T24">) </text:span></text:span><text:span text:style-name="Source_20_Text"><text:span text:style-name="T27">-</text:span></text:span></text:p>
        <text:p text:style-name="P39"><text:span text:style-name="Source_20_Text"><text:span text:style-name="T25"><text:s text:c="8"/></text:span></text:span><text:span text:style-name="Source_20_Text"><text:span text:style-name="T26">SUM</text:span></text:span><text:span text:style-name="Source_20_Text"><text:span text:style-name="T24">(</text:span></text:span><text:span text:style-name="Source_20_Text"><text:span text:style-name="T23">CASE</text:span></text:span><text:span text:style-name="Source_20_Text"><text:span text:style-name="T24"> </text:span></text:span><text:span text:style-name="Source_20_Text"><text:span text:style-name="T23">WHEN</text:span></text:span><text:span text:style-name="Source_20_Text"><text:span text:style-name="T24"> categoria </text:span></text:span><text:span text:style-name="Source_20_Text"><text:span text:style-name="T23">IN</text:span></text:span><text:span text:style-name="Source_20_Text"><text:span text:style-name="T24"> (</text:span></text:span><text:span text:style-name="Source_20_Text"><text:span text:style-name="T28">'FORNECEDOR'</text:span></text:span><text:span text:style-name="Source_20_Text"><text:span text:style-name="T24">, </text:span></text:span><text:span text:style-name="Source_20_Text"><text:span text:style-name="T28">'SALARIO'</text:span></text:span><text:span text:style-name="Source_20_Text"><text:span text:style-name="T24">) </text:span></text:span><text:span text:style-name="Source_20_Text"><text:span text:style-name="T23">AND</text:span></text:span><text:span text:style-name="Source_20_Text"><text:span text:style-name="T24"> status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ABERTO'</text:span></text:span><text:span text:style-name="Source_20_Text"><text:span text:style-name="T24"> </text:span></text:span><text:span text:style-name="Source_20_Text"><text:span text:style-name="T23">THEN</text:span></text:span><text:span text:style-name="Source_20_Text"><text:span text:style-name="T24"> valor </text:span></text:span><text:span text:style-name="Source_20_Text"><text:span text:style-name="T23">ELSE</text:span></text:span><text:span text:style-name="Source_20_Text"><text:span text:style-name="T24"> </text:span></text:span><text:span text:style-name="Source_20_Text"><text:span text:style-name="T34">0</text:span></text:span><text:span text:style-name="Source_20_Text"><text:span text:style-name="T24"> </text:span></text:span><text:span text:style-name="Source_20_Text"><text:span text:style-name="T23">END</text:span></text:span><text:span text:style-name="Source_20_Text"><text:span text:style-name="T24">)</text:span></text:span></text:p>
        <text:p text:style-name="P39"><text:span text:style-name="Source_20_Text"><text:span text:style-name="T25"><text:s text:c="4"/></text:span></text:span><text:span text:style-name="Source_20_Text"><text:span text:style-name="T23">INTO</text:span></text:span><text:span text:style-name="Source_20_Text"><text:span text:style-name="T24"> v_ncg_atual</text:span></text:span></text:p>
        <text:p text:style-name="P39"><text:span text:style-name="Source_20_Text"><text:span text:style-name="T25"><text:s text:c="4"/></text:span></text:span><text:span text:style-name="Source_20_Text"><text:span text:style-name="T23">FROM</text:span></text:span><text:span text:style-name="Source_20_Text"><text:span text:style-name="T24"> lancamentos_operacionais;</text:span></text:span></text:p>
        <text:p text:style-name="P41"/>
        <text:p text:style-name="P39"><text:span text:style-name="Source_20_Text"><text:span text:style-name="T25"><text:s text:c="4"/></text:span></text:span><text:span text:style-name="Source_20_Text"><text:span text:style-name="T29">-- 2. Regra de Negócio: Se a NCG for maior que 30 mil e o novo item for ESTOQUE</text:span></text:span></text:p>
        <text:p text:style-name="P39"><text:span text:style-name="Source_20_Text"><text:span text:style-name="T25"><text:s text:c="4"/></text:span></text:span><text:span text:style-name="Source_20_Text"><text:span text:style-name="T24">IF (v_ncg_atual </text:span></text:span><text:span text:style-name="Source_20_Text"><text:span text:style-name="T27">+</text:span></text:span><text:span text:style-name="Source_20_Text"><text:span text:style-name="T24"> NEW.valor </text:span></text:span><text:span text:style-name="Source_20_Text"><text:span text:style-name="T27">&gt;</text:span></text:span><text:span text:style-name="Source_20_Text"><text:span text:style-name="T24"> </text:span></text:span><text:span text:style-name="Source_20_Text"><text:span text:style-name="T34">30000.00</text:span></text:span><text:span text:style-name="Source_20_Text"><text:span text:style-name="T24">) </text:span></text:span><text:span text:style-name="Source_20_Text"><text:span text:style-name="T23">AND</text:span></text:span><text:span text:style-name="Source_20_Text"><text:span text:style-name="T24"> (NEW.categoria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ESTOQUE'</text:span></text:span><text:span text:style-name="Source_20_Text"><text:span text:style-name="T24">) </text:span></text:span><text:span text:style-name="Source_20_Text"><text:span text:style-name="T23">THEN</text:span></text:span></text:p>
        <text:p text:style-name="P39"><text:span text:style-name="Source_20_Text"><text:span text:style-name="T25"><text:s text:c="8"/></text:span></text:span><text:span text:style-name="Source_20_Text"><text:span text:style-name="T24">SIGNAL </text:span></text:span><text:span text:style-name="Source_20_Text"><text:span text:style-name="T23">SQLSTATE</text:span></text:span><text:span text:style-name="Source_20_Text"><text:span text:style-name="T24"> </text:span></text:span><text:span text:style-name="Source_20_Text"><text:span text:style-name="T28">'45000'</text:span></text:span><text:span text:style-name="Source_20_Text"><text:span text:style-name="T24"> </text:span></text:span></text:p>
        <text:p text:style-name="P39"><text:span text:style-name="Source_20_Text"><text:span text:style-name="T25"><text:s text:c="8"/></text:span></text:span><text:span text:style-name="Source_20_Text"><text:span text:style-name="T23">SET</text:span></text:span><text:span text:style-name="Source_20_Text"><text:span text:style-name="T24"> MESSAGE_TEXT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'ERRO: Operação Bloqueada. NCG excederá o limite de segurança de R$ 30.000!'</text:span></text:span><text:span text:style-name="Source_20_Text"><text:span text:style-name="T24">;</text:span></text:span></text:p>
        <text:p text:style-name="P39"><text:span text:style-name="Source_20_Text"><text:span text:style-name="T25"><text:s text:c="4"/></text:span></text:span><text:span text:style-name="Source_20_Text"><text:span text:style-name="T23">END</text:span></text:span><text:span text:style-name="Source_20_Text"><text:span text:style-name="T24"> IF;</text:span></text:span></text:p>
        <text:p text:style-name="P39"><text:span text:style-name="Source_20_Text"><text:span text:style-name="T23">END</text:span></text:span><text:span text:style-name="Source_20_Text"><text:span text:style-name="T24">; </text:span></text:span><text:span text:style-name="Source_20_Text"><text:span text:style-name="T27">//</text:span></text:span></text:p>
        <text:p text:style-name="P41"><text:soft-page-break/></text:p>
        <text:p text:style-name="P40"><text:span text:style-name="Source_20_Text"><text:span text:style-name="T24">DELIMIT</text:span></text:span><text:span text:style-name="Source_20_Text"><text:span text:style-name="T38">A</text:span></text:span><text:span text:style-name="Source_20_Text"><text:span text:style-name="T24">R ;</text:span></text:span></text:p>
        <text:h text:style-name="P13" text:outline-level="3"><text:span text:style-name="T7"/></text:h>
        <text:h text:style-name="P71" text:outline-level="3">Testando a Inteligência do Sistema</text:h>
        <text:p text:style-name="P9"><text:span text:style-name="T2">Exemplo: </text:span><text:s/>tentar inserir uma compra de estoque de <text:span text:style-name="T3">R$ 20.000,00</text:span>. Como já tínhamos uma NCG alta de R$ 21.000,00 (da simulação anterior), o sistema deve barrar:</text:p>
        <text:p text:style-name="P37">SQL</text:p>
        <text:p text:style-name="P38"><text:span text:style-name="Source_20_Text"><text:span text:style-name="T29">-- Tentativa de compra que estoura o limite</text:span></text:span></text:p>
        <text:p text:style-name="P39"><text:span text:style-name="Source_20_Text"><text:span text:style-name="T23">INSERT</text:span></text:span><text:span text:style-name="Source_20_Text"><text:span text:style-name="T24"> </text:span></text:span><text:span text:style-name="Source_20_Text"><text:span text:style-name="T23">INTO</text:span></text:span><text:span text:style-name="Source_20_Text"><text:span text:style-name="T24"> lancamentos_operacionais (id, entidade_id, categoria, valor, status, data_vencimento)</text:span></text:span></text:p>
        <text:p text:style-name="P39"><text:span text:style-name="Source_20_Text"><text:span text:style-name="T23">VALUES</text:span></text:span><text:span text:style-name="Source_20_Text"><text:span text:style-name="T24"> (</text:span></text:span><text:span text:style-name="Source_20_Text"><text:span text:style-name="T34">104</text:span></text:span><text:span text:style-name="Source_20_Text"><text:span text:style-name="T24">, </text:span></text:span><text:span text:style-name="Source_20_Text"><text:span text:style-name="T34">2</text:span></text:span><text:span text:style-name="Source_20_Text"><text:span text:style-name="T24">, </text:span></text:span><text:span text:style-name="Source_20_Text"><text:span text:style-name="T28">'ESTOQUE'</text:span></text:span><text:span text:style-name="Source_20_Text"><text:span text:style-name="T24">, </text:span></text:span><text:span text:style-name="Source_20_Text"><text:span text:style-name="T34">20000.00</text:span></text:span><text:span text:style-name="Source_20_Text"><text:span text:style-name="T24">, </text:span></text:span><text:span text:style-name="Source_20_Text"><text:span text:style-name="T28">'ABERTO'</text:span></text:span><text:span text:style-name="Source_20_Text"><text:span text:style-name="T24">, </text:span></text:span><text:span text:style-name="Source_20_Text"><text:span text:style-name="T28">'2026-06-01'</text:span></text:span><text:span text:style-name="Source_20_Text"><text:span text:style-name="T24">);</text:span></text:span></text:p>
        <text:p text:style-name="P64">Resultado esperado no console do banco:</text:p>
        <text:p text:style-name="P72"><text:span text:style-name="Source_20_Text"><text:span text:style-name="T22">Error: ERRO: Operação Bloqueada. NCG excederá o limite de segurança de R$ 30.000!</text:span></text:span></text:p>
        <text:h text:style-name="P13" text:outline-level="3"><text:span text:style-name="T7"/></text:h>
        <text:h text:style-name="P73" text:outline-level="3">O Valor Estratégico para o Profissional de SI</text:h>
        <text:list text:style-name="L13">
          <text:list-item>
            <text:p text:style-name="P74"><text:span text:style-name="T36">Segurança de Dados vs. Segurança de Negócio:</text:span><text:span text:style-name="T21"> Você não está apenas garantindo que o campo </text:span><text:span text:style-name="Source_20_Text"><text:span text:style-name="T22">valor</text:span></text:span><text:span text:style-name="T21"> seja um número; você está garantindo que a empresa não tome uma decisão que comprometa sua sobrevivência.</text:span></text:p>
          </text:list-item>
          <text:list-item>
            <text:p text:style-name="P75"><text:span text:style-name="T3">Redução de Erros no Front-end:</text:span> Mesmo que o desenvolvedor do aplicativo esqueça de colocar essa validação na tela, o Banco de Dados (a "última linha de defesa") impedirá o erro.</text:p>
          </text:list-item>
          <text:list-item>
            <text:p text:style-name="P75"><text:span text:style-name="T3">Auditabilidade:</text:span> O uso de Triggers deixa claro para os auditores que existem regras sistêmicas rígidas governando os processos financeiros.</text:p>
          </text:list-item>
        </text:list>
        <text:p text:style-name="P50"/>
        <text:h text:style-name="P36" text:outline-level="3">Resumo da Aula Prática</text:h>
        <text:list text:style-name="L14">
          <text:list-item>
            <text:p text:style-name="P76">A <text:span text:style-name="T3">Estrutura de Tabelas</text:span> (Modelagem Relacional).</text:p>
          </text:list-item>
          <text:list-item>
            <text:p text:style-name="P76">A <text:span text:style-name="T3">Lógica de Cálculo</text:span> (SQL Avançado).</text:p>
          </text:list-item>
          <text:list-item>
            <text:p text:style-name="P76">A <text:span text:style-name="T3">Visualização de Indicadores</text:span> (Views de BI).</text:p>
          </text:list-item>
          <text:list-item>
            <text:p text:style-name="P76">A <text:span text:style-name="T3">Automação de Regras</text:span> (Triggers de Segurança).</text:p>
          </text:list-item>
        </text:list>
        <text:p text:style-name="P77"/>
      </text:section>
      <text:p text:style-name="P54"/>
      <text:p text:style-name="P78">REFERÊNCIAS</text:p>
      <text:p text:style-name="P54"/>
      <text:p text:style-name="P79"><text:span text:style-name="T39">FLEURIET, Michel; KEHDY, Ricardo; BLANC, Georges.</text:span> <text:span text:style-name="T5">O Modelo Dinâmico de Gestão Financeira</text:span>. 2. ed. Rio de Janeiro: Elsevier, 2003.</text:p>
      <text:p text:style-name="P79"><text:span text:style-name="T39">GITMAN, Lawrence J.</text:span> <text:span text:style-name="T5">Princípios de Administração Financeira</text:span>. 14. ed. São Paulo: Pearson Education, 2017.</text:p>
      <text:p text:style-name="P79"><text:span text:style-name="T39">HIGGINS, Robert C.</text:span> <text:span text:style-name="T5">Análise para a Gestão Financeira</text:span>. 10. ed. Porto Alegre: AMGH, 2014.</text:p>
      <text:p text:style-name="P79"><text:span text:style-name="T39">ROSS, Stephen A.; WESTERFIELD, Randolph W.; JAFFE, Jeffrey.</text:span> <text:span text:style-name="T5">Administração Financeira: Corporate Finance</text:span>. 10. ed. Porto Alegre: AMGH, 2015.</text:p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6T14:18:35.621936400</meta:creation-date>
    <dc:date>2026-03-26T14:25:04.571550300</dc:date>
    <meta:editing-duration>PT6M29S</meta:editing-duration>
    <meta:editing-cycles>1</meta:editing-cycles>
    <meta:generator>LibreOffice/25.8.5.2$Windows_X86_64 LibreOffice_project/9c8b85f387cc00a89945a79c9e6239f32e450ac2</meta:generator>
    <meta:document-statistic meta:table-count="2" meta:image-count="1" meta:object-count="0" meta:page-count="11" meta:paragraph-count="294" meta:word-count="3037" meta:character-count="19611" meta:non-whitespace-character-count="16524"/>
  </office:meta>
</office:document-meta>
</file>