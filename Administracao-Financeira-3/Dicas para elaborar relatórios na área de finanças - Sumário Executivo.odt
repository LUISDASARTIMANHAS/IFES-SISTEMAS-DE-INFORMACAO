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Google Sans Text" svg:font-family="'Google Sans Text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master-page-name="">
      <style:paragraph-properties fo:margin-left="0cm" fo:margin-right="0cm" fo:margin-top="0cm" fo:margin-bottom="0.265cm" style:contextual-spacing="false" fo:line-height="114%" fo:text-align="center" style:justify-single-word="false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 Text"/>
    </style:style>
    <style:style style:name="P2" style:family="paragraph" style:parent-style-name="Text_20_body">
      <style:paragraph-properties fo:margin-left="0cm" fo:margin-right="0cm" fo:margin-top="0cm" fo:margin-bottom="0.265cm" style:contextual-spacing="false" fo:line-height="114%" fo:text-align="center" style:justify-single-word="false" fo:orphans="2" fo:widows="2" fo:text-indent="0cm" style:auto-text-indent="false" fo:padding="0cm" fo:border="none"/>
      <style:text-properties fo:color="#1f1f1f" loext:opacity="100%" style:font-name="Google Sans Text" fo:font-size="14pt" fo:font-weight="bold" style:font-size-asian="14pt" style:font-weight-asian="bold" style:font-size-complex="14pt" style:font-weight-complex="bold"/>
    </style:style>
    <style:style style:name="P3" style:family="paragraph" style:parent-style-name="Text_20_body">
      <style:paragraph-properties fo:margin-left="0cm" fo:margin-right="0cm" fo:margin-top="0cm" fo:margin-bottom="0.265cm" style:contextual-spacing="false" fo:line-height="114%" fo:text-align="justify" style:justify-single-word="false" fo:orphans="2" fo:widows="2" fo:text-indent="0cm" style:auto-text-indent="false" fo:padding="0cm" fo:border="none"/>
      <style:text-properties fo:color="#1f1f1f" loext:opacity="100%" style:font-name="Google Sans Text"/>
    </style:style>
    <style:style style:name="P4" style:family="paragraph" style:parent-style-name="Text_20_body">
      <style:paragraph-properties fo:margin-left="0cm" fo:margin-right="0cm" fo:margin-top="0cm" fo:margin-bottom="0.265cm" style:contextual-spacing="false" fo:line-height="114%" fo:text-align="center" style:justify-single-word="false" fo:orphans="2" fo:widows="2" fo:text-indent="0cm" style:auto-text-indent="false" fo:padding="0cm" fo:border="none"/>
      <style:text-properties fo:color="#1f1f1f" loext:opacity="100%" style:font-name="Google Sans Text"/>
    </style:style>
    <style:style style:name="P5" style:family="paragraph" style:parent-style-name="Text_20_body">
      <style:paragraph-properties fo:margin-left="0cm" fo:margin-right="0cm" fo:margin-top="0cm" fo:margin-bottom="0.265cm" style:contextual-spacing="false" fo:line-height="114%" fo:text-align="center" style:justify-single-word="false" fo:orphans="2" fo:widows="2" fo:text-indent="0cm" style:auto-text-indent="false" fo:padding="0cm" fo:border="none"/>
      <style:text-properties fo:color="#1f1f1f" loext:opacity="100%" style:font-name="Google Sans Text" fo:font-weight="bold" officeooo:paragraph-rsid="0007d3ac" style:font-weight-asian="bold" style:font-weight-complex="bold"/>
    </style:style>
    <style:style style:name="P6" style:family="paragraph" style:parent-style-name="Text_20_body">
      <style:paragraph-properties fo:margin-left="0cm" fo:margin-right="0cm" fo:margin-top="0cm" fo:margin-bottom="0.265cm" style:contextual-spacing="false" fo:line-height="114%" fo:text-align="start" style:justify-single-word="false" fo:orphans="2" fo:widows="2" fo:text-indent="0cm" style:auto-text-indent="false" fo:padding="0cm" fo:border="none"/>
      <style:text-properties fo:color="#1f1f1f" loext:opacity="100%" style:font-name="Google Sans Text" fo:font-weight="bold" officeooo:paragraph-rsid="0007d3ac" style:font-weight-asian="bold" style:font-weight-complex="bold"/>
    </style:style>
    <style:style style:name="P7" style:family="paragraph" style:parent-style-name="Text_20_body">
      <style:paragraph-properties fo:margin-left="0cm" fo:margin-right="0cm" fo:margin-top="0cm" fo:margin-bottom="0.265cm" style:contextual-spacing="false" fo:line-height="114%" fo:text-align="start" style:justify-single-word="false" fo:orphans="2" fo:widows="2" fo:text-indent="0cm" style:auto-text-indent="false" fo:padding="0cm" fo:border="none"/>
      <style:text-properties fo:color="#1f1f1f" loext:opacity="100%" style:font-name="Google Sans Text" fo:font-weight="bol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Análise financeira de empresas</text:p>
      <text:p text:style-name="P3"><text:tab/><text:span text:style-name="T1">Um relatório técnico de finanças é um documento analítico que traduz números em diagnósticos sobre a saúde e o desempenho de uma organização. Para que ele seja robusto e útil para a tomada de decisão, deve seguir uma estrutura lógica que combine dados quantitativos e interpretação qualitativa.</text:span></text:p>
      <text:p text:style-name="P4"/>
      <text:p text:style-name="P5">Elementos essenciais que compõem um relatório profissional:</text:p>
      <text:p text:style-name="P6">1. Sumário Executivo</text:p>
      <text:p text:style-name="P3"><text:tab/>Esta é a seção mais importante para gestores e investidores. Deve ser uma síntese de uma página que apresenta:</text:p>
      <text:p text:style-name="P3"><text:s text:c="4"/>• Conclusão Geral: A empresa está saudável, em risco ou em expansão? </text:p>
      <text:p text:style-name="P3"><text:s text:c="4"/>• Principais Achados: Destaque os pontos mais críticos da análise.</text:p>
      <text:p text:style-name="P3"><text:s text:c="4"/>• Recomendação: O que deve ser feito (ex: reduzir endividamento, investir em novos ativos etc.).</text:p>
      <text:p text:style-name="P4"><text:s text:c="4"/>• </text:p>
      <text:p text:style-name="P7">2. Contextualização e Análise Setorial</text:p>
      <text:p text:style-name="P3"><text:tab/>Antes de olhar para os números, é preciso entender onde a empresa está inserida.</text:p>
      <text:p text:style-name="P3"><text:s text:c="4"/>• Análise Macro: Inflação, taxas de juros (Selic) e câmbio.</text:p>
      <text:p text:style-name="P3"><text:s text:c="4"/></text:p>
      <text:p text:style-name="P3"><text:s text:c="4"/>• Análise Setorial: Como a empresa se comporta em relação aos concorrentes e às tendências de mercado.</text:p>
      <text:p text:style-name="P3"><text:s text:c="4"/></text:p>
      <text:p text:style-name="P3">Pode usar as Modelo de Porter, Análise SWOT, Matriz BCG, por exemplo.</text:p>
      <text:p text:style-name="P3"><text:s text:c="4"/></text:p>
      <text:p text:style-name="P7">3. Análise do Desempenho Operacional (DRE)</text:p>
      <text:p text:style-name="P3"><text:tab/>Aqui o foco é a capacidade da empresa de gerar lucro através de suas atividades principais.</text:p>
      <text:p text:style-name="P3"><text:s text:c="4"/>• Análise Vertical e Horizontal: Evolução das receitas, custos e despesas ao longo do tempo.</text:p>
      <text:p text:style-name="P3"><text:s text:c="4"/>• Margens de Lucratividade: Margem Bruta, Margem EBITDA e Margem Líquida.</text:p>
      <text:p text:style-name="P3"><text:s text:c="2"/></text:p>
      <text:p text:style-name="P7">4. Estrutura Patrimonial e Liquidez (Balanço Patrimonial)</text:p>
      <text:p text:style-name="P3"><text:soft-page-break/><text:tab/>Análise da solidez financeira e da capacidade de pagamento.</text:p>
      <text:p text:style-name="P3"><text:s text:c="4"/>• Índices de Liquidez: Corrente, Seca e Geral.</text:p>
      <text:p text:style-name="P3"><text:s text:c="4"/>• Endividamento: Relação entre Capital de Terceiros e Capital Próprio.</text:p>
      <text:p text:style-name="P3"><text:s text:c="4"/>• Giro de Ativos: Eficiência na utilização dos recursos.</text:p>
      <text:p text:style-name="P3"><text:s text:c="4"/>• </text:p>
      <text:p text:style-name="P7">5. Ciclo Financeiro e Gestão de Capital de Giro</text:p>
      <text:p text:style-name="P3"><text:tab/>Fundamental para entender a dinâmica de caixa no curto prazo.</text:p>
      <text:p text:style-name="P3"><text:s text:c="4"/>• Prazos Médios: Recebimento de vendas, estocagem e pagamento a fornecedores.</text:p>
      <text:p text:style-name="P3"><text:s text:c="4"/>• Necessidade de Capital de Giro (NCG): Avaliação se a operação "consome" ou "gera" caixa.</text:p>
      <text:p text:style-name="P3"><text:s text:c="6"/></text:p>
      <text:p text:style-name="P7">6. Análise de Rentabilidade e Retorno</text:p>
      <text:p text:style-name="P3"><text:tab/>Verificação de quanto o capital investido está rendendo.</text:p>
      <text:p text:style-name="P3"><text:s text:c="4"/>• ROI (Retorno sobre Investimento): Eficácia geral das aplicações de recursos.</text:p>
      <text:p text:style-name="P3"><text:s text:c="4"/>• ROE (Retorno sobre o Patrimônio Líquido): Quanto os acionistas estão ganhando.</text:p>
      <text:p text:style-name="P3"><text:s text:c="4"/>• Modelo DuPont: Decomposição do ROE para identificar se o retorno vem da margem, do giro ou da alavancagem.</text:p>
      <text:p text:style-name="P3"><text:s text:c="4"/>• </text:p>
      <text:p text:style-name="P7">7. Fluxo de Caixa</text:p>
      <text:p text:style-name="P3"><text:tab/>Diferenciação entre o lucro contábil e o dinheiro que efetivamente entra e sai.</text:p>
      <text:p text:style-name="P3"><text:s text:c="4"/>• Fluxo de Caixa Operacional: A operação se sustenta sozinha?</text:p>
      <text:p text:style-name="P3"><text:s text:c="7"/>• Fluxo de Caixa Livre: Quanto sobra para dividendos ou novos investimentos após as despesas de capital (CAPEX).</text:p>
      <text:p text:style-name="P3"><text:s text:c="2"/></text:p>
      <text:p text:style-name="P7">8. Conclusões e Recomendações (Diagnóstico)</text:p>
      <text:p text:style-name="P4">O fechamento do relatório deve conectar todos os pontos anteriores.</text:p>
      <text:p text:style-name="P3"><text:s text:c="4"/>• Matriz SWOT Financeira: Forças, Fraquezas, Oportunidades e Ameaças sob a ótica financeira.</text:p>
      <text:p text:style-name="P3"><text:s text:c="4"/>• Projeções: Breve cenário sobre o que se espera para o próximo período com base nos dados atuais.</text:p>
      <text:p text:style-name="P4"/>
      <text:p text:style-name="P4"><text:soft-page-break/>Dica Profissional: Utilize gráficos de barras para comparações temporais e gráficos de pizza para composição de custos ou receitas. A clareza visual é tão importante quanto a precisão dos cálculos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Google Sans Text" svg:font-family="'Google Sans Text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4-30T10:12:08.860053500</meta:creation-date>
    <dc:date>2026-04-30T10:55:14.065913000</dc:date>
    <meta:editing-duration>PT32M1S</meta:editing-duration>
    <meta:editing-cycles>1</meta:editing-cycles>
    <meta:document-statistic meta:table-count="0" meta:image-count="0" meta:object-count="0" meta:page-count="3" meta:paragraph-count="49" meta:word-count="491" meta:character-count="3205" meta:non-whitespace-character-count="2632"/>
    <meta:generator>LibreOffice/25.8.5.2$Windows_X86_64 LibreOffice_project/9c8b85f387cc00a89945a79c9e6239f32e450ac2</meta:generator>
  </office:meta>
</office:document-meta>
</file>