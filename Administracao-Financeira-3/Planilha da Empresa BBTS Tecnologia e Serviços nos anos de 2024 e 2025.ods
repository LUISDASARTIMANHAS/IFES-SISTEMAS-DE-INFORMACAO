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71cm"/>
    </style:style>
    <style:style style:name="co3" style:family="table-column">
      <style:table-column-properties fo:break-before="auto" style:column-width="9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5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value-type" style:repeat-content="false" fo:wrap-option="wrap" fo:border="0.06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ados de 2025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13" table:default-cell-style-name="ce4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15"/>
        </table:table-row>
        <table:table-row table:style-name="ro2">
          <table:table-cell/>
          <table:table-cell table:style-name="ce1" office:value-type="string" calcext:value-type="string">
            <text:p>Conta</text:p>
          </table:table-cell>
          <table:table-cell table:style-name="ce1" office:value-type="string" calcext:value-type="string">
            <text:p>1T_2025</text:p>
          </table:table-cell>
          <table:table-cell table:style-name="ce1" office:value-type="string" calcext:value-type="string">
            <text:p>2T_2025</text:p>
          </table:table-cell>
          <table:table-cell table:style-name="ce1" office:value-type="string" calcext:value-type="string">
            <text:p>3T_2025</text:p>
          </table:table-cell>
          <table:table-cell table:style-name="ce1" office:value-type="string" calcext:value-type="string">
            <text:p>4T_2025</text:p>
          </table:table-cell>
          <table:table-cell table:style-name="ce1" office:value-type="string" calcext:value-type="string">
            <text:p>Anual_2025</text:p>
          </table:table-cell>
          <table:table-cell table:style-name="ce1" office:value-type="string" calcext:value-type="string">
            <text:p>AV_1T_2025</text:p>
          </table:table-cell>
          <table:table-cell table:style-name="ce1" office:value-type="string" calcext:value-type="string">
            <text:p>AV_2T_2025</text:p>
          </table:table-cell>
          <table:table-cell table:style-name="ce1" office:value-type="string" calcext:value-type="string">
            <text:p>AV_3T_2025</text:p>
          </table:table-cell>
          <table:table-cell table:style-name="ce1" office:value-type="string" calcext:value-type="string">
            <text:p>AV_4T_2025</text:p>
          </table:table-cell>
          <table:table-cell table:style-name="ce1" office:value-type="string" calcext:value-type="string">
            <text:p>AV_Anual_2025</text:p>
          </table:table-cell>
          <table:table-cell table:style-name="ce1" office:value-type="string" calcext:value-type="string">
            <text:p>AH_3T_para_4T_Nominal</text:p>
          </table:table-cell>
          <table:table-cell table:style-name="ce1" office:value-type="string" calcext:value-type="string">
            <text:p>AH_3T_para_4T_Percentual</text:p>
          </table:table-cell>
          <table:table-cell table:style-name="ce1" office:value-type="string" calcext:value-type="string">
            <text:p>AH_4T_vs_Anual_Percentu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eita Operacional Líquida</text:p>
          </table:table-cell>
          <table:table-cell office:value-type="float" office:value="412181" calcext:value-type="float">
            <text:p>412181</text:p>
          </table:table-cell>
          <table:table-cell office:value-type="float" office:value="470413" calcext:value-type="float">
            <text:p>470413</text:p>
          </table:table-cell>
          <table:table-cell office:value-type="float" office:value="473137" calcext:value-type="float">
            <text:p>473137</text:p>
          </table:table-cell>
          <table:table-cell office:value-type="float" office:value="492283" calcext:value-type="float">
            <text:p>492283</text:p>
          </table:table-cell>
          <table:table-cell office:value-type="float" office:value="1848014" calcext:value-type="float">
            <text:p>1848014</text:p>
          </table:table-cell>
          <table:table-cell table:number-columns-repeated="5" office:value-type="string" calcext:value-type="string">
            <text:p>100.0</text:p>
          </table:table-cell>
          <table:table-cell office:value-type="float" office:value="19146" calcext:value-type="float">
            <text:p>19146</text:p>
          </table:table-cell>
          <table:table-cell office:value-type="string" calcext:value-type="string">
            <text:p>04.05</text:p>
          </table:table-cell>
          <table:table-cell office:value-type="string" calcext:value-type="string">
            <text:p>26.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stos dos Produtos e Serviços</text:p>
          </table:table-cell>
          <table:table-cell office:value-type="float" office:value="-315835" calcext:value-type="float">
            <text:p>-315835</text:p>
          </table:table-cell>
          <table:table-cell office:value-type="float" office:value="-317382" calcext:value-type="float">
            <text:p>-317382</text:p>
          </table:table-cell>
          <table:table-cell office:value-type="float" office:value="-326998" calcext:value-type="float">
            <text:p>-326998</text:p>
          </table:table-cell>
          <table:table-cell office:value-type="float" office:value="-332162" calcext:value-type="float">
            <text:p>-332162</text:p>
          </table:table-cell>
          <table:table-cell office:value-type="float" office:value="-1292377" calcext:value-type="float">
            <text:p>-1292377</text:p>
          </table:table-cell>
          <table:table-cell office:value-type="string" calcext:value-type="string">
            <text:p>-76.63</text:p>
          </table:table-cell>
          <table:table-cell office:value-type="string" calcext:value-type="string">
            <text:p>-67.47</text:p>
          </table:table-cell>
          <table:table-cell office:value-type="string" calcext:value-type="string">
            <text:p>-69.11</text:p>
          </table:table-cell>
          <table:table-cell office:value-type="string" calcext:value-type="string">
            <text:p>-67.47</text:p>
          </table:table-cell>
          <table:table-cell office:value-type="string" calcext:value-type="string">
            <text:p>-69.93</text:p>
          </table:table-cell>
          <table:table-cell office:value-type="float" office:value="-5164" calcext:value-type="float">
            <text:p>-5164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25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cro Bruto</text:p>
          </table:table-cell>
          <table:table-cell office:value-type="float" office:value="96346" calcext:value-type="float">
            <text:p>96346</text:p>
          </table:table-cell>
          <table:table-cell office:value-type="float" office:value="153031" calcext:value-type="float">
            <text:p>153031</text:p>
          </table:table-cell>
          <table:table-cell office:value-type="float" office:value="146139" calcext:value-type="float">
            <text:p>146139</text:p>
          </table:table-cell>
          <table:table-cell office:value-type="float" office:value="160121" calcext:value-type="float">
            <text:p>160121</text:p>
          </table:table-cell>
          <table:table-cell office:value-type="float" office:value="555637" calcext:value-type="float">
            <text:p>555637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32.53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32.53</text:p>
          </table:table-cell>
          <table:table-cell office:value-type="string" calcext:value-type="string">
            <text:p>30.07</text:p>
          </table:table-cell>
          <table:table-cell office:value-type="float" office:value="13982" calcext:value-type="float">
            <text:p>13982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28.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pesas Gerais e Administrativas</text:p>
          </table:table-cell>
          <table:table-cell office:value-type="float" office:value="-80991" calcext:value-type="float">
            <text:p>-80991</text:p>
          </table:table-cell>
          <table:table-cell office:value-type="float" office:value="-70418" calcext:value-type="float">
            <text:p>-70418</text:p>
          </table:table-cell>
          <table:table-cell office:value-type="float" office:value="-88362" calcext:value-type="float">
            <text:p>-88362</text:p>
          </table:table-cell>
          <table:table-cell office:value-type="float" office:value="-107436" calcext:value-type="float">
            <text:p>-107436</text:p>
          </table:table-cell>
          <table:table-cell office:value-type="float" office:value="-347207" calcext:value-type="float">
            <text:p>-347207</text:p>
          </table:table-cell>
          <table:table-cell office:value-type="string" calcext:value-type="string">
            <text:p>-19.65</text:p>
          </table:table-cell>
          <table:table-cell office:value-type="string" calcext:value-type="string">
            <text:p>-14.97</text:p>
          </table:table-cell>
          <table:table-cell office:value-type="string" calcext:value-type="string">
            <text:p>-18.68</text:p>
          </table:table-cell>
          <table:table-cell office:value-type="string" calcext:value-type="string">
            <text:p>-21.82</text:p>
          </table:table-cell>
          <table:table-cell office:value-type="string" calcext:value-type="string">
            <text:p>-18.79</text:p>
          </table:table-cell>
          <table:table-cell office:value-type="float" office:value="-19074" calcext:value-type="float">
            <text:p>-19074</text:p>
          </table:table-cell>
          <table:table-cell office:value-type="string" calcext:value-type="string">
            <text:p>21.59</text:p>
          </table:table-cell>
          <table:table-cell office:value-type="string" calcext:value-type="string">
            <text:p>30.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ingências</text:p>
          </table:table-cell>
          <table:table-cell office:value-type="float" office:value="411" calcext:value-type="float">
            <text:p>411</text:p>
          </table:table-cell>
          <table:table-cell office:value-type="float" office:value="-1520" calcext:value-type="float">
            <text:p>-1520</text:p>
          </table:table-cell>
          <table:table-cell office:value-type="float" office:value="-2182" calcext:value-type="float">
            <text:p>-2182</text:p>
          </table:table-cell>
          <table:table-cell office:value-type="float" office:value="-8671" calcext:value-type="float">
            <text:p>-8671</text:p>
          </table:table-cell>
          <table:table-cell office:value-type="float" office:value="-11962" calcext:value-type="float">
            <text:p>-1196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0.32</text:p>
          </table:table-cell>
          <table:table-cell office:value-type="string" calcext:value-type="string">
            <text:p>-0.46</text:p>
          </table:table-cell>
          <table:table-cell office:value-type="string" calcext:value-type="string">
            <text:p>-1.76</text:p>
          </table:table-cell>
          <table:table-cell office:value-type="string" calcext:value-type="string">
            <text:p>-0.65</text:p>
          </table:table-cell>
          <table:table-cell office:value-type="float" office:value="-6489" calcext:value-type="float">
            <text:p>-6489</text:p>
          </table:table-cell>
          <table:table-cell office:value-type="string" calcext:value-type="string">
            <text:p>297.39</text:p>
          </table:table-cell>
          <table:table-cell office:value-type="string" calcext:value-type="string">
            <text:p>72.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visões para Perdas</text:p>
          </table:table-cell>
          <table:table-cell office:value-type="float" office:value="15" calcext:value-type="float">
            <text:p>15</text:p>
          </table:table-cell>
          <table:table-cell office:value-type="float" office:value="-87" calcext:value-type="float">
            <text:p>-87</text:p>
          </table:table-cell>
          <table:table-cell office:value-type="float" office:value="-217" calcext:value-type="float">
            <text:p>-217</text:p>
          </table:table-cell>
          <table:table-cell office:value-type="float" office:value="-157" calcext:value-type="float">
            <text:p>-157</text:p>
          </table:table-cell>
          <table:table-cell office:value-type="float" office:value="-446" calcext:value-type="float">
            <text:p>-4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27.65</text:p>
          </table:table-cell>
          <table:table-cell office:value-type="string" calcext:value-type="string">
            <text:p>35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ras (Despesas) Receitas Operacionais</text:p>
          </table:table-cell>
          <table:table-cell office:value-type="float" office:value="4785" calcext:value-type="float">
            <text:p>4785</text:p>
          </table:table-cell>
          <table:table-cell office:value-type="float" office:value="-4937" calcext:value-type="float">
            <text:p>-4937</text:p>
          </table:table-cell>
          <table:table-cell office:value-type="float" office:value="-17058" calcext:value-type="float">
            <text:p>-17058</text:p>
          </table:table-cell>
          <table:table-cell office:value-type="float" office:value="3001" calcext:value-type="float">
            <text:p>3001</text:p>
          </table:table-cell>
          <table:table-cell office:value-type="float" office:value="-14209" calcext:value-type="float">
            <text:p>-14209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1.05</text:p>
          </table:table-cell>
          <table:table-cell office:value-type="string" calcext:value-type="string">
            <text:p>-3.6</text:p>
          </table:table-cell>
          <table:table-cell office:value-type="string" calcext:value-type="string">
            <text:p>-0.61</text:p>
          </table:table-cell>
          <table:table-cell office:value-type="string" calcext:value-type="string">
            <text:p>-0.77</text:p>
          </table:table-cell>
          <table:table-cell office:value-type="float" office:value="20059" calcext:value-type="float">
            <text:p>20059</text:p>
          </table:table-cell>
          <table:table-cell office:value-type="string" calcext:value-type="string">
            <text:p>-117.6</text:p>
          </table:table-cell>
          <table:table-cell office:value-type="string" calcext:value-type="string">
            <text:p>21.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ado antes das Receitas e Despesas Financeiras (EBIT)</text:p>
          </table:table-cell>
          <table:table-cell office:value-type="float" office:value="20566" calcext:value-type="float">
            <text:p>20566</text:p>
          </table:table-cell>
          <table:table-cell office:value-type="float" office:value="76069" calcext:value-type="float">
            <text:p>76069</text:p>
          </table:table-cell>
          <table:table-cell office:value-type="float" office:value="38320" calcext:value-type="float">
            <text:p>38320</text:p>
          </table:table-cell>
          <table:table-cell office:value-type="float" office:value="46858" calcext:value-type="float">
            <text:p>46858</text:p>
          </table:table-cell>
          <table:table-cell office:value-type="float" office:value="181813" calcext:value-type="float">
            <text:p>181813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.17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84</text:p>
          </table:table-cell>
          <table:table-cell office:value-type="float" office:value="8538" calcext:value-type="float">
            <text:p>8538</text:p>
          </table:table-cell>
          <table:table-cell office:value-type="string" calcext:value-type="string">
            <text:p>22.28</text:p>
          </table:table-cell>
          <table:table-cell office:value-type="string" calcext:value-type="string">
            <text:p>25.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eitas Financeiras</text:p>
          </table:table-cell>
          <table:table-cell office:value-type="float" office:value="24644" calcext:value-type="float">
            <text:p>24644</text:p>
          </table:table-cell>
          <table:table-cell office:value-type="float" office:value="16800" calcext:value-type="float">
            <text:p>16800</text:p>
          </table:table-cell>
          <table:table-cell office:value-type="float" office:value="19407" calcext:value-type="float">
            <text:p>19407</text:p>
          </table:table-cell>
          <table:table-cell office:value-type="float" office:value="15636" calcext:value-type="float">
            <text:p>15636</text:p>
          </table:table-cell>
          <table:table-cell office:value-type="float" office:value="76487" calcext:value-type="float">
            <text:p>76487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4.14</text:p>
          </table:table-cell>
          <table:table-cell office:value-type="float" office:value="-3771" calcext:value-type="float">
            <text:p>-3771</text:p>
          </table:table-cell>
          <table:table-cell office:value-type="string" calcext:value-type="string">
            <text:p>-19.43</text:p>
          </table:table-cell>
          <table:table-cell office:value-type="string" calcext:value-type="string">
            <text:p>20.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pesas Financeiras</text:p>
          </table:table-cell>
          <table:table-cell office:value-type="float" office:value="-8536" calcext:value-type="float">
            <text:p>-8536</text:p>
          </table:table-cell>
          <table:table-cell office:value-type="float" office:value="-9374" calcext:value-type="float">
            <text:p>-9374</text:p>
          </table:table-cell>
          <table:table-cell office:value-type="float" office:value="-8694" calcext:value-type="float">
            <text:p>-8694</text:p>
          </table:table-cell>
          <table:table-cell office:value-type="float" office:value="-14732" calcext:value-type="float">
            <text:p>-14732</text:p>
          </table:table-cell>
          <table:table-cell office:value-type="float" office:value="-41336" calcext:value-type="float">
            <text:p>-41336</text:p>
          </table:table-cell>
          <table:table-cell office:value-type="string" calcext:value-type="string">
            <text:p>-2.07</text:p>
          </table:table-cell>
          <table:table-cell office:value-type="string" calcext:value-type="string">
            <text:p>-1.99</text:p>
          </table:table-cell>
          <table:table-cell office:value-type="string" calcext:value-type="string">
            <text:p>-1.84</text:p>
          </table:table-cell>
          <table:table-cell office:value-type="string" calcext:value-type="string">
            <text:p>-2.99</text:p>
          </table:table-cell>
          <table:table-cell office:value-type="string" calcext:value-type="string">
            <text:p>-2.24</text:p>
          </table:table-cell>
          <table:table-cell office:value-type="float" office:value="-6038" calcext:value-type="float">
            <text:p>-6038</text:p>
          </table:table-cell>
          <table:table-cell office:value-type="string" calcext:value-type="string">
            <text:p>69.45</text:p>
          </table:table-cell>
          <table:table-cell office:value-type="string" calcext:value-type="string">
            <text:p>35.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ado antes dos Tributos sobre o Lucro (EBT)</text:p>
          </table:table-cell>
          <table:table-cell office:value-type="float" office:value="36674" calcext:value-type="float">
            <text:p>36674</text:p>
          </table:table-cell>
          <table:table-cell office:value-type="float" office:value="83495" calcext:value-type="float">
            <text:p>83495</text:p>
          </table:table-cell>
          <table:table-cell office:value-type="float" office:value="49033" calcext:value-type="float">
            <text:p>49033</text:p>
          </table:table-cell>
          <table:table-cell office:value-type="float" office:value="47762" calcext:value-type="float">
            <text:p>47762</text:p>
          </table:table-cell>
          <table:table-cell office:value-type="float" office:value="216964" calcext:value-type="float">
            <text:p>216964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1.74</text:p>
          </table:table-cell>
          <table:table-cell office:value-type="float" office:value="-1271" calcext:value-type="float">
            <text:p>-1271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22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osto de Renda e Contribuição Social</text:p>
          </table:table-cell>
          <table:table-cell office:value-type="float" office:value="-12542" calcext:value-type="float">
            <text:p>-12542</text:p>
          </table:table-cell>
          <table:table-cell office:value-type="float" office:value="-28108" calcext:value-type="float">
            <text:p>-28108</text:p>
          </table:table-cell>
          <table:table-cell office:value-type="float" office:value="-10230" calcext:value-type="float">
            <text:p>-10230</text:p>
          </table:table-cell>
          <table:table-cell office:value-type="float" office:value="-10673" calcext:value-type="float">
            <text:p>-10673</text:p>
          </table:table-cell>
          <table:table-cell office:value-type="float" office:value="-61553" calcext:value-type="float">
            <text:p>-61553</text:p>
          </table:table-cell>
          <table:table-cell office:value-type="string" calcext:value-type="string">
            <text:p>-3.04</text:p>
          </table:table-cell>
          <table:table-cell office:value-type="string" calcext:value-type="string">
            <text:p>-5.98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-3.33</text:p>
          </table:table-cell>
          <table:table-cell office:value-type="float" office:value="-443" calcext:value-type="float">
            <text:p>-443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17.3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Lucro Líquido do Período</text:p>
          </table:table-cell>
          <table:table-cell table:style-name="ce5" office:value-type="float" office:value="24132" calcext:value-type="float">
            <text:p>24132</text:p>
          </table:table-cell>
          <table:table-cell table:style-name="ce5" office:value-type="float" office:value="55387" calcext:value-type="float">
            <text:p>55387</text:p>
          </table:table-cell>
          <table:table-cell table:style-name="ce5" office:value-type="float" office:value="38803" calcext:value-type="float">
            <text:p>38803</text:p>
          </table:table-cell>
          <table:table-cell table:style-name="ce5" office:value-type="float" office:value="37089" calcext:value-type="float">
            <text:p>37089</text:p>
          </table:table-cell>
          <table:table-cell table:style-name="ce5" office:value-type="float" office:value="155411" calcext:value-type="float">
            <text:p>155411</text:p>
          </table:table-cell>
          <table:table-cell table:style-name="ce5" office:value-type="string" calcext:value-type="string">
            <text:p>5.85</text:p>
          </table:table-cell>
          <table:table-cell table:style-name="ce5" office:value-type="string" calcext:value-type="string">
            <text:p>11.77</text:p>
          </table:table-cell>
          <table:table-cell table:style-name="ce5" office:value-type="string" calcext:value-type="string">
            <text:p>8.2</text:p>
          </table:table-cell>
          <table:table-cell table:style-name="ce5" office:value-type="string" calcext:value-type="string">
            <text:p>7.53</text:p>
          </table:table-cell>
          <table:table-cell table:style-name="ce5" office:value-type="string" calcext:value-type="string">
            <text:p>8.41</text:p>
          </table:table-cell>
          <table:table-cell table:style-name="ce5" office:value-type="float" office:value="-1714" calcext:value-type="float">
            <text:p>-1714</text:p>
          </table:table-cell>
          <table:table-cell table:style-name="ce5" office:value-type="string" calcext:value-type="string">
            <text:p>-4.42</text:p>
          </table:table-cell>
          <table:table-cell table:style-name="ce5" office:value-type="string" calcext:value-type="string">
            <text:p>23.86</text:p>
          </table:table-cell>
          <table:table-cell/>
        </table:table-row>
      </table:table>
      <table:table table:name="Dados de 2024 " table:style-name="ta1">
        <table:table-column table:style-name="co1" table:default-cell-style-name="Default"/>
        <table:table-column table:style-name="co3" table:default-cell-style-name="ce2"/>
        <table:table-column table:style-name="co1" table:number-columns-repeated="13" table:default-cell-style-name="ce2"/>
        <table:table-column table:style-name="co1" table:default-cell-style-name="ce6"/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Em milhares de R$</text:p>
          </table:table-cell>
          <table:table-cell table:style-name="Default" table:number-columns-repeated="13"/>
        </table:table-row>
        <table:table-row table:style-name="ro2">
          <table:table-cell/>
          <table:table-cell table:style-name="ce1" office:value-type="string" calcext:value-type="string">
            <text:p>Conta</text:p>
          </table:table-cell>
          <table:table-cell table:style-name="ce1" office:value-type="string" calcext:value-type="string">
            <text:p>1T_2024</text:p>
          </table:table-cell>
          <table:table-cell table:style-name="ce1" office:value-type="string" calcext:value-type="string">
            <text:p>2T_2024</text:p>
          </table:table-cell>
          <table:table-cell table:style-name="ce1" office:value-type="string" calcext:value-type="string">
            <text:p>3T_2024</text:p>
          </table:table-cell>
          <table:table-cell table:style-name="ce1" office:value-type="string" calcext:value-type="string">
            <text:p>4T_2024</text:p>
          </table:table-cell>
          <table:table-cell table:style-name="ce1" office:value-type="string" calcext:value-type="string">
            <text:p>Anual_2024</text:p>
          </table:table-cell>
          <table:table-cell table:style-name="ce1" office:value-type="string" calcext:value-type="string">
            <text:p>AV_1T_2024</text:p>
          </table:table-cell>
          <table:table-cell table:style-name="ce1" office:value-type="string" calcext:value-type="string">
            <text:p>AV_2T_2024</text:p>
          </table:table-cell>
          <table:table-cell table:style-name="ce1" office:value-type="string" calcext:value-type="string">
            <text:p>AV_3T_2024</text:p>
          </table:table-cell>
          <table:table-cell table:style-name="ce1" office:value-type="string" calcext:value-type="string">
            <text:p>AV_4T_2024</text:p>
          </table:table-cell>
          <table:table-cell table:style-name="ce1" office:value-type="string" calcext:value-type="string">
            <text:p>AV_Anual_2024</text:p>
          </table:table-cell>
          <table:table-cell table:style-name="ce1" office:value-type="string" calcext:value-type="string">
            <text:p>AH_3T_para_4T_Nominal</text:p>
          </table:table-cell>
          <table:table-cell table:style-name="ce1" office:value-type="string" calcext:value-type="string">
            <text:p>AH_3T_para_4T_Percentual</text:p>
          </table:table-cell>
          <table:table-cell table:style-name="ce1" office:value-type="string" calcext:value-type="string">
            <text:p>AH_4T_vs_Anual_Percentu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eita Operacional Líquida</text:p>
          </table:table-cell>
          <table:table-cell office:value-type="float" office:value="414213" calcext:value-type="float">
            <text:p>414213</text:p>
          </table:table-cell>
          <table:table-cell office:value-type="float" office:value="437326" calcext:value-type="float">
            <text:p>437326</text:p>
          </table:table-cell>
          <table:table-cell office:value-type="float" office:value="451843" calcext:value-type="float">
            <text:p>451843</text:p>
          </table:table-cell>
          <table:table-cell office:value-type="float" office:value="458410" calcext:value-type="float">
            <text:p>458410</text:p>
          </table:table-cell>
          <table:table-cell office:value-type="float" office:value="1761792" calcext:value-type="float">
            <text:p>1761792</text:p>
          </table:table-cell>
          <table:table-cell table:number-columns-repeated="5" office:value-type="string" calcext:value-type="string">
            <text:p>100.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6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stos dos Produtos e Serviços</text:p>
          </table:table-cell>
          <table:table-cell office:value-type="float" office:value="-293901" calcext:value-type="float">
            <text:p>-293901</text:p>
          </table:table-cell>
          <table:table-cell office:value-type="float" office:value="-300663" calcext:value-type="float">
            <text:p>-300663</text:p>
          </table:table-cell>
          <table:table-cell office:value-type="float" office:value="-339731" calcext:value-type="float">
            <text:p>-339731</text:p>
          </table:table-cell>
          <table:table-cell office:value-type="float" office:value="-272553" calcext:value-type="float">
            <text:p>-272553</text:p>
          </table:table-cell>
          <table:table-cell office:value-type="float" office:value="-1206848" calcext:value-type="float">
            <text:p>-1206848</text:p>
          </table:table-cell>
          <table:table-cell office:value-type="string" calcext:value-type="string">
            <text:p>-70.95</text:p>
          </table:table-cell>
          <table:table-cell office:value-type="string" calcext:value-type="string">
            <text:p>-68.75</text:p>
          </table:table-cell>
          <table:table-cell office:value-type="string" calcext:value-type="string">
            <text:p>-75.19</text:p>
          </table:table-cell>
          <table:table-cell office:value-type="string" calcext:value-type="string">
            <text:p>-59.46</text:p>
          </table:table-cell>
          <table:table-cell office:value-type="string" calcext:value-type="string">
            <text:p>-68.5</text:p>
          </table:table-cell>
          <table:table-cell office:value-type="float" office:value="67178" calcext:value-type="float">
            <text:p>67178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-22.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cro Bruto</text:p>
          </table:table-cell>
          <table:table-cell office:value-type="float" office:value="120312" calcext:value-type="float">
            <text:p>120312</text:p>
          </table:table-cell>
          <table:table-cell office:value-type="float" office:value="136663" calcext:value-type="float">
            <text:p>136663</text:p>
          </table:table-cell>
          <table:table-cell office:value-type="float" office:value="112112" calcext:value-type="float">
            <text:p>112112</text:p>
          </table:table-cell>
          <table:table-cell office:value-type="float" office:value="185857" calcext:value-type="float">
            <text:p>185857</text:p>
          </table:table-cell>
          <table:table-cell office:value-type="float" office:value="554944" calcext:value-type="float">
            <text:p>554944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40.54</text:p>
          </table:table-cell>
          <table:table-cell office:value-type="string" calcext:value-type="string">
            <text:p>31.5</text:p>
          </table:table-cell>
          <table:table-cell office:value-type="float" office:value="73745" calcext:value-type="float">
            <text:p>73745</text:p>
          </table:table-cell>
          <table:table-cell office:value-type="string" calcext:value-type="string">
            <text:p>65.78</text:p>
          </table:table-cell>
          <table:table-cell office:value-type="string" calcext:value-type="string">
            <text:p>33.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pesas Gerais e Administrativas</text:p>
          </table:table-cell>
          <table:table-cell office:value-type="float" office:value="-62006" calcext:value-type="float">
            <text:p>-62006</text:p>
          </table:table-cell>
          <table:table-cell office:value-type="float" office:value="-65429" calcext:value-type="float">
            <text:p>-65429</text:p>
          </table:table-cell>
          <table:table-cell office:value-type="float" office:value="-77487" calcext:value-type="float">
            <text:p>-77487</text:p>
          </table:table-cell>
          <table:table-cell office:value-type="float" office:value="-85709" calcext:value-type="float">
            <text:p>-85709</text:p>
          </table:table-cell>
          <table:table-cell office:value-type="float" office:value="-290631" calcext:value-type="float">
            <text:p>-290631</text:p>
          </table:table-cell>
          <table:table-cell office:value-type="string" calcext:value-type="string">
            <text:p>-14.97</text:p>
          </table:table-cell>
          <table:table-cell office:value-type="string" calcext:value-type="string">
            <text:p>-14.96</text:p>
          </table:table-cell>
          <table:table-cell office:value-type="string" calcext:value-type="string">
            <text:p>-17.15</text:p>
          </table:table-cell>
          <table:table-cell office:value-type="string" calcext:value-type="string">
            <text:p>-18.7</text:p>
          </table:table-cell>
          <table:table-cell office:value-type="string" calcext:value-type="string">
            <text:p>-16.5</text:p>
          </table:table-cell>
          <table:table-cell office:value-type="float" office:value="-8222" calcext:value-type="float">
            <text:p>-8222</text:p>
          </table:table-cell>
          <table:table-cell office:value-type="string" calcext:value-type="string">
            <text:p>-10.61</text:p>
          </table:table-cell>
          <table:table-cell office:value-type="string" calcext:value-type="string">
            <text:p>-29.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ingências</text:p>
          </table:table-cell>
          <table:table-cell office:value-type="float" office:value="2167" calcext:value-type="float">
            <text:p>2167</text:p>
          </table:table-cell>
          <table:table-cell office:value-type="float" office:value="-585" calcext:value-type="float">
            <text:p>-585</text:p>
          </table:table-cell>
          <table:table-cell office:value-type="float" office:value="-4914" calcext:value-type="float">
            <text:p>-4914</text:p>
          </table:table-cell>
          <table:table-cell office:value-type="float" office:value="-5098" calcext:value-type="float">
            <text:p>-5098</text:p>
          </table:table-cell>
          <table:table-cell office:value-type="float" office:value="-8430" calcext:value-type="float">
            <text:p>-843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-0.13</text:p>
          </table:table-cell>
          <table:table-cell office:value-type="string" calcext:value-type="string">
            <text:p>-1.09</text:p>
          </table:table-cell>
          <table:table-cell office:value-type="string" calcext:value-type="string">
            <text:p>-1.11</text:p>
          </table:table-cell>
          <table:table-cell office:value-type="string" calcext:value-type="string">
            <text:p>-0.48</text:p>
          </table:table-cell>
          <table:table-cell office:value-type="float" office:value="-184" calcext:value-type="float">
            <text:p>-184</text:p>
          </table:table-cell>
          <table:table-cell office:value-type="string" calcext:value-type="string">
            <text:p>-3.74</text:p>
          </table:table-cell>
          <table:table-cell office:value-type="string" calcext:value-type="string">
            <text:p>-60.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visões para Perdas</text:p>
          </table:table-cell>
          <table:table-cell office:value-type="float" office:value="-235" calcext:value-type="float">
            <text:p>-235</text:p>
          </table:table-cell>
          <table:table-cell office:value-type="float" office:value="-131" calcext:value-type="float">
            <text:p>-131</text:p>
          </table:table-cell>
          <table:table-cell office:value-type="float" office:value="-169" calcext:value-type="float">
            <text:p>-169</text:p>
          </table:table-cell>
          <table:table-cell office:value-type="float" office:value="16" calcext:value-type="float">
            <text:p>16</text:p>
          </table:table-cell>
          <table:table-cell office:value-type="float" office:value="-519" calcext:value-type="float">
            <text:p>-519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09.47</text:p>
          </table:table-cell>
          <table:table-cell office:value-type="string" calcext:value-type="string">
            <text:p>03.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ras (Despesas) Receitas Operacionais</text:p>
          </table:table-cell>
          <table:table-cell office:value-type="float" office:value="7352" calcext:value-type="float">
            <text:p>7352</text:p>
          </table:table-cell>
          <table:table-cell office:value-type="float" office:value="-38" calcext:value-type="float">
            <text:p>-38</text:p>
          </table:table-cell>
          <table:table-cell office:value-type="float" office:value="-155" calcext:value-type="float">
            <text:p>-155</text:p>
          </table:table-cell>
          <table:table-cell office:value-type="float" office:value="-13605" calcext:value-type="float">
            <text:p>-13605</text:p>
          </table:table-cell>
          <table:table-cell office:value-type="float" office:value="-6445" calcext:value-type="float">
            <text:p>-6445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2.97</text:p>
          </table:table-cell>
          <table:table-cell office:value-type="string" calcext:value-type="string">
            <text:p>-0.37</text:p>
          </table:table-cell>
          <table:table-cell office:value-type="float" office:value="-13450" calcext:value-type="float">
            <text:p>-13450</text:p>
          </table:table-cell>
          <table:table-cell office:value-type="string" calcext:value-type="string">
            <text:p>-8677.42</text:p>
          </table:table-cell>
          <table:table-cell office:value-type="string" calcext:value-type="string">
            <text:p>-211.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ado antes das Receitas e Despesas Financeiras (EBIT)</text:p>
          </table:table-cell>
          <table:table-cell office:value-type="float" office:value="67590" calcext:value-type="float">
            <text:p>67590</text:p>
          </table:table-cell>
          <table:table-cell office:value-type="float" office:value="70480" calcext:value-type="float">
            <text:p>70480</text:p>
          </table:table-cell>
          <table:table-cell office:value-type="float" office:value="29387" calcext:value-type="float">
            <text:p>29387</text:p>
          </table:table-cell>
          <table:table-cell office:value-type="float" office:value="81461" calcext:value-type="float">
            <text:p>81461</text:p>
          </table:table-cell>
          <table:table-cell office:value-type="float" office:value="248919" calcext:value-type="float">
            <text:p>248919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7.77</text:p>
          </table:table-cell>
          <table:table-cell office:value-type="string" calcext:value-type="string">
            <text:p>14.13</text:p>
          </table:table-cell>
          <table:table-cell office:value-type="float" office:value="52074" calcext:value-type="float">
            <text:p>52074</text:p>
          </table:table-cell>
          <table:table-cell office:value-type="string" calcext:value-type="string">
            <text:p>177.2</text:p>
          </table:table-cell>
          <table:table-cell office:value-type="string" calcext:value-type="string">
            <text:p>32.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eitas Financeiras</text:p>
          </table:table-cell>
          <table:table-cell office:value-type="float" office:value="6942" calcext:value-type="float">
            <text:p>6942</text:p>
          </table:table-cell>
          <table:table-cell office:value-type="float" office:value="8246" calcext:value-type="float">
            <text:p>8246</text:p>
          </table:table-cell>
          <table:table-cell office:value-type="float" office:value="10314" calcext:value-type="float">
            <text:p>10314</text:p>
          </table:table-cell>
          <table:table-cell office:value-type="float" office:value="10042" calcext:value-type="float">
            <text:p>10042</text:p>
          </table:table-cell>
          <table:table-cell office:value-type="float" office:value="35544" calcext:value-type="float">
            <text:p>35544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2.02</text:p>
          </table:table-cell>
          <table:table-cell office:value-type="float" office:value="-272" calcext:value-type="float">
            <text:p>-272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28.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pesas Financeiras</text:p>
          </table:table-cell>
          <table:table-cell office:value-type="float" office:value="-6649" calcext:value-type="float">
            <text:p>-6649</text:p>
          </table:table-cell>
          <table:table-cell office:value-type="float" office:value="-6733" calcext:value-type="float">
            <text:p>-6733</text:p>
          </table:table-cell>
          <table:table-cell office:value-type="float" office:value="-6685" calcext:value-type="float">
            <text:p>-6685</text:p>
          </table:table-cell>
          <table:table-cell office:value-type="float" office:value="-7853" calcext:value-type="float">
            <text:p>-7853</text:p>
          </table:table-cell>
          <table:table-cell office:value-type="float" office:value="-27921" calcext:value-type="float">
            <text:p>-27921</text:p>
          </table:table-cell>
          <table:table-cell office:value-type="string" calcext:value-type="string">
            <text:p>-1.61</text:p>
          </table:table-cell>
          <table:table-cell office:value-type="string" calcext:value-type="string">
            <text:p>-1.54</text:p>
          </table:table-cell>
          <table:table-cell office:value-type="string" calcext:value-type="string">
            <text:p>-1.48</text:p>
          </table:table-cell>
          <table:table-cell office:value-type="string" calcext:value-type="string">
            <text:p>-1.71</text:p>
          </table:table-cell>
          <table:table-cell office:value-type="string" calcext:value-type="string">
            <text:p>-1.58</text:p>
          </table:table-cell>
          <table:table-cell office:value-type="float" office:value="-1168" calcext:value-type="float">
            <text:p>-1168</text:p>
          </table:table-cell>
          <table:table-cell office:value-type="string" calcext:value-type="string">
            <text:p>-17.47</text:p>
          </table:table-cell>
          <table:table-cell office:value-type="string" calcext:value-type="string">
            <text:p>-28.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ado antes dos Tributos sobre o Lucro (EBT)</text:p>
          </table:table-cell>
          <table:table-cell office:value-type="float" office:value="67883" calcext:value-type="float">
            <text:p>67883</text:p>
          </table:table-cell>
          <table:table-cell office:value-type="float" office:value="71993" calcext:value-type="float">
            <text:p>71993</text:p>
          </table:table-cell>
          <table:table-cell office:value-type="float" office:value="33016" calcext:value-type="float">
            <text:p>33016</text:p>
          </table:table-cell>
          <table:table-cell office:value-type="float" office:value="83650" calcext:value-type="float">
            <text:p>83650</text:p>
          </table:table-cell>
          <table:table-cell office:value-type="float" office:value="256542" calcext:value-type="float">
            <text:p>256542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16.46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14.56</text:p>
          </table:table-cell>
          <table:table-cell office:value-type="float" office:value="50634" calcext:value-type="float">
            <text:p>50634</text:p>
          </table:table-cell>
          <table:table-cell office:value-type="string" calcext:value-type="string">
            <text:p>153.36</text:p>
          </table:table-cell>
          <table:table-cell office:value-type="string" calcext:value-type="string">
            <text:p>32.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osto de Renda e Contribuição Social</text:p>
          </table:table-cell>
          <table:table-cell office:value-type="float" office:value="-22721" calcext:value-type="float">
            <text:p>-22721</text:p>
          </table:table-cell>
          <table:table-cell office:value-type="float" office:value="-24451" calcext:value-type="float">
            <text:p>-24451</text:p>
          </table:table-cell>
          <table:table-cell office:value-type="float" office:value="-6915" calcext:value-type="float">
            <text:p>-6915</text:p>
          </table:table-cell>
          <table:table-cell office:value-type="float" office:value="-30108" calcext:value-type="float">
            <text:p>-30108</text:p>
          </table:table-cell>
          <table:table-cell office:value-type="float" office:value="-84195" calcext:value-type="float">
            <text:p>-84195</text:p>
          </table:table-cell>
          <table:table-cell office:value-type="string" calcext:value-type="string">
            <text:p>-5.49</text:p>
          </table:table-cell>
          <table:table-cell office:value-type="string" calcext:value-type="string">
            <text:p>-5.59</text:p>
          </table:table-cell>
          <table:table-cell office:value-type="string" calcext:value-type="string">
            <text:p>-1.53</text:p>
          </table:table-cell>
          <table:table-cell office:value-type="string" calcext:value-type="string">
            <text:p>-6.57</text:p>
          </table:table-cell>
          <table:table-cell office:value-type="string" calcext:value-type="string">
            <text:p>-4.78</text:p>
          </table:table-cell>
          <table:table-cell office:value-type="float" office:value="-23193" calcext:value-type="float">
            <text:p>-23193</text:p>
          </table:table-cell>
          <table:table-cell office:value-type="string" calcext:value-type="string">
            <text:p>-335.4</text:p>
          </table:table-cell>
          <table:table-cell office:value-type="string" calcext:value-type="string">
            <text:p>-35.7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Lucro Líquido do Período</text:p>
          </table:table-cell>
          <table:table-cell table:style-name="ce3" office:value-type="float" office:value="45162" calcext:value-type="float">
            <text:p>45162</text:p>
          </table:table-cell>
          <table:table-cell table:style-name="ce3" office:value-type="float" office:value="47542" calcext:value-type="float">
            <text:p>47542</text:p>
          </table:table-cell>
          <table:table-cell table:style-name="ce3" office:value-type="float" office:value="26101" calcext:value-type="float">
            <text:p>26101</text:p>
          </table:table-cell>
          <table:table-cell table:style-name="ce3" office:value-type="float" office:value="53542" calcext:value-type="float">
            <text:p>53542</text:p>
          </table:table-cell>
          <table:table-cell table:style-name="ce3" office:value-type="float" office:value="172347" calcext:value-type="float">
            <text:p>172347</text:p>
          </table:table-cell>
          <table:table-cell table:style-name="ce3" office:value-type="string" calcext:value-type="string">
            <text:p>10.9</text:p>
          </table:table-cell>
          <table:table-cell table:style-name="ce3" office:value-type="string" calcext:value-type="string">
            <text:p>10.87</text:p>
          </table:table-cell>
          <table:table-cell table:style-name="ce3" office:value-type="string" calcext:value-type="string">
            <text:p>5.78</text:p>
          </table:table-cell>
          <table:table-cell table:style-name="ce3" office:value-type="string" calcext:value-type="string">
            <text:p>11.68</text:p>
          </table:table-cell>
          <table:table-cell table:style-name="ce3" office:value-type="string" calcext:value-type="string">
            <text:p>9.78</text:p>
          </table:table-cell>
          <table:table-cell table:style-name="ce3" office:value-type="float" office:value="27441" calcext:value-type="float">
            <text:p>27441</text:p>
          </table:table-cell>
          <table:table-cell table:style-name="ce3" office:value-type="string" calcext:value-type="string">
            <text:p>105.13</text:p>
          </table:table-cell>
          <table:table-cell table:style-name="ce3" office:value-type="string" calcext:value-type="string">
            <text:p>31.07</text:p>
          </table:table-cell>
          <table:table-cell/>
        </table:table-row>
      </table:table>
      <table:table table:name="Notas explicativas" table:style-name="ta1"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6" table:default-cell-style-name="ce12"/>
        <table:table-row table:style-name="ro1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7" table:number-rows-spanned="1">
            <text:p>Nota 1</text:p>
          </table:table-cell>
          <table:covered-table-cell table:number-columns-repeated="6"/>
        </table:table-row>
        <table:table-row table:style-name="ro2">
          <table:table-cell table:number-columns-repeated="2"/>
          <table:table-cell office:value-type="string" calcext:value-type="string" table:number-columns-spanned="7" table:number-rows-spanned="1">
            <text:p>A lógica aplicada foi rigorosamente a mesma: isolamento dos três primeiros trimestres discretos e dedução matemática do 4º Trimestre de 2024 (Anual cheia de 12 meses menos o acumulado de 9 meses até o 3T). 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7" table:number-rows-spanned="1">
            <text:p>Nota 2</text:p>
          </table:table-cell>
          <table:covered-table-cell table:number-columns-repeated="6" table:style-name="ce13"/>
        </table:table-row>
        <table:table-row table:style-name="ro3">
          <table:table-cell table:number-columns-repeated="2"/>
          <table:table-cell office:value-type="string" calcext:value-type="string" table:number-columns-spanned="7" table:number-rows-spanned="1">
            <text:p>Valores originais extraídos em milhares de R$. As contas operacionais menores como provisões e contingências foram consolidadas nas linhas de despesas para manter a visualização limpa na tabela, mas estão abertas linha a linha no código do CSV.</text:p>
          </table:table-cell>
          <table:covered-table-cell table:number-columns-repeated="6" table:style-name="ce14"/>
        </table:table-row>
        <table:table-row table:style-name="ro1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7" table:number-rows-spanned="1">
            <text:p>Nota 3</text:p>
          </table:table-cell>
          <table:covered-table-cell table:number-columns-repeated="6" table:style-name="Default"/>
        </table:table-row>
        <table:table-row table:style-name="ro4">
          <table:table-cell table:number-columns-repeated="2"/>
          <table:table-cell table:style-name="ce11" office:value-type="string" calcext:value-type="string" table:number-columns-spanned="7" table:number-rows-spanned="1">
            <text:p>Prompt                                                                                                                                                                Atue como um Analista Financeiro e de Controladoria Sênior, especialista em modelagem de dados e análise de demonstrações contábeis no padrão CVM/CPC. </text:p>
            <text:p/>
            <text:p>Vou fornecer os relatórios financeiros (em PDF, texto ou tabelas) de uma empresa. Preciso que você extraia os dados e monte um banco de dados estruturado focado na Demonstração do Resultado (DRE) ou Balanço Patrimonial, aplicando as seguintes diretrizes corporativas:</text:p>
            <text:p/>
            <text:p>1. ABERTURA CRONOLÓGICA (TRIMESTRES DISCRETOS):</text:p>
            <text:p>- O banco de dados deve conter colunas de tempo isoladas: 1T, 2T, 3T, 4T e o Fechamento Anual (12 meses).</text:p>
            <text:p>- ATENÇÃO À REGRA DE DEDUÇÃO DO 4T: Como os relatórios anuais costumam trazer apenas o acumulado de 12 meses, você deve isolar matematicamente o 4º Trimestre utilizando a fórmula de subtração:</text:p>
            <text:p>  [Valor do 4T Isolado] = [Valor do Ano Cheio (12M)] - [Valor Acumulado até o 3T (9M)]</text:p>
            <text:p/>
            <text:p>2. COLUNAS DE ANÁLISE VERTICAL (AV):</text:p>
            <text:p>- Calcule a Análise Vertical para cada uma das colunas de tempo.</text:p>
            <text:p>- Se for a DRE, utilize como conta-base a "Receita Operacional Líquida" (100%).</text:p>
            <text:p>- Se for o Balanço Patrimonial, utilize o "Ativo Total" (ou Passivo Total) como base (100%).</text:p>
            <text:p/>
            <text:p>3. COLUNAS DE ANÁLISE HORIZONTAL (AH) / VARIAÇÕES:</text:p>
            <text:p>- Inclua colunas para calcular a variação nominal (R$) e percentual (%) de períodos específicos.</text:p>
            <text:p>- Calcule especificamente a variação horizontal entre o 3T e o 4T isolados para captar o comportamento do último trimestre:</text:p>
            <text:p>  Variação Nominal = [Valor 4T] - [Valor 3T]</text:p>
            <text:p>  Variação % = (Variação Nominal / |Valor 3T|) * 100</text:p>
            <text:p>- Inclua também uma coluna mostrando o peso percentual do 4T isolado em relação ao resultado do Ano Cheio ([Valor 4T] / [Valor Anual] * 100).</text:p>
            <text:p/>
            <text:p>4. FORMATO DA SAÍDA:</text:p>
            <text:p>- Organize o banco de dados final em formato de código de tabela estruturado em CSV, utilizando o ponto e vírgula (;) como separador de campos para compatibilidade imediata com o Excel/Google Sheets em português.</text:p>
            <text:p>- Adicione também uma versão em tabela visual (Markdown) resumida no próprio chat para conferência rápida das principais linhas (Receita, Margem, EBIT e Lucro Líquido).</text:p>
            <text:p/>
            <text:p>Confirme se entendeu a lógica de dedução do 4T e a estrutura das colunas de análise. Assim que confirmar, eu enviarei os arquivos/dados para processamento.</text:p>
          </table:table-cell>
          <table:covered-table-cell table:number-columns-repeated="6" table:style-name="ce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21T19:48:02.301000000</meta:creation-date>
    <dc:date>2026-05-21T20:01:56.614000000</dc:date>
    <meta:editing-duration>PT13M53S</meta:editing-duration>
    <meta:editing-cycles>2</meta:editing-cycles>
    <meta:generator>LibreOffice/7.1.4.2$Windows_X86_64 LibreOffice_project/a529a4fab45b75fefc5b6226684193eb000654f6</meta:generator>
    <meta:document-statistic meta:table-count="3" meta:cell-count="399" meta:object-count="0"/>
  </office:meta>
</office:document-meta>
</file>