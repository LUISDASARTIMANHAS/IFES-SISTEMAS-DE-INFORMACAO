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0.599cm" table:align="left"/>
    </style:style>
    <style:style style:name="Tabela1.A" style:family="table-column">
      <style:table-column-properties style:column-width="1.298cm"/>
    </style:style>
    <style:style style:name="Tabela1.B" style:family="table-column">
      <style:table-column-properties style:column-width="1.801cm"/>
    </style:style>
    <style:style style:name="Tabela1.C" style:family="table-column">
      <style:table-column-properties style:column-width="0.944cm"/>
    </style:style>
    <style:style style:name="Tabela1.D" style:family="table-column">
      <style:table-column-properties style:column-width="1.173cm"/>
    </style:style>
    <style:style style:name="Tabela1.E" style:family="table-column">
      <style:table-column-properties style:column-width="1.524cm"/>
    </style:style>
    <style:style style:name="Tabela1.F" style:family="table-column">
      <style:table-column-properties style:column-width="2.23cm"/>
    </style:style>
    <style:style style:name="Tabela1.G" style:family="table-column">
      <style:table-column-properties style:column-width="1.621cm"/>
    </style:style>
    <style:style style:name="Tabela1.H" style:family="table-column">
      <style:table-column-properties style:column-width="1.819cm"/>
    </style:style>
    <style:style style:name="Tabela1.J" style:family="table-column">
      <style:table-column-properties style:column-width="1.385cm"/>
    </style:style>
    <style:style style:name="Tabela1.L" style:family="table-column">
      <style:table-column-properties style:column-width="1.244cm"/>
    </style:style>
    <style:style style:name="Tabela1.M" style:family="table-column">
      <style:table-column-properties style:column-width="1.132cm"/>
    </style:style>
    <style:style style:name="Tabela1.N" style:family="table-column">
      <style:table-column-properties style:column-width="1.18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.801cm"/>
    </style:style>
    <style:style style:name="Tabela2.C" style:family="table-column">
      <style:table-column-properties style:column-width="2.454cm"/>
    </style:style>
    <style:style style:name="Tabela2.D" style:family="table-column">
      <style:table-column-properties style:column-width="1.764cm"/>
    </style:style>
    <style:style style:name="Tabela2.E" style:family="table-column">
      <style:table-column-properties style:column-width="2.318cm"/>
    </style:style>
    <style:style style:name="Tabela2.F" style:family="table-column">
      <style:table-column-properties style:column-width="1.976cm"/>
    </style:style>
    <style:style style:name="Tabela2.G" style:family="table-column">
      <style:table-column-properties style:column-width="2.731cm"/>
    </style:style>
    <style:style style:name="Tabela2.H" style:family="table-column">
      <style:table-column-properties style:column-width="2.988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20.599cm" table:align="left"/>
    </style:style>
    <style:style style:name="Tabela3.A" style:family="table-column">
      <style:table-column-properties style:column-width="1.298cm"/>
    </style:style>
    <style:style style:name="Tabela3.B" style:family="table-column">
      <style:table-column-properties style:column-width="1.801cm"/>
    </style:style>
    <style:style style:name="Tabela3.C" style:family="table-column">
      <style:table-column-properties style:column-width="0.944cm"/>
    </style:style>
    <style:style style:name="Tabela3.D" style:family="table-column">
      <style:table-column-properties style:column-width="1.173cm"/>
    </style:style>
    <style:style style:name="Tabela3.E" style:family="table-column">
      <style:table-column-properties style:column-width="1.524cm"/>
    </style:style>
    <style:style style:name="Tabela3.F" style:family="table-column">
      <style:table-column-properties style:column-width="2.23cm"/>
    </style:style>
    <style:style style:name="Tabela3.G" style:family="table-column">
      <style:table-column-properties style:column-width="1.621cm"/>
    </style:style>
    <style:style style:name="Tabela3.H" style:family="table-column">
      <style:table-column-properties style:column-width="1.819cm"/>
    </style:style>
    <style:style style:name="Tabela3.J" style:family="table-column">
      <style:table-column-properties style:column-width="1.385cm"/>
    </style:style>
    <style:style style:name="Tabela3.L" style:family="table-column">
      <style:table-column-properties style:column-width="1.244cm"/>
    </style:style>
    <style:style style:name="Tabela3.M" style:family="table-column">
      <style:table-column-properties style:column-width="1.132cm"/>
    </style:style>
    <style:style style:name="Tabela3.N" style:family="table-column">
      <style:table-column-properties style:column-width="1.187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89c14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T1" style:family="text">
      <style:text-properties officeooo:rsid="00089c14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A</text:span></text:span><text:span text:style-name="Strong_20_Emphasis">cessar relatórios anuais completos de empresas de capital aberto, incluindo informações consolidadas que abrangem a controladora e suas coligadas/controladas</text:span>, por meio de fontes oficiais, tanto no Brasil quanto no exterior. <text:span text:style-name="T1">Abaixo constam os links </text:span>mais relevantes:</text:p>
      <text:h text:style-name="Heading_20_2" text:outline-level="2">1. Empresas brasileiras (Brasil – CVM e B3)</text:h>
      <text:h text:style-name="Heading_20_3" text:outline-level="3"><text:span text:style-name="Strong_20_Emphasis">Sistema de divulgação da CVM</text:span></text:h>
      <text:p text:style-name="Text_20_body">Aqui você encontra <text:span text:style-name="Strong_20_Emphasis">todas as demonstrações financeiras oficiais das empresas listadas no Brasil</text:span>, incluindo relatórios anuais, demonstrações consolidadas e outros documentos exigidos pela regulamentação da CVM (como DFP, ITR, Formulário de Referência etc.).</text:p>
      <text:p text:style-name="Text_20_body">👉 <text:span text:style-name="Strong_20_Emphasis">Consulta de documentos de companhias abertas (CVM)</text:span><text:line-break/><text:a xlink:type="simple" xlink:href="https://sistemas.cvm.gov.br/cias-abertas.asp" text:style-name="Internet_20_link" text:visited-style-name="Visited_20_Internet_20_Link">https://sistemas.cvm.gov.br/cias-abertas.asp</text:a></text:p>
      <text:p text:style-name="Text_20_body">👉 <text:span text:style-name="Strong_20_Emphasis">Pesquisa avançada de documentos (RAD/CVM)</text:span><text:line-break/><text:a xlink:type="simple" xlink:href="https://www.rad.cvm.gov.br/ENET/frmConsultaExternaCVM.aspx" text:style-name="Internet_20_link" text:visited-style-name="Visited_20_Internet_20_Link">https://www.rad.cvm.gov.br/ENET/frmConsultaExternaCVM.aspx</text:a></text:p>
      <text:p text:style-name="Text_20_body">✔️ Por essa plataforma você consegue baixar:</text:p>
      <text:list xml:id="list357396479" text:style-name="L1">
        <text:list-item>
          <text:p text:style-name="P3">Demonstrações financeiras consolidadas (controladora + controladas/coligadas) quando entregue pela empresa;</text:p>
        </text:list-item>
        <text:list-item>
          <text:p text:style-name="P3">Formulário de Referência, que inclui <text:span text:style-name="Strong_20_Emphasis">estrutura do grupo econômico e lista de controladas/coligadas</text:span>;</text:p>
        </text:list-item>
        <text:list-item>
          <text:p text:style-name="P3">Balanço patrimonial, DRE, DFC e notas explicativas padronizadas. (<text:a xlink:type="simple" xlink:href="https://www.gov.br/cvm/pt-br/centrais-de-conteudo/publicacoes/relatorios/anual?utm_source=chatgpt.com" text:style-name="Internet_20_link" text:visited-style-name="Visited_20_Internet_20_Link">Serviços e Informações do Brasil</text:a>)</text:p>
        </text:list-item>
      </text:list>
      <text:p text:style-name="Horizontal_20_Line"/>
      <text:h text:style-name="Heading_20_3" text:outline-level="3"><text:span text:style-name="Strong_20_Emphasis">B3 – Investor Relations (empresas listadas)</text:span></text:h>
      <text:p text:style-name="Text_20_body">Cada empresa listada na <text:span text:style-name="Strong_20_Emphasis">B3 (Bolsa de Valores do Brasil)</text:span> tem um canal de Investor Relations com seus próprios relatórios anuais, apresentações a analistas e releases oficiais.</text:p>
      <text:p text:style-name="Text_20_body"><text:span text:style-name="Strong_20_Emphasis">Portal de RI da B3</text:span><text:line-break/><text:a xlink:type="simple" xlink:href="https://ri.b3.com.br/" text:style-name="Internet_20_link" text:visited-style-name="Visited_20_Internet_20_Link">https://ri.b3.com.br/</text:a></text:p>
      <text:p text:style-name="Text_20_body">Aqui você geralmente encontra:</text:p>
      <text:list xml:id="list3792141784" text:style-name="L2">
        <text:list-item>
          <text:p text:style-name="P4">Relatórios anuais completos em PDF, inclusive consolidados;</text:p>
        </text:list-item>
        <text:list-item>
          <text:p text:style-name="P4">Relatórios trimestrais;</text:p>
        </text:list-item>
        <text:list-item>
          <text:p text:style-name="P4">Arquivos históricos de resultados financeiros.</text:p>
        </text:list-item>
      </text:list>
      <text:h text:style-name="Heading_20_2" text:outline-level="2">2. Empresas internacionais</text:h>
      <text:h text:style-name="Heading_20_3" text:outline-level="3">🇺🇸 <text:span text:style-name="Strong_20_Emphasis">SEC – EDGAR (Estados Unidos)</text:span></text:h>
      <text:p text:style-name="Text_20_body">Se a empresa tiver ADRs ou estiver listada nos mercados dos EUA, ela publica <text:span text:style-name="Strong_20_Emphasis">relatórios 10-K</text:span> que são equivalentes ao <text:span text:style-name="Emphasis">Relatório Anual</text:span> e costumam detalhar:</text:p>
      <text:list xml:id="list1497053687" text:style-name="L3">
        <text:list-item>
          <text:p text:style-name="P5"><text:soft-page-break/>Informações financeiras consolidadas do grupo;</text:p>
        </text:list-item>
        <text:list-item>
          <text:p text:style-name="P5">Lista de subsidiárias (em anexos e notas explicativas);</text:p>
        </text:list-item>
        <text:list-item>
          <text:p text:style-name="P5">Gestão e estrutura societária. (<text:a xlink:type="simple" xlink:href="https://www.investopedia.com/terms/1/10-k.asp?utm_source=chatgpt.com" text:style-name="Internet_20_link" text:visited-style-name="Visited_20_Internet_20_Link">Investopedia</text:a>)</text:p>
        </text:list-item>
      </text:list>
      <text:p text:style-name="Text_20_body">👉 <text:span text:style-name="Strong_20_Emphasis">Busca de relatórios corporativos – EDGAR (SEC)</text:span><text:line-break/><text:a xlink:type="simple" xlink:href="https://www.sec.gov/edgar/searchedgar/companysearch" text:style-name="Internet_20_link" text:visited-style-name="Visited_20_Internet_20_Link">https://www.sec.gov/edgar/searchedgar/companysearch</text:a></text:p>
      <text:p text:style-name="P17">Procure o formulário <text:span text:style-name="Strong_20_Emphasis">10-K anual</text:span> ou, para empresas estrangeiras listadas nos EUA, o formulário <text:span text:style-name="Strong_20_Emphasis">20-F</text:span> — esses documentos normalmente contêm informações consolidadas sobre controladas e coligadas.</text:p>
      <text:h text:style-name="Heading_20_2" text:outline-level="2">3. Outras fontes úteis</text:h>
      <text:h text:style-name="Heading_20_3" text:outline-level="3"><text:span text:style-name="Strong_20_Emphasis">AnnualReports.com</text:span> (internacional)</text:h>
      <text:p text:style-name="Text_20_body">Mesmo que não seja oficial como CVM/SEC, esse site reúne <text:span text:style-name="Strong_20_Emphasis">relatórios anuais em formato PDF de muitas empresas globais</text:span> — útil para empresas norte-americanas e algumas estrangeiras.</text:p>
      <text:p text:style-name="Text_20_body"><text:s/><text:a xlink:type="simple" xlink:href="https://www.annualreports.com/FAQ" text:style-name="Internet_20_link" text:visited-style-name="Visited_20_Internet_20_Link">https://www.annualreports.com/FAQ</text:a> (<text:a xlink:type="simple" xlink:href="https://www.annualreports.com/FAQ?utm_source=chatgpt.com" text:style-name="Internet_20_link" text:visited-style-name="Visited_20_Internet_20_Link">annualreports.com</text:a>)</text:p>
      <text:h text:style-name="Heading_20_2" text:outline-level="2">Dicas para encontrar informações sobre controladas/coligadas:</text:h>
      <text:p text:style-name="Text_20_body">✔️ <text:span text:style-name="Strong_20_Emphasis">Formulário de Referência (Brasil)</text:span><text:line-break/>No relatório chamado <text:span text:style-name="Emphasis">Formulário de Referência</text:span> enviado à CVM as empresas listadas detalham:</text:p>
      <text:list xml:id="list165557555" text:style-name="L4">
        <text:list-item>
          <text:p text:style-name="P6">Lista completa de subsidiárias/controladas;</text:p>
        </text:list-item>
        <text:list-item>
          <text:p text:style-name="P6">Participações relevantes (coligadas);</text:p>
        </text:list-item>
        <text:list-item>
          <text:p text:style-name="P6">Políticas contábeis e critérios de consolidação.</text:p>
        </text:list-item>
      </text:list>
      <text:p text:style-name="Text_20_body">Esse documento é essencial se você quer <text:span text:style-name="Strong_20_Emphasis">mapear o grupo econômico inteiro</text:span>.</text:p>
      <text:p text:style-name="Text_20_body">✔️ <text:span text:style-name="Strong_20_Emphasis">Relatórios 10-K/20-F (EUA)</text:span><text:line-break/>Nos relatórios anuais registrados na SEC há seções específicas que listam <text:span text:style-name="Strong_20_Emphasis">todas as subsidiárias e participações agrupadas</text:span>, além de mostrar se os números financeiros são consolidados.</text:p>
      <text:p text:style-name="Text_20_body">✔️ <text:span text:style-name="Strong_20_Emphasis">Notas explicativas das demonstrações financeiras</text:span><text:line-break/>Sempre consulte as <text:span text:style-name="Emphasis">Notas Explicativas</text:span> — nelas normalmente estão as políticas de consolidação e informações detalhadas sobre empresas controladas e coligadas.</text:p>
      <text:h text:style-name="Heading_20_1" text:outline-level="1"><text:soft-page-break/>PARTE 1 — COMO BAIXAR RELATÓRIO ANUAL NA CVM (Brasil)</text:h>
      <text:h text:style-name="Heading_20_2" text:outline-level="2">PASSO A PASSO (manual)</text:h>
      <text:h text:style-name="Heading_20_3" text:outline-level="3">1️ Acesse:</text:h>
      <text:p text:style-name="Text_20_body">🔗 <text:a xlink:type="simple" xlink:href="https://www.rad.cvm.gov.br/ENET/frmConsultaExternaCVM.aspx" text:style-name="Internet_20_link" text:visited-style-name="Visited_20_Internet_20_Link">https://www.rad.cvm.gov.br/ENET/frmConsultaExternaCVM.aspx</text:a></text:p>
      <text:h text:style-name="Heading_20_3" text:outline-level="3">2️ No campo:</text:h>
      <text:list xml:id="list2156925779" text:style-name="L5">
        <text:list-item>
          <text:p text:style-name="P7">“Companhia” → digite o nome da empresa</text:p>
        </text:list-item>
        <text:list-item>
          <text:p text:style-name="P7">Clique em “Consultar”</text:p>
        </text:list-item>
      </text:list>
      <text:h text:style-name="Heading_20_3" text:outline-level="3">3️ No filtro de documentos, procure por:</text:h>
      <text:list xml:id="list2153830177" text:style-name="L6">
        <text:list-item>
          <text:p text:style-name="P8"><text:span text:style-name="Strong_20_Emphasis">DFP – Demonstrações Financeiras Padronizadas (ANUAL)</text:span></text:p>
        </text:list-item>
        <text:list-item>
          <text:p text:style-name="P8"><text:span text:style-name="Strong_20_Emphasis">Formulário de Referência</text:span></text:p>
        </text:list-item>
        <text:list-item>
          <text:p text:style-name="P8"><text:span text:style-name="Strong_20_Emphasis">ITR</text:span> (trimestral, se necessário)</text:p>
        </text:list-item>
      </text:list>
      <text:h text:style-name="Heading_20_2" text:outline-level="2"><text:s/>O que baixar?</text:h>
      <text:h text:style-name="Heading_20_3" text:outline-level="3"><text:s/>1. DFP (Anual)</text:h>
      <text:p text:style-name="Text_20_body">Contém:</text:p>
      <text:list xml:id="list3436273120" text:style-name="L7">
        <text:list-item>
          <text:p text:style-name="P9">Balanço Patrimonial</text:p>
        </text:list-item>
        <text:list-item>
          <text:p text:style-name="P9">DRE</text:p>
        </text:list-item>
        <text:list-item>
          <text:p text:style-name="P9">DFC</text:p>
        </text:list-item>
        <text:list-item>
          <text:p text:style-name="P9">DMPL</text:p>
        </text:list-item>
        <text:list-item>
          <text:p text:style-name="P9"><text:span text:style-name="Strong_20_Emphasis">Demonstrações Consolidadas (empresa + controladas)</text:span></text:p>
        </text:list-item>
      </text:list>
      <text:p text:style-name="Text_20_body"/>
      <text:h text:style-name="Heading_20_3" text:outline-level="3"><text:s/>2. Formulário de Referência (ESSENCIAL para você)</text:h>
      <text:p text:style-name="Text_20_body">Dentro dele procure:</text:p>
      <text:p text:style-name="Text_20_body"><text:span text:style-name="Strong_20_Emphasis">Seção 6 – Grupo Econômico </text:span><text:span text:style-name="Strong_20_Emphasis"><text:span text:style-name="T1">o</text:span></text:span>u <text:span text:style-name="Strong_20_Emphasis">Participações societárias</text:span></text:p>
      <text:p text:style-name="Text_20_body">Lá você encontra:</text:p>
      <text:list xml:id="list4000127956" text:style-name="L8">
        <text:list-item>
          <text:p text:style-name="P10">Lista de controladas</text:p>
        </text:list-item>
        <text:list-item>
          <text:p text:style-name="P10">Percentual de participação</text:p>
        </text:list-item>
        <text:list-item>
          <text:p text:style-name="P10">País</text:p>
        </text:list-item>
        <text:list-item>
          <text:p text:style-name="P10">Tipo de controle</text:p>
        </text:list-item>
      </text:list>
      <text:p text:style-name="Text_20_body"><text:soft-page-break/>Isso resolve a parte estrutural do grupo.</text:p>
      <text:h text:style-name="Heading_20_1" text:outline-level="1">PARTE 2 — COMO BAIXAR NA SEC (empresas com ADR ou EUA)</text:h>
      <text:h text:style-name="Heading_20_3" text:outline-level="3">1️ Acesse:</text:h>
      <text:p text:style-name="Text_20_body">🔗 <text:a xlink:type="simple" xlink:href="https://www.sec.gov/edgar/searchedgar/companysearch" text:style-name="Internet_20_link" text:visited-style-name="Visited_20_Internet_20_Link">https://www.sec.gov/edgar/searchedgar/companysearch</text:a></text:p>
      <text:h text:style-name="Heading_20_3" text:outline-level="3">2️ Digite o nome da empresa</text:h>
      <text:h text:style-name="Heading_20_3" text:outline-level="3">3️ Procure pelo formulário:</text:h>
      <text:list xml:id="list2076179244" text:style-name="L9">
        <text:list-item>
          <text:p text:style-name="P11"><text:span text:style-name="Strong_20_Emphasis">10-K</text:span> (empresa americana)</text:p>
        </text:list-item>
        <text:list-item>
          <text:p text:style-name="P11"><text:span text:style-name="Strong_20_Emphasis">20-F</text:span> (empresa estrangeira listada nos EUA)</text:p>
        </text:list-item>
      </text:list>
      <text:h text:style-name="Heading_20_2" text:outline-level="2">Onde ficam as subsidiárias no 10-K?</text:h>
      <text:p text:style-name="Text_20_body">Normalmente:</text:p>
      <text:list xml:id="list3803200477" text:style-name="L10">
        <text:list-item>
          <text:p text:style-name="P12">“Item 1 – Business”</text:p>
        </text:list-item>
        <text:list-item>
          <text:p text:style-name="P12">“Exhibit 21 – Subsidiaries”</text:p>
        </text:list-item>
      </text:list>
      <text:p text:style-name="Text_20_body">O Exhibit 21 costuma listar TODAS as subsidiárias do grupo.</text:p>
      <text:h text:style-name="Heading_20_1" text:outline-level="1">PARTE 3 — COMO INTERPRETAR (controladora x consolidado)</text:h>
      <text:h text:style-name="P1" text:outline-level="2">Demonstração Individual (Controladora)</text:h>
      <text:p text:style-name="Text_20_body">Mostra apenas:</text:p>
      <text:list xml:id="list4149238365" text:style-name="L11">
        <text:list-item>
          <text:p text:style-name="P13">Investimentos em controladas (conta única)</text:p>
        </text:list-item>
        <text:list-item>
          <text:p text:style-name="P13">Resultado por equivalência patrimonial</text:p>
        </text:list-item>
      </text:list>
      <text:h text:style-name="Heading_20_2" text:outline-level="2">Demonstração Consolidada</text:h>
      <text:p text:style-name="Text_20_body">Mostra:</text:p>
      <text:list xml:id="list4139542646" text:style-name="L12">
        <text:list-item>
          <text:p text:style-name="P14">Ativos e passivos somados</text:p>
        </text:list-item>
        <text:list-item>
          <text:p text:style-name="P14">Receita total do grupo</text:p>
        </text:list-item>
        <text:list-item>
          <text:p text:style-name="P14">Eliminações internas</text:p>
        </text:list-item>
      </text:list>
      <text:h text:style-name="Heading_20_1" text:outline-level="1"><text:soft-page-break/>PARTE 4 — EXTRAÇÃO AUTOMÁTICA (Python): <text:span text:style-name="T1">caminhos</text:span></text:h>
      <text:h text:style-name="Heading_20_2" text:outline-level="2"><text:s/>Opção 1 — Dados estruturados da CVM (mais técnico)</text:h>
      <text:p text:style-name="Text_20_body">A CVM disponibiliza base de dados em formato aberto:</text:p>
      <text:p text:style-name="Text_20_body">🔗 <text:a xlink:type="simple" xlink:href="https://dados.cvm.gov.br/" text:style-name="Internet_20_link" text:visited-style-name="Visited_20_Internet_20_Link">https://dados.cvm.gov.br/</text:a></text:p>
      <text:p text:style-name="Text_20_body">Lá você encontra:</text:p>
      <text:list xml:id="list3172549431" text:style-name="L13">
        <text:list-item>
          <text:p text:style-name="P15">DFP estruturado</text:p>
        </text:list-item>
        <text:list-item>
          <text:p text:style-name="P15">ITR estruturado</text:p>
        </text:list-item>
        <text:list-item>
          <text:p text:style-name="P15">Formulário de referência em XML</text:p>
        </text:list-item>
      </text:list>
      <text:p text:style-name="Text_20_body">Você pode baixar tudo por ano.</text:p>
      <text:h text:style-name="Heading_20_2" text:outline-level="2">Exemplo simples em Python</text:h>
      <text:p text:style-name="Preformatted_20_Text"><text:span text:style-name="Source_20_Text">import pandas as pd</text:span></text:p>
      <text:p text:style-name="Preformatted_20_Text"/>
      <text:p text:style-name="Preformatted_20_Text"><text:span text:style-name="Source_20_Text"># Exemplo lendo arquivo DFP baixado da CVM</text:span></text:p>
      <text:p text:style-name="Preformatted_20_Text"><text:span text:style-name="Source_20_Text">df = pd.read_csv('dfp_cia_aberta_DRE_con_2023.csv', sep=';', encoding='latin1')</text:span></text:p>
      <text:p text:style-name="Preformatted_20_Text"/>
      <text:p text:style-name="Preformatted_20_Text"><text:span text:style-name="Source_20_Text"># Filtrar empresa específica</text:span></text:p>
      <text:p text:style-name="Preformatted_20_Text"><text:span text:style-name="Source_20_Text">empresa = df[df['DENOM_CIA'] == 'PETROBRAS']</text:span></text:p>
      <text:p text:style-name="Preformatted_20_Text"/>
      <text:p text:style-name="P2"><text:span text:style-name="Source_20_Text">print(empresa.head())</text:span></text:p>
      <text:h text:style-name="Heading_20_2" text:outline-level="2">Opção 2 — API SEC (para 10-K)</text:h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url = "https://data.sec.gov/submissions/CIK0000320193.json"</text:span></text:p>
      <text:p text:style-name="Preformatted_20_Text"><text:span text:style-name="Source_20_Text">headers = {"User-Agent": "SeuNome email@email.com"}</text:span></text:p>
      <text:p text:style-name="Preformatted_20_Text"/>
      <text:p text:style-name="Preformatted_20_Text"><text:span text:style-name="Source_20_Text">response = requests.get(url, headers=headers)</text:span></text:p>
      <text:p text:style-name="Preformatted_20_Text"><text:span text:style-name="Source_20_Text">data = response.json()</text:span></text:p>
      <text:p text:style-name="Preformatted_20_Text"/>
      <text:p text:style-name="P2"><text:span text:style-name="Source_20_Text">print(data['filings']['recent'])</text:span></text:p>
      <text:h text:style-name="Heading_20_1" text:outline-level="1">PARA SUA FINALIDADE (mais eficiente)</text:h>
      <text:h text:style-name="Heading_20_3" text:outline-level="3">Construir base econométrica →Use base estruturada da CVM (dados abertos)</text:h>
      <text:list xml:id="list1300997112" text:style-name="L14">
        <text:list-header>
          <text:p text:style-name="P16">Perfeito, Luiz. Agora vamos estruturar isso <text:span text:style-name="Strong_20_Emphasis">em nível de base científica</text:span>, já pensando em painel de dados e replicabilidade.</text:p>
        </text:list-header>
      </text:list>
      <text:p text:style-name="Text_20_body">Vou dividir em duas partes:</text:p>
      <text:h text:style-name="Heading_20_1" text:outline-level="1"><text:soft-page-break/>PARTE 1 — MONTAR BANCO DE DADOS CONSOLIDADO</text:h>
      <text:p text:style-name="Text_20_body"><text:span text:style-name="Emphasis">(Contas sintéticas – padrão CVM)</text:span></text:p>
      <text:p text:style-name="Text_20_body">Vamos usar a base estruturada da CVM (DFP consolidado).</text:p>
      <text:h text:style-name="Heading_20_1" text:outline-level="1">1️ Estrutura ideal do banco final</text:h>
      <text:p text:style-name="Text_20_body">Sugestão de base anual consolidada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G"/>
        <table:table-column table:style-name="Tabela1.J"/>
        <table:table-column table:style-name="Tabela1.G"/>
        <table:table-column table:style-name="Tabela1.L"/>
        <table:table-column table:style-name="Tabela1.M"/>
        <table:table-column table:style-name="Tabela1.N"/>
        <table:table-header-rows>
          <table:table-row table:style-name="TableLine1967055574944">
            <table:table-cell table:style-name="Tabela1.A1" office:value-type="string">
              <text:p text:style-name="Table_20_Heading">CNPJ</text:p>
            </table:table-cell>
            <table:table-cell table:style-name="Tabela1.A1" office:value-type="string">
              <text:p text:style-name="Table_20_Heading">Empresa</text:p>
            </table:table-cell>
            <table:table-cell table:style-name="Tabela1.A1" office:value-type="string">
              <text:p text:style-name="Table_20_Heading">Ano</text:p>
            </table:table-cell>
            <table:table-cell table:style-name="Tabela1.A1" office:value-type="string">
              <text:p text:style-name="Table_20_Heading">Ativo Total</text:p>
            </table:table-cell>
            <table:table-cell table:style-name="Tabela1.A1" office:value-type="string">
              <text:p text:style-name="Table_20_Heading">Passivo Total</text:p>
            </table:table-cell>
            <table:table-cell table:style-name="Tabela1.A1" office:value-type="string">
              <text:p text:style-name="Table_20_Heading">Patrimônio Líquido</text:p>
            </table:table-cell>
            <table:table-cell table:style-name="Tabela1.A1" office:value-type="string">
              <text:p text:style-name="Table_20_Heading">Receita Líquida</text:p>
            </table:table-cell>
            <table:table-cell table:style-name="Tabela1.A1" office:value-type="string">
              <text:p text:style-name="Table_20_Heading">EBITDA</text:p>
            </table:table-cell>
            <table:table-cell table:style-name="Tabela1.A1" office:value-type="string">
              <text:p text:style-name="Table_20_Heading">Lucro Líquido</text:p>
            </table:table-cell>
            <table:table-cell table:style-name="Tabela1.A1" office:value-type="string">
              <text:p text:style-name="Table_20_Heading">Dívida Bruta</text:p>
            </table:table-cell>
            <table:table-cell table:style-name="Tabela1.A1" office:value-type="string">
              <text:p text:style-name="Table_20_Heading">Dívida Líquida</text:p>
            </table:table-cell>
            <table:table-cell table:style-name="Tabela1.A1" office:value-type="string">
              <text:p text:style-name="Table_20_Heading">Caixa</text:p>
            </table:table-cell>
            <table:table-cell table:style-name="Tabela1.A1" office:value-type="string">
              <text:p text:style-name="Table_20_Heading">ROA</text:p>
            </table:table-cell>
            <table:table-cell table:style-name="Tabela1.A1" office:value-type="string">
              <text:p text:style-name="Table_20_Heading">ROE</text:p>
            </table:table-cell>
          </table:table-row>
        </table:table-header-rows>
      </table:table>
      <text:p text:style-name="Horizontal_20_Line"/>
      <text:h text:style-name="Heading_20_1" text:outline-level="1">2️ Baixar dados estruturados da CVM</text:h>
      <text:p text:style-name="Text_20_body">Acesse:</text:p>
      <text:p text:style-name="Text_20_body">👉 <text:a xlink:type="simple" xlink:href="https://dados.cvm.gov.br/dados/CIA_ABERTA/DOC/DFP/DADOS/" text:style-name="Internet_20_link" text:visited-style-name="Visited_20_Internet_20_Link">https://dados.cvm.gov.br/dados/CIA_ABERTA/DOC/DFP/DADOS/</text:a></text:p>
      <text:p text:style-name="Text_20_body">Baixe:</text:p>
      <text:list xml:id="list488594998" text:style-name="L15">
        <text:list-item>
          <text:p text:style-name="P18">dfp_cia_aberta_BPA_con_2023.csv → Ativo</text:p>
        </text:list-item>
        <text:list-item>
          <text:p text:style-name="P18">dfp_cia_aberta_BPP_con_2023.csv → Passivo</text:p>
        </text:list-item>
        <text:list-item>
          <text:p text:style-name="P18">dfp_cia_aberta_DRE_con_2023.csv → Resultado</text:p>
        </text:list-item>
        <text:list-item>
          <text:p text:style-name="P18">dfp_cia_aberta_DFC_MI_con_2023.csv → Fluxo de Caixa</text:p>
        </text:list-item>
      </text:list>
      <text:p text:style-name="Text_20_body">Repita para os anos desejados.</text:p>
      <text:h text:style-name="Heading_20_1" text:outline-level="1">3️ Extrair apenas contas sintéticas</text:h>
      <text:p text:style-name="Text_20_body">As contas sintéticas na CVM são identificadas por:</text:p>
      <text:p text:style-name="P2"><text:span text:style-name="Source_20_Text">NIVEL_CONTA = 1 ou 2</text:span></text:p>
      <text:p text:style-name="Text_20_body">Exemplo:</text:p>
      <text:list xml:id="list1501463250" text:style-name="L16">
        <text:list-item>
          <text:p text:style-name="P19">1 → Ativo Total</text:p>
        </text:list-item>
        <text:list-item>
          <text:p text:style-name="P19">2 → Ativo Circulante</text:p>
        </text:list-item>
        <text:list-item>
          <text:p text:style-name="P19">etc.</text:p>
        </text:list-item>
      </text:list>
      <text:h text:style-name="Heading_20_1" text:outline-level="1">4️ Script completo – Montando base consolidada</text:h>
      <text:p text:style-name="Preformatted_20_Text"><text:span text:style-name="Source_20_Text">import pandas as pd</text:span></text:p>
      <text:p text:style-name="Preformatted_20_Text"><text:soft-page-break/></text:p>
      <text:p text:style-name="Preformatted_20_Text"><text:span text:style-name="Source_20_Text">ano = 2023</text:span></text:p>
      <text:p text:style-name="Preformatted_20_Text"/>
      <text:p text:style-name="Preformatted_20_Text"><text:span text:style-name="Source_20_Text"># Ler arquivos</text:span></text:p>
      <text:p text:style-name="Preformatted_20_Text"><text:span text:style-name="Source_20_Text">bpa = pd.read_csv(f'dfp_cia_aberta_BPA_con_{ano}.csv', sep=';', encoding='latin1')</text:span></text:p>
      <text:p text:style-name="Preformatted_20_Text"><text:span text:style-name="Source_20_Text">bpp = pd.read_csv(f'dfp_cia_aberta_BPP_con_{ano}.csv', sep=';', encoding='latin1')</text:span></text:p>
      <text:p text:style-name="Preformatted_20_Text"><text:span text:style-name="Source_20_Text">dre = pd.read_csv(f'dfp_cia_aberta_DRE_con_{ano}.csv', sep=';', encoding='latin1')</text:span></text:p>
      <text:p text:style-name="Preformatted_20_Text"/>
      <text:p text:style-name="Preformatted_20_Text"><text:span text:style-name="Source_20_Text"># Filtrar apenas contas sintéticas</text:span></text:p>
      <text:p text:style-name="Preformatted_20_Text"><text:span text:style-name="Source_20_Text">bpa = bpa[bpa['NIVEL_CONTA'] &lt;= 2]</text:span></text:p>
      <text:p text:style-name="Preformatted_20_Text"><text:span text:style-name="Source_20_Text">bpp = bpp[bpp['NIVEL_CONTA'] &lt;= 2]</text:span></text:p>
      <text:p text:style-name="Preformatted_20_Text"><text:span text:style-name="Source_20_Text">dre = dre[dre['NIVEL_CONTA'] &lt;= 2]</text:span></text:p>
      <text:p text:style-name="Preformatted_20_Text"/>
      <text:p text:style-name="Preformatted_20_Text"><text:span text:style-name="Source_20_Text"># Selecionar contas principais</text:span></text:p>
      <text:p text:style-name="Preformatted_20_Text"><text:span text:style-name="Source_20_Text">ativo_total = bpa[bpa['DS_CONTA'] == 'Ativo Total']</text:span></text:p>
      <text:p text:style-name="Preformatted_20_Text"><text:span text:style-name="Source_20_Text">passivo_total = bpp[bpp['DS_CONTA'] == 'Passivo Total']</text:span></text:p>
      <text:p text:style-name="Preformatted_20_Text"><text:span text:style-name="Source_20_Text">pl = bpp[bpp['DS_CONTA'] == 'Patrimônio Líquido']</text:span></text:p>
      <text:p text:style-name="Preformatted_20_Text"><text:span text:style-name="Source_20_Text">receita = dre[dre['DS_CONTA'] == 'Receita Líquida']</text:span></text:p>
      <text:p text:style-name="Preformatted_20_Text"><text:span text:style-name="Source_20_Text">lucro = dre[dre['DS_CONTA'] == 'Lucro Líquido']</text:span></text:p>
      <text:p text:style-name="Preformatted_20_Text"/>
      <text:p text:style-name="Preformatted_20_Text"><text:span text:style-name="Source_20_Text"># Merge</text:span></text:p>
      <text:p text:style-name="Preformatted_20_Text"><text:span text:style-name="Source_20_Text">base = ativo_total[['CNPJ_CIA','DENOM_CIA','VL_CONTA']].rename(columns={'VL_CONTA':'Ativo_Total'})</text:span></text:p>
      <text:p text:style-name="Preformatted_20_Text"/>
      <text:p text:style-name="Preformatted_20_Text"><text:span text:style-name="Source_20_Text">base = base.merge(passivo_total[['CNPJ_CIA','VL_CONTA']], on='CNPJ_CIA')</text:span></text:p>
      <text:p text:style-name="Preformatted_20_Text"><text:span text:style-name="Source_20_Text">base = base.rename(columns={'VL_CONTA':'Passivo_Total'})</text:span></text:p>
      <text:p text:style-name="Preformatted_20_Text"/>
      <text:p text:style-name="Preformatted_20_Text"><text:span text:style-name="Source_20_Text">base = base.merge(pl[['CNPJ_CIA','VL_CONTA']], on='CNPJ_CIA')</text:span></text:p>
      <text:p text:style-name="Preformatted_20_Text"><text:span text:style-name="Source_20_Text">base = base.rename(columns={'VL_CONTA':'Patrimonio_Liquido'})</text:span></text:p>
      <text:p text:style-name="Preformatted_20_Text"/>
      <text:p text:style-name="Preformatted_20_Text"><text:span text:style-name="Source_20_Text">base = base.merge(receita[['CNPJ_CIA','VL_CONTA']], on='CNPJ_CIA')</text:span></text:p>
      <text:p text:style-name="Preformatted_20_Text"><text:span text:style-name="Source_20_Text">base = base.rename(columns={'VL_CONTA':'Receita_Liquida'})</text:span></text:p>
      <text:p text:style-name="Preformatted_20_Text"/>
      <text:p text:style-name="Preformatted_20_Text"><text:span text:style-name="Source_20_Text">base = base.merge(lucro[['CNPJ_CIA','VL_CONTA']], on='CNPJ_CIA')</text:span></text:p>
      <text:p text:style-name="Preformatted_20_Text"><text:span text:style-name="Source_20_Text">base = base.rename(columns={'VL_CONTA':'Lucro_Liquido'})</text:span></text:p>
      <text:p text:style-name="Preformatted_20_Text"/>
      <text:p text:style-name="Preformatted_20_Text"><text:span text:style-name="Source_20_Text"># Criar indicadores</text:span></text:p>
      <text:p text:style-name="Preformatted_20_Text"><text:span text:style-name="Source_20_Text">base['ROA'] = base['Lucro_Liquido'] / base['Ativo_Total']</text:span></text:p>
      <text:p text:style-name="Preformatted_20_Text"><text:span text:style-name="Source_20_Text">base['ROE'] = base['Lucro_Liquido'] / base['Patrimonio_Liquido']</text:span></text:p>
      <text:p text:style-name="Preformatted_20_Text"/>
      <text:p text:style-name="P2"><text:span text:style-name="Source_20_Text">print(base.head())</text:span></text:p>
      <text:h text:style-name="Heading_20_1" text:outline-level="1"><text:span text:style-name="T2">PARTE 2 — EXTRAIR AUTOMATICAMENTE TODAS AS CONTROLADAS</text:span></text:h>
      <text:h text:style-name="Heading_20_1" text:outline-level="1">1️ Fonte correta</text:h>
      <text:p text:style-name="Text_20_body">CVM → Formulário de Referência (dados estruturados)</text:p>
      <text:p text:style-name="Text_20_body">Link base:</text:p>
      <text:p text:style-name="Text_20_body">👉 <text:a xlink:type="simple" xlink:href="https://dados.cvm.gov.br/dados/CIA_ABERTA/DOC/FRE/DADOS/" text:style-name="Internet_20_link" text:visited-style-name="Visited_20_Internet_20_Link">https://dados.cvm.gov.br/dados/CIA_ABERTA/DOC/FRE/DADOS/</text:a></text:p>
      <text:p text:style-name="Text_20_body">Baixe:</text:p>
      <text:p text:style-name="P2"><text:soft-page-break/><text:span text:style-name="Source_20_Text">fre_cia_aberta_2023.zip</text:span></text:p>
      <text:h text:style-name="Heading_20_1" text:outline-level="1">2️ Onde estão as controladas?</text:h>
      <text:p text:style-name="Text_20_body">Arquivo:</text:p>
      <text:p text:style-name="P2"><text:span text:style-name="Source_20_Text">fre_cia_aberta_2023.csv</text:span></text:p>
      <text:p text:style-name="Text_20_body">Campo importante:</text:p>
      <text:list xml:id="list3440604396" text:style-name="L17">
        <text:list-item>
          <text:p text:style-name="P20">DESCRICAO</text:p>
        </text:list-item>
        <text:list-item>
          <text:p text:style-name="P20">DENOM_SOCIAL</text:p>
        </text:list-item>
        <text:list-item>
          <text:p text:style-name="P20">PARTICIPACAO</text:p>
        </text:list-item>
        <text:list-item>
          <text:p text:style-name="P20">PAIS</text:p>
        </text:list-item>
        <text:list-item>
          <text:p text:style-name="P20">TIPO_RELACAO</text:p>
        </text:list-item>
      </text:list>
      <text:h text:style-name="Heading_20_1" text:outline-level="1">3️ Script para extrair controladas de uma empresa</text:h>
      <text:p text:style-name="Preformatted_20_Text"><text:span text:style-name="Source_20_Text">fre = pd.read_csv('fre_cia_aberta_2023.csv', sep=';', encoding='latin1')</text:span></text:p>
      <text:p text:style-name="Preformatted_20_Text"/>
      <text:p text:style-name="Preformatted_20_Text"><text:span text:style-name="Source_20_Text">empresa = fre[fre['DENOM_CIA'] == 'PETROBRAS']</text:span></text:p>
      <text:p text:style-name="Preformatted_20_Text"/>
      <text:p text:style-name="Preformatted_20_Text"><text:span text:style-name="Source_20_Text">controladas = empresa[empresa['TIPO_RELACAO'] == 'Controlada']</text:span></text:p>
      <text:p text:style-name="Preformatted_20_Text"/>
      <text:p text:style-name="P2"><text:span text:style-name="Source_20_Text">print(controladas[['DENOM_SOCIAL','PARTICIPACAO','PAIS']])</text:span></text:p>
      <text:h text:style-name="Heading_20_1" text:outline-level="1">4️ Contar número de subsidiárias</text:h>
      <text:p text:style-name="Preformatted_20_Text"><text:span text:style-name="Source_20_Text">num_controladas = controladas.shape[0]</text:span></text:p>
      <text:p text:style-name="P2"><text:span text:style-name="Source_20_Text">print(num_controladas)</text:span></text:p>
      <text:h text:style-name="Heading_20_1" text:outline-level="1">EXTRA — Construir Índice de Complexidade Corporativa</text:h>
      <text:p text:style-name="Text_20_body">Você pode criar variáveis como:</text:p>
      <text:p text:style-name="Preformatted_20_Text"><text:span text:style-name="Source_20_Text">indice_complexidade = (</text:span></text:p>
      <text:p text:style-name="Preformatted_20_Text"><text:span text:style-name="Source_20_Text"><text:s text:c="4"/>num_controladas * 0.5 +</text:span></text:p>
      <text:p text:style-name="Preformatted_20_Text"><text:span text:style-name="Source_20_Text"><text:s text:c="4"/>numero_paises * 0.3 +</text:span></text:p>
      <text:p text:style-name="Preformatted_20_Text"><text:span text:style-name="Source_20_Text"><text:s text:c="4"/>numero_controladas_indiretas * 0.2</text:span></text:p>
      <text:p text:style-name="P2"><text:span text:style-name="Source_20_Text">)</text:span></text:p>
      <text:p text:style-name="Text_20_body">E integrar ao seu modelo econométrico.</text:p>
      <text:h text:style-name="Heading_20_1" text:outline-level="1"><text:soft-page-break/>ESTRUTURA FINAL DO BANCO (FINANCEIRO + ESTRUTURAL)</text:h>
      <text:p text:style-name="Text_20_body">| Empresa | Ano | Ativo | Receita | Lucro | Nº Controladas | Nº Países | ROA | ROE | Complexidade |</text:p>
      <text:p text:style-name="Text_20_body">Agora você tem:</text:p>
      <text:p text:style-name="Text_20_body">✔ Dados consolidados<text:line-break/>✔ Estrutura societária<text:line-break/>✔ Variáveis para regressão<text:line-break/>✔ Base replicável</text:p>
      <text:p text:style-name="Text_20_body">Excelente, Luiz. Vamos fazer isso de forma estruturada e acadêmica, já no nível que atende pesquisa.</text:p>
      <text:p text:style-name="Text_20_body">Vou organizar em 4 blocos exatamente como você solicitou:</text:p>
      <text:h text:style-name="Heading_20_1" text:outline-level="1">1️ EXEMPLO COMPLETO – EMPRESA ESPECÍFICA (PETROBRAS)</text:h>
      <text:p text:style-name="Text_20_body">(Se quiser outra depois, replicamos o método.)</text:p>
      <text:h text:style-name="Heading_20_2" text:outline-level="2">OBJETIVO</text:h>
      <text:p text:style-name="Text_20_body">Extrair:</text:p>
      <text:list xml:id="list4030219864" text:style-name="L19">
        <text:list-item>
          <text:p text:style-name="P22">Relatório anual consolidado</text:p>
        </text:list-item>
        <text:list-item>
          <text:p text:style-name="P22">Lista de controladas</text:p>
        </text:list-item>
        <text:list-item>
          <text:p text:style-name="P22">Estrutura do grupo</text:p>
        </text:list-item>
        <text:list-item>
          <text:p text:style-name="P22">Dados financeiros consolidados</text:p>
        </text:list-item>
      </text:list>
      <text:h text:style-name="Heading_20_2" text:outline-level="2">PASSO 1 — Baixar DFP (Consolidado)</text:h>
      <text:p text:style-name="Text_20_body">Acesse:<text:line-break/><text:a xlink:type="simple" xlink:href="https://www.rad.cvm.gov.br/ENET/frmConsultaExternaCVM.aspx" text:style-name="Internet_20_link" text:visited-style-name="Visited_20_Internet_20_Link">https://www.rad.cvm.gov.br/ENET/frmConsultaExternaCVM.aspx</text:a></text:p>
      <text:p text:style-name="Text_20_body">Digite:<text:line-break/><text:span text:style-name="Strong_20_Emphasis">PETRÓLEO BRASILEIRO S.A. – PETROBRAS</text:span></text:p>
      <text:p text:style-name="Text_20_body">Selecione:<text:line-break/>✔ DFP<text:line-break/>✔ Último exercício disponível<text:line-break/>✔ Demonstrações Consolidadas</text:p>
      <text:p text:style-name="Text_20_body">Baixe:</text:p>
      <text:list xml:id="list1818473653" text:style-name="L20">
        <text:list-item>
          <text:p text:style-name="P23">Balanço consolidado</text:p>
        </text:list-item>
        <text:list-item>
          <text:p text:style-name="P23"><text:soft-page-break/>DRE consolidada</text:p>
        </text:list-item>
        <text:list-item>
          <text:p text:style-name="P23">DFC consolidada</text:p>
        </text:list-item>
        <text:list-item>
          <text:p text:style-name="P23">Notas explicativas</text:p>
        </text:list-item>
      </text:list>
      <text:h text:style-name="Heading_20_2" text:outline-level="2">PASSO 2 — Baixar Formulário de Referência</text:h>
      <text:p text:style-name="Text_20_body">Ainda na CVM:</text:p>
      <text:p text:style-name="Text_20_body">Procure:<text:line-break/>✔ “Formulário de Referência”</text:p>
      <text:p text:style-name="Text_20_body">Dentro do documento vá para:</text:p>
      <text:p text:style-name="Text_20_body"><text:span text:style-name="Strong_20_Emphasis">Item 6 – Grupo Econômico</text:span></text:p>
      <text:p text:style-name="Text_20_body">Ali você encontrará:</text:p>
      <text:list xml:id="list2774330289" text:style-name="L21">
        <text:list-item>
          <text:p text:style-name="P24">Lista completa de controladas</text:p>
        </text:list-item>
        <text:list-item>
          <text:p text:style-name="P24">Participação percentual</text:p>
        </text:list-item>
        <text:list-item>
          <text:p text:style-name="P24">País</text:p>
        </text:list-item>
        <text:list-item>
          <text:p text:style-name="P24">Tipo (direta ou indireta)</text:p>
        </text:list-item>
      </text:list>
      <text:h text:style-name="Heading_20_2" text:outline-level="2">Onde ficam as controladas no balanço?</text:h>
      <text:p text:style-name="Text_20_body">Nas Notas Explicativas:<text:line-break/>Normalmente chamada:</text:p>
      <text:p text:style-name="Quotations">“Investimentos em controladas, coligadas e joint ventures”</text:p>
      <text:p text:style-name="Text_20_body">Ali aparece:</text:p>
      <text:list xml:id="list4062825357" text:style-name="L22">
        <text:list-item>
          <text:p text:style-name="P25">Nome</text:p>
        </text:list-item>
        <text:list-item>
          <text:p text:style-name="P25">% de participação</text:p>
        </text:list-item>
        <text:list-item>
          <text:p text:style-name="P25">Método de consolidação</text:p>
        </text:list-item>
      </text:list>
      <text:h text:style-name="Heading_20_1" text:outline-level="1">2️ COMO MONTAR UM BANCO DE DADOS CONSOLIDADO</text:h>
      <text:p text:style-name="Text_20_body">Agora vamos para parte técnica (ideal para sua pesquisa).</text:p>
      <text:h text:style-name="Heading_20_2" text:outline-level="2">Estrutura ideal do banco</text:h>
      <text:p text:style-name="Text_20_body">Sugestão de base anual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header-rows>
          <table:table-row table:style-name="TableLine1965143493024">
            <table:table-cell table:style-name="Tabela2.A1" office:value-type="string">
              <text:p text:style-name="Table_20_Heading">Ano</text:p>
            </table:table-cell>
            <table:table-cell table:style-name="Tabela2.A1" office:value-type="string">
              <text:p text:style-name="Table_20_Heading">Empresa</text:p>
            </table:table-cell>
            <table:table-cell table:style-name="Tabela2.A1" office:value-type="string">
              <text:p text:style-name="Table_20_Heading">Receita Líquida</text:p>
            </table:table-cell>
            <table:table-cell table:style-name="Tabela2.A1" office:value-type="string">
              <text:p text:style-name="Table_20_Heading">Ativo Total</text:p>
            </table:table-cell>
            <table:table-cell table:style-name="Tabela2.A1" office:value-type="string">
              <text:p text:style-name="Table_20_Heading">Lucro Líquido</text:p>
            </table:table-cell>
            <table:table-cell table:style-name="Tabela2.A1" office:value-type="string">
              <text:p text:style-name="Table_20_Heading">Dívida Total</text:p>
            </table:table-cell>
            <table:table-cell table:style-name="Tabela2.A1" office:value-type="string">
              <text:p text:style-name="Table_20_Heading">Nº Controladas</text:p>
            </table:table-cell>
            <table:table-cell table:style-name="Tabela2.A1" office:value-type="string">
              <text:p text:style-name="Table_20_Heading">País Controladas</text:p>
            </table:table-cell>
          </table:table-row>
        </table:table-header-rows>
      </table:table>
      <text:p text:style-name="Horizontal_20_Line"/>
      <text:h text:style-name="Heading_20_2" text:outline-level="2"><text:soft-page-break/>🔹 Fonte de dados estruturados (CVM)</text:h>
      <text:p text:style-name="Text_20_body">Acesse:<text:line-break/><text:a xlink:type="simple" xlink:href="https://dados.cvm.gov.br/" text:style-name="Internet_20_link" text:visited-style-name="Visited_20_Internet_20_Link">https://dados.cvm.gov.br/</text:a></text:p>
      <text:p text:style-name="Text_20_body">Baixe:</text:p>
      <text:p text:style-name="Text_20_body">📂 dfp_cia_aberta_2023.zip<text:line-break/>📂 dfp_cia_aberta_2022.zip<text:line-break/>etc.</text:p>
      <text:p text:style-name="Horizontal_20_Line"/>
      <text:h text:style-name="Heading_20_2" text:outline-level="2">🔹 Exemplo em Python</text:h>
      <text:p text:style-name="Preformatted_20_Text"><text:span text:style-name="Source_20_Text">import pandas as pd</text:span></text:p>
      <text:p text:style-name="Preformatted_20_Text"/>
      <text:p text:style-name="Preformatted_20_Text"><text:span text:style-name="Source_20_Text"># Ler DRE consolidada</text:span></text:p>
      <text:p text:style-name="Preformatted_20_Text"><text:span text:style-name="Source_20_Text">dre = pd.read_csv('dfp_cia_aberta_DRE_con_2023.csv', sep=';', encoding='latin1')</text:span></text:p>
      <text:p text:style-name="Preformatted_20_Text"/>
      <text:p text:style-name="Preformatted_20_Text"><text:span text:style-name="Source_20_Text"># Filtrar Petrobras</text:span></text:p>
      <text:p text:style-name="Preformatted_20_Text"><text:span text:style-name="Source_20_Text">petro = dre[dre['DENOM_CIA'] == 'PETROBRAS']</text:span></text:p>
      <text:p text:style-name="Preformatted_20_Text"/>
      <text:p text:style-name="Preformatted_20_Text"><text:span text:style-name="Source_20_Text"># Filtrar conta Receita Líquida</text:span></text:p>
      <text:p text:style-name="Preformatted_20_Text"><text:span text:style-name="Source_20_Text">receita = petro[petro['DS_CONTA'] == 'Receita Líquida']</text:span></text:p>
      <text:p text:style-name="Preformatted_20_Text"/>
      <text:p text:style-name="P2"><text:span text:style-name="Source_20_Text">print(receita[['VL_CONTA']])</text:span></text:p>
      <text:p text:style-name="Horizontal_20_Line"/>
      <text:h text:style-name="Heading_20_2" text:outline-level="2">🔹 Contar número de controladas</text:h>
      <text:p text:style-name="Text_20_body">Se você extrair do Formulário de Referência (XML ou manual):</text:p>
      <text:p text:style-name="P2"><text:span text:style-name="Source_20_Text">len(lista_controladas)</text:span></text:p>
      <text:h text:style-name="Heading_20_1" text:outline-level="1">3️ ROTEIRO METODOLÓGICO PARA PESQUISA ACADÊMICA</text:h>
      <text:p text:style-name="Text_20_body">Modelo que pode virar artigo ou capítulo de tese.</text:p>
      <text:h text:style-name="Heading_20_2" text:outline-level="2">1. Delimitação</text:h>
      <text:p text:style-name="Text_20_body">Amostra:<text:line-break/>Empresas listadas na B3 no período X–Y</text:p>
      <text:p text:style-name="Text_20_body">Critério:</text:p>
      <text:list xml:id="list2379326547" text:style-name="L23">
        <text:list-item>
          <text:p text:style-name="P26">Apenas demonstrações consolidadas</text:p>
        </text:list-item>
        <text:list-item>
          <text:p text:style-name="P26">Excluir financeiras (se necessário)</text:p>
        </text:list-item>
      </text:list>
      <text:h text:style-name="Heading_20_2" text:outline-level="2"><text:soft-page-break/>2. Coleta de Dados</text:h>
      <text:p text:style-name="Text_20_body">Fonte primária:</text:p>
      <text:list xml:id="list2315255943" text:style-name="L24">
        <text:list-item>
          <text:p text:style-name="P27">CVM – DFP</text:p>
        </text:list-item>
        <text:list-item>
          <text:p text:style-name="P27">Formulário de Referência</text:p>
        </text:list-item>
      </text:list>
      <text:p text:style-name="Text_20_body">Fonte complementar:</text:p>
      <text:list xml:id="list2250442855" text:style-name="L25">
        <text:list-item>
          <text:p text:style-name="P28">B3</text:p>
        </text:list-item>
        <text:list-item>
          <text:p text:style-name="P28">Economática (se disponível)</text:p>
        </text:list-item>
      </text:list>
      <text:p text:style-name="Horizontal_20_Line"/>
      <text:h text:style-name="Heading_20_2" text:outline-level="2">3. Construção das Variáveis</text:h>
      <text:p text:style-name="Text_20_body">Dependentes:</text:p>
      <text:list xml:id="list1213675301" text:style-name="L26">
        <text:list-item>
          <text:p text:style-name="P29">ROA consolidado</text:p>
        </text:list-item>
        <text:list-item>
          <text:p text:style-name="P29">ROE consolidado</text:p>
        </text:list-item>
        <text:list-item>
          <text:p text:style-name="P29">Crescimento da Receita</text:p>
        </text:list-item>
      </text:list>
      <text:p text:style-name="Text_20_body">Independentes:</text:p>
      <text:list xml:id="list243183415" text:style-name="L27">
        <text:list-item>
          <text:p text:style-name="P30">Número de subsidiárias</text:p>
        </text:list-item>
        <text:list-item>
          <text:p text:style-name="P30">Diversificação internacional</text:p>
        </text:list-item>
        <text:list-item>
          <text:p text:style-name="P30">Grau de concentração societária</text:p>
        </text:list-item>
      </text:list>
      <text:p text:style-name="Text_20_body">Controle:</text:p>
      <text:list xml:id="list154812223" text:style-name="L28">
        <text:list-item>
          <text:p text:style-name="P31">Tamanho (log ativo)</text:p>
        </text:list-item>
        <text:list-item>
          <text:p text:style-name="P31">Alavancagem</text:p>
        </text:list-item>
        <text:list-item>
          <text:p text:style-name="P31">Setor</text:p>
        </text:list-item>
      </text:list>
      <text:p text:style-name="Horizontal_20_Line"/>
      <text:h text:style-name="Heading_20_2" text:outline-level="2">4. Método</text:h>
      <text:p text:style-name="Text_20_body">Possibilidades:</text:p>
      <text:list xml:id="list1051723771" text:style-name="L29">
        <text:list-item>
          <text:p text:style-name="P32">Painel com efeitos fixos</text:p>
        </text:list-item>
        <text:list-item>
          <text:p text:style-name="P32">Regressão robusta</text:p>
        </text:list-item>
        <text:list-item>
          <text:p text:style-name="P32">SEM (se quiser integrar governança estrutural)</text:p>
        </text:list-item>
      </text:list>
      <text:h text:style-name="Heading_20_1" text:outline-level="1"><text:soft-page-break/>4️ EXTRAIR AUTOMATICAMENTE TODAS AS CONTROLADAS</text:h>
      <text:p text:style-name="Text_20_body">Agora a parte mais interessante.</text:p>
      <text:h text:style-name="Heading_20_2" text:outline-level="2">Método 1 – Via Formulário de Referência (XML)</text:h>
      <text:p text:style-name="Text_20_body">A CVM disponibiliza XML estruturado.</text:p>
      <text:p text:style-name="Text_20_body">Você pode extrair:</text:p>
      <text:p text:style-name="Preformatted_20_Text"><text:span text:style-name="Source_20_Text">import xml.etree.ElementTree as ET</text:span></text:p>
      <text:p text:style-name="Preformatted_20_Text"/>
      <text:p text:style-name="Preformatted_20_Text"><text:span text:style-name="Source_20_Text">tree = ET.parse('formulario_referencia.xml')</text:span></text:p>
      <text:p text:style-name="Preformatted_20_Text"><text:span text:style-name="Source_20_Text">root = tree.getroot()</text:span></text:p>
      <text:p text:style-name="Preformatted_20_Text"/>
      <text:p text:style-name="Preformatted_20_Text"><text:span text:style-name="Source_20_Text">for empresa in root.findall('.//controlada'):</text:span></text:p>
      <text:p text:style-name="P2"><text:span text:style-name="Source_20_Text"><text:s text:c="4"/>print(empresa.text)</text:span></text:p>
      <text:h text:style-name="Heading_20_2" text:outline-level="2">Método 2 – Via 10-K (SEC)</text:h>
      <text:p text:style-name="Text_20_body">Se empresa tiver ADR:</text:p>
      <text:p text:style-name="Text_20_body">Exhibit 21 contém subsidiárias.</text:p>
      <text:p text:style-name="Text_20_body">Pode extrair com:</text:p>
      <text:p text:style-name="Preformatted_20_Text"><text:span text:style-name="Source_20_Text">import requests</text:span></text:p>
      <text:p text:style-name="Preformatted_20_Text"><text:span text:style-name="Source_20_Text">from bs4 import BeautifulSoup</text:span></text:p>
      <text:p text:style-name="Preformatted_20_Text"/>
      <text:p text:style-name="Preformatted_20_Text"><text:span text:style-name="Source_20_Text">url = "link_do_10k"</text:span></text:p>
      <text:p text:style-name="Preformatted_20_Text"><text:span text:style-name="Source_20_Text">response = requests.get(url)</text:span></text:p>
      <text:p text:style-name="Preformatted_20_Text"><text:span text:style-name="Source_20_Text">soup = BeautifulSoup(response.text, 'html.parser')</text:span></text:p>
      <text:p text:style-name="Preformatted_20_Text"/>
      <text:p text:style-name="P2"><text:span text:style-name="Source_20_Text">print(soup.get_text())</text:span></text:p>
      <text:h text:style-name="Heading_20_1" text:outline-level="1">NÍVEL MAIS AVANÇADO (para sua linha de pesquisa)</text:h>
      <text:p text:style-name="Text_20_body">Você pode construir:</text:p>
      <text:p text:style-name="Text_20_body">Índice de Complexidade Corporativa:</text:p>
      <text:list xml:id="list3214685765" text:style-name="L30">
        <text:list-item>
          <text:p text:style-name="P33">Nº de subsidiárias</text:p>
        </text:list-item>
        <text:list-item>
          <text:p text:style-name="P33">Nº de países</text:p>
        </text:list-item>
        <text:list-item>
          <text:p text:style-name="P33">Participações indiretas</text:p>
        </text:list-item>
        <text:list-item>
          <text:p text:style-name="P33">Nível de concentração</text:p>
        </text:list-item>
      </text:list>
      <text:p text:style-name="Text_20_body">E cruzar com:</text:p>
      <text:list xml:id="list3306414506" text:style-name="L31">
        <text:list-item>
          <text:p text:style-name="P34">Indicadores de desempenho</text:p>
        </text:list-item>
        <text:list-item>
          <text:p text:style-name="P34"><text:soft-page-break/>Governança</text:p>
        </text:list-item>
        <text:list-item>
          <text:p text:style-name="P34">Endividamento</text:p>
        </text:list-item>
        <text:list-item>
          <text:p text:style-name="P34">Choques macroeconômicos</text:p>
        </text:list-item>
      </text:list>
      <text:p text:style-name="Text_20_body">Isso conversa diretamente com sua linha de governança e estrutura institucional.</text:p>
      <text:h text:style-name="Heading_20_1" text:outline-level="1">Próximo nível (posso montar para você):</text:h>
      <text:h text:style-name="Heading_20_1" text:outline-level="1">PARTE 1 — MONTAR BANCO DE DADOS CONSOLIDADO</text:h>
      <text:p text:style-name="Text_20_body"><text:span text:style-name="Emphasis">(Contas sintéticas – padrão CVM)</text:span></text:p>
      <text:p text:style-name="Text_20_body">Vamos usar a base estruturada da CVM (DFP consolidado).</text:p>
      <text:p text:style-name="Horizontal_20_Line"/>
      <text:h text:style-name="Heading_20_1" text:outline-level="1">1️ Estrutura ideal do banco final</text:h>
      <text:p text:style-name="Text_20_body">Sugestão de base anual consolidada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G"/>
        <table:table-column table:style-name="Tabela3.J"/>
        <table:table-column table:style-name="Tabela3.G"/>
        <table:table-column table:style-name="Tabela3.L"/>
        <table:table-column table:style-name="Tabela3.M"/>
        <table:table-column table:style-name="Tabela3.N"/>
        <table:table-header-rows>
          <table:table-row table:style-name="TableLine1965117289760">
            <table:table-cell table:style-name="Tabela3.A1" office:value-type="string">
              <text:p text:style-name="Table_20_Heading">CNPJ</text:p>
            </table:table-cell>
            <table:table-cell table:style-name="Tabela3.A1" office:value-type="string">
              <text:p text:style-name="Table_20_Heading">Empresa</text:p>
            </table:table-cell>
            <table:table-cell table:style-name="Tabela3.A1" office:value-type="string">
              <text:p text:style-name="Table_20_Heading">Ano</text:p>
            </table:table-cell>
            <table:table-cell table:style-name="Tabela3.A1" office:value-type="string">
              <text:p text:style-name="Table_20_Heading">Ativo Total</text:p>
            </table:table-cell>
            <table:table-cell table:style-name="Tabela3.A1" office:value-type="string">
              <text:p text:style-name="Table_20_Heading">Passivo Total</text:p>
            </table:table-cell>
            <table:table-cell table:style-name="Tabela3.A1" office:value-type="string">
              <text:p text:style-name="Table_20_Heading">Patrimônio Líquido</text:p>
            </table:table-cell>
            <table:table-cell table:style-name="Tabela3.A1" office:value-type="string">
              <text:p text:style-name="Table_20_Heading">Receita Líquida</text:p>
            </table:table-cell>
            <table:table-cell table:style-name="Tabela3.A1" office:value-type="string">
              <text:p text:style-name="Table_20_Heading">EBITDA</text:p>
            </table:table-cell>
            <table:table-cell table:style-name="Tabela3.A1" office:value-type="string">
              <text:p text:style-name="Table_20_Heading">Lucro Líquido</text:p>
            </table:table-cell>
            <table:table-cell table:style-name="Tabela3.A1" office:value-type="string">
              <text:p text:style-name="Table_20_Heading">Dívida Bruta</text:p>
            </table:table-cell>
            <table:table-cell table:style-name="Tabela3.A1" office:value-type="string">
              <text:p text:style-name="Table_20_Heading">Dívida Líquida</text:p>
            </table:table-cell>
            <table:table-cell table:style-name="Tabela3.A1" office:value-type="string">
              <text:p text:style-name="Table_20_Heading">Caixa</text:p>
            </table:table-cell>
            <table:table-cell table:style-name="Tabela3.A1" office:value-type="string">
              <text:p text:style-name="Table_20_Heading">ROA</text:p>
            </table:table-cell>
            <table:table-cell table:style-name="Tabela3.A1" office:value-type="string">
              <text:p text:style-name="Table_20_Heading">ROE</text:p>
            </table:table-cell>
          </table:table-row>
        </table:table-header-rows>
      </table:table>
      <text:p text:style-name="Horizontal_20_Line"/>
      <text:h text:style-name="Heading_20_1" text:outline-level="1">2️ Baixar dados estruturados da CVM</text:h>
      <text:p text:style-name="Text_20_body">Acesse:</text:p>
      <text:p text:style-name="Text_20_body">👉 <text:a xlink:type="simple" xlink:href="https://dados.cvm.gov.br/dados/CIA_ABERTA/DOC/DFP/DADOS/" text:style-name="Internet_20_link" text:visited-style-name="Visited_20_Internet_20_Link">https://dados.cvm.gov.br/dados/CIA_ABERTA/DOC/DFP/DADOS/</text:a></text:p>
      <text:p text:style-name="Text_20_body">Baixe:</text:p>
      <text:list xml:id="list2074633941" text:style-name="L33">
        <text:list-item>
          <text:p text:style-name="P36">dfp_cia_aberta_BPA_con_2023.csv → Ativo</text:p>
        </text:list-item>
        <text:list-item>
          <text:p text:style-name="P36">dfp_cia_aberta_BPP_con_2023.csv → Passivo</text:p>
        </text:list-item>
        <text:list-item>
          <text:p text:style-name="P36">dfp_cia_aberta_DRE_con_2023.csv → Resultado</text:p>
        </text:list-item>
        <text:list-item>
          <text:p text:style-name="P36">dfp_cia_aberta_DFC_MI_con_2023.csv → Fluxo de Caixa</text:p>
        </text:list-item>
      </text:list>
      <text:p text:style-name="Text_20_body">Repita para os anos desejados.</text:p>
      <text:p text:style-name="Horizontal_20_Line"/>
      <text:h text:style-name="Heading_20_1" text:outline-level="1">3️ Extrair apenas contas sintéticas</text:h>
      <text:p text:style-name="Text_20_body">As contas sintéticas na CVM são identificadas por:</text:p>
      <text:p text:style-name="P2"><text:span text:style-name="Source_20_Text">NIVEL_CONTA = 1 ou 2</text:span></text:p>
      <text:p text:style-name="Text_20_body"><text:soft-page-break/>Exemplo:</text:p>
      <text:list xml:id="list1524454274" text:style-name="L34">
        <text:list-item>
          <text:p text:style-name="P37">1 → Ativo Total</text:p>
        </text:list-item>
        <text:list-item>
          <text:p text:style-name="P37">2 → Ativo Circulante</text:p>
        </text:list-item>
        <text:list-item>
          <text:p text:style-name="P37">etc.</text:p>
        </text:list-item>
      </text:list>
      <text:p text:style-name="Horizontal_20_Line"/>
      <text:h text:style-name="Heading_20_1" text:outline-level="1">4️ Script completo – Montando base consolidada</text:h>
      <text:p text:style-name="Preformatted_20_Text"><text:span text:style-name="Source_20_Text">import pandas as pd</text:span></text:p>
      <text:p text:style-name="Preformatted_20_Text"/>
      <text:p text:style-name="Preformatted_20_Text"><text:span text:style-name="Source_20_Text">ano = 2023</text:span></text:p>
      <text:p text:style-name="Preformatted_20_Text"/>
      <text:p text:style-name="Preformatted_20_Text"><text:span text:style-name="Source_20_Text"># Ler arquivos</text:span></text:p>
      <text:p text:style-name="Preformatted_20_Text"><text:span text:style-name="Source_20_Text">bpa = pd.read_csv(f'dfp_cia_aberta_BPA_con_{ano}.csv', sep=';', encoding='latin1')</text:span></text:p>
      <text:p text:style-name="Preformatted_20_Text"><text:span text:style-name="Source_20_Text">bpp = pd.read_csv(f'dfp_cia_aberta_BPP_con_{ano}.csv', sep=';', encoding='latin1')</text:span></text:p>
      <text:p text:style-name="Preformatted_20_Text"><text:span text:style-name="Source_20_Text">dre = pd.read_csv(f'dfp_cia_aberta_DRE_con_{ano}.csv', sep=';', encoding='latin1')</text:span></text:p>
      <text:p text:style-name="Preformatted_20_Text"/>
      <text:p text:style-name="Preformatted_20_Text"><text:span text:style-name="Source_20_Text"># Filtrar apenas contas sintéticas</text:span></text:p>
      <text:p text:style-name="Preformatted_20_Text"><text:span text:style-name="Source_20_Text">bpa = bpa[bpa['NIVEL_CONTA'] &lt;= 2]</text:span></text:p>
      <text:p text:style-name="Preformatted_20_Text"><text:span text:style-name="Source_20_Text">bpp = bpp[bpp['NIVEL_CONTA'] &lt;= 2]</text:span></text:p>
      <text:p text:style-name="Preformatted_20_Text"><text:span text:style-name="Source_20_Text">dre = dre[dre['NIVEL_CONTA'] &lt;= 2]</text:span></text:p>
      <text:p text:style-name="Preformatted_20_Text"/>
      <text:p text:style-name="Preformatted_20_Text"><text:span text:style-name="Source_20_Text"># Selecionar contas principais</text:span></text:p>
      <text:p text:style-name="Preformatted_20_Text"><text:span text:style-name="Source_20_Text">ativo_total = bpa[bpa['DS_CONTA'] == 'Ativo Total']</text:span></text:p>
      <text:p text:style-name="Preformatted_20_Text"><text:span text:style-name="Source_20_Text">passivo_total = bpp[bpp['DS_CONTA'] == 'Passivo Total']</text:span></text:p>
      <text:p text:style-name="Preformatted_20_Text"><text:span text:style-name="Source_20_Text">pl = bpp[bpp['DS_CONTA'] == 'Patrimônio Líquido']</text:span></text:p>
      <text:p text:style-name="Preformatted_20_Text"><text:span text:style-name="Source_20_Text">receita = dre[dre['DS_CONTA'] == 'Receita Líquida']</text:span></text:p>
      <text:p text:style-name="Preformatted_20_Text"><text:span text:style-name="Source_20_Text">lucro = dre[dre['DS_CONTA'] == 'Lucro Líquido']</text:span></text:p>
      <text:p text:style-name="Preformatted_20_Text"/>
      <text:p text:style-name="Preformatted_20_Text"><text:span text:style-name="Source_20_Text"># Merge</text:span></text:p>
      <text:p text:style-name="Preformatted_20_Text"><text:span text:style-name="Source_20_Text">base = ativo_total[['CNPJ_CIA','DENOM_CIA','VL_CONTA']].rename(columns={'VL_CONTA':'Ativo_Total'})</text:span></text:p>
      <text:p text:style-name="Preformatted_20_Text"/>
      <text:p text:style-name="Preformatted_20_Text"><text:span text:style-name="Source_20_Text">base = base.merge(passivo_total[['CNPJ_CIA','VL_CONTA']], on='CNPJ_CIA')</text:span></text:p>
      <text:p text:style-name="Preformatted_20_Text"><text:span text:style-name="Source_20_Text">base = base.rename(columns={'VL_CONTA':'Passivo_Total'})</text:span></text:p>
      <text:p text:style-name="Preformatted_20_Text"/>
      <text:p text:style-name="Preformatted_20_Text"><text:span text:style-name="Source_20_Text">base = base.merge(pl[['CNPJ_CIA','VL_CONTA']], on='CNPJ_CIA')</text:span></text:p>
      <text:p text:style-name="Preformatted_20_Text"><text:span text:style-name="Source_20_Text">base = base.rename(columns={'VL_CONTA':'Patrimonio_Liquido'})</text:span></text:p>
      <text:p text:style-name="Preformatted_20_Text"/>
      <text:p text:style-name="Preformatted_20_Text"><text:span text:style-name="Source_20_Text">base = base.merge(receita[['CNPJ_CIA','VL_CONTA']], on='CNPJ_CIA')</text:span></text:p>
      <text:p text:style-name="Preformatted_20_Text"><text:span text:style-name="Source_20_Text">base = base.rename(columns={'VL_CONTA':'Receita_Liquida'})</text:span></text:p>
      <text:p text:style-name="Preformatted_20_Text"/>
      <text:p text:style-name="Preformatted_20_Text"><text:span text:style-name="Source_20_Text">base = base.merge(lucro[['CNPJ_CIA','VL_CONTA']], on='CNPJ_CIA')</text:span></text:p>
      <text:p text:style-name="Preformatted_20_Text"><text:span text:style-name="Source_20_Text">base = base.rename(columns={'VL_CONTA':'Lucro_Liquido'})</text:span></text:p>
      <text:p text:style-name="Preformatted_20_Text"/>
      <text:p text:style-name="Preformatted_20_Text"><text:span text:style-name="Source_20_Text"># Criar indicadores</text:span></text:p>
      <text:p text:style-name="Preformatted_20_Text"><text:span text:style-name="Source_20_Text">base['ROA'] = base['Lucro_Liquido'] / base['Ativo_Total']</text:span></text:p>
      <text:p text:style-name="Preformatted_20_Text"><text:span text:style-name="Source_20_Text">base['ROE'] = base['Lucro_Liquido'] / base['Patrimonio_Liquido']</text:span></text:p>
      <text:p text:style-name="Preformatted_20_Text"/>
      <text:p text:style-name="P2"><text:span text:style-name="Source_20_Text">print(base.head())</text:span></text:p>
      <text:h text:style-name="Heading_20_1" text:outline-level="1"><text:soft-page-break/>PARTE 2 — EXTRAIR AUTOMATICAMENTE TODAS AS CONTROLADAS</text:h>
      <text:p text:style-name="Text_20_body">Agora vamos à parte estrutural do grupo econômico.</text:p>
      <text:h text:style-name="Heading_20_1" text:outline-level="1">1️ Fonte correta</text:h>
      <text:p text:style-name="Text_20_body">CVM → Formulário de Referência (dados estruturados)</text:p>
      <text:p text:style-name="Text_20_body">Link base:</text:p>
      <text:p text:style-name="Text_20_body">👉 <text:a xlink:type="simple" xlink:href="https://dados.cvm.gov.br/dados/CIA_ABERTA/DOC/FRE/DADOS/" text:style-name="Internet_20_link" text:visited-style-name="Visited_20_Internet_20_Link">https://dados.cvm.gov.br/dados/CIA_ABERTA/DOC/FRE/DADOS/</text:a></text:p>
      <text:p text:style-name="Text_20_body">Baixe:</text:p>
      <text:p text:style-name="P2"><text:span text:style-name="Source_20_Text">fre_cia_aberta_2023.zip</text:span></text:p>
      <text:h text:style-name="Heading_20_1" text:outline-level="1">2️ Onde estão as controladas?</text:h>
      <text:p text:style-name="Text_20_body">Arquivo:</text:p>
      <text:p text:style-name="P2"><text:span text:style-name="Source_20_Text">fre_cia_aberta_2023.csv</text:span></text:p>
      <text:p text:style-name="Text_20_body">Campo importante:</text:p>
      <text:list xml:id="list366095451" text:style-name="L35">
        <text:list-item>
          <text:p text:style-name="P38">DESCRICAO</text:p>
        </text:list-item>
        <text:list-item>
          <text:p text:style-name="P38">DENOM_SOCIAL</text:p>
        </text:list-item>
        <text:list-item>
          <text:p text:style-name="P38">PARTICIPACAO</text:p>
        </text:list-item>
        <text:list-item>
          <text:p text:style-name="P38">PAIS</text:p>
        </text:list-item>
        <text:list-item>
          <text:p text:style-name="P38">TIPO_RELACAO</text:p>
        </text:list-item>
      </text:list>
      <text:h text:style-name="Heading_20_1" text:outline-level="1">3️ Script para extrair controladas de uma empresa</text:h>
      <text:p text:style-name="Preformatted_20_Text"><text:span text:style-name="Source_20_Text">fre = pd.read_csv('fre_cia_aberta_2023.csv', sep=';', encoding='latin1')</text:span></text:p>
      <text:p text:style-name="Preformatted_20_Text"/>
      <text:p text:style-name="Preformatted_20_Text"><text:span text:style-name="Source_20_Text">empresa = fre[fre['DENOM_CIA'] == 'PETROBRAS']</text:span></text:p>
      <text:p text:style-name="Preformatted_20_Text"/>
      <text:p text:style-name="Preformatted_20_Text"><text:span text:style-name="Source_20_Text">controladas = empresa[empresa['TIPO_RELACAO'] == 'Controlada']</text:span></text:p>
      <text:p text:style-name="Preformatted_20_Text"/>
      <text:p text:style-name="P2"><text:span text:style-name="Source_20_Text">print(controladas[['DENOM_SOCIAL','PARTICIPACAO','PAIS']])</text:span></text:p>
      <text:p text:style-name="Horizontal_20_Line"/>
      <text:h text:style-name="Heading_20_1" text:outline-level="1"><text:soft-page-break/>4️ Contar número de subsidiárias</text:h>
      <text:p text:style-name="Preformatted_20_Text"><text:span text:style-name="Source_20_Text">num_controladas = controladas.shape[0]</text:span></text:p>
      <text:p text:style-name="P2"><text:span text:style-name="Source_20_Text">print(num_controladas)</text:span></text:p>
      <text:p text:style-name="Horizontal_20_Line"/>
      <text:h text:style-name="Heading_20_1" text:outline-level="1">EXTRA — Construir Índice de Complexidade Corporativa</text:h>
      <text:p text:style-name="Text_20_body">Você pode criar variáveis como:</text:p>
      <text:p text:style-name="Preformatted_20_Text"><text:span text:style-name="Source_20_Text">indice_complexidade = (</text:span></text:p>
      <text:p text:style-name="Preformatted_20_Text"><text:span text:style-name="Source_20_Text"><text:s text:c="4"/>num_controladas * 0.5 +</text:span></text:p>
      <text:p text:style-name="Preformatted_20_Text"><text:span text:style-name="Source_20_Text"><text:s text:c="4"/>numero_paises * 0.3 +</text:span></text:p>
      <text:p text:style-name="Preformatted_20_Text"><text:span text:style-name="Source_20_Text"><text:s text:c="4"/>numero_controladas_indiretas * 0.2</text:span></text:p>
      <text:p text:style-name="P2"><text:span text:style-name="Source_20_Text">)</text:span></text:p>
      <text:p text:style-name="Text_20_body">E integrar ao seu modelo econométrico.</text:p>
      <text:p text:style-name="Horizontal_20_Line"/>
      <text:h text:style-name="Heading_20_1" text:outline-level="1">ESTRUTURA FINAL DO BANCO (FINANCEIRO + ESTRUTURAL)</text:h>
      <text:p text:style-name="Text_20_body">| Empresa | Ano | Ativo | Receita | Lucro | Nº Controladas | Nº Países | ROA | ROE | Complexidade |</text:p>
      <text:p text:style-name="Text_20_body">Agora você tem:</text:p>
      <text:p text:style-name="Text_20_body">✔ Dados consolidados<text:line-break/>✔ Estrutura societária<text:line-break/>✔ Variáveis para regressão<text:line-break/>✔ Base replicável</text:p>
      <text:h text:style-name="Heading_20_1" text:outline-level="1">1️ SCRIPT — BAIXAR AUTOMATICAMENTE TODOS OS ANOS (2010–2024)</text:h>
      <text:p text:style-name="Text_20_body">Fonte oficial:<text:line-break/>📂 <text:a xlink:type="simple" xlink:href="https://dados.cvm.gov.br/dados/CIA_ABERTA/DOC/DFP/DADOS/" text:style-name="Internet_20_link" text:visited-style-name="Visited_20_Internet_20_Link">https://dados.cvm.gov.br/dados/CIA_ABERTA/DOC/DFP/DADOS/</text:a></text:p>
      <text:p text:style-name="Horizontal_20_Line"/>
      <text:h text:style-name="Heading_20_2" text:outline-level="2">Script automático de download</text:h>
      <text:p text:style-name="Preformatted_20_Text"><text:span text:style-name="Source_20_Text">import requests</text:span></text:p>
      <text:p text:style-name="Preformatted_20_Text"><text:span text:style-name="Source_20_Text">import zipfile</text:span></text:p>
      <text:p text:style-name="Preformatted_20_Text"><text:span text:style-name="Source_20_Text">import io</text:span></text:p>
      <text:p text:style-name="Preformatted_20_Text"><text:soft-page-break/><text:span text:style-name="Source_20_Text">import os</text:span></text:p>
      <text:p text:style-name="Preformatted_20_Text"/>
      <text:p text:style-name="Preformatted_20_Text"><text:span text:style-name="Source_20_Text">anos = range(2010, 2025)</text:span></text:p>
      <text:p text:style-name="Preformatted_20_Text"/>
      <text:p text:style-name="Preformatted_20_Text"><text:span text:style-name="Source_20_Text">base_url = "https://dados.cvm.gov.br/dados/CIA_ABERTA/DOC/DFP/DADOS/"</text:span></text:p>
      <text:p text:style-name="Preformatted_20_Text"/>
      <text:p text:style-name="Preformatted_20_Text"><text:span text:style-name="Source_20_Text">os.makedirs("dados_cvm", exist_ok=True)</text:span></text:p>
      <text:p text:style-name="Preformatted_20_Text"/>
      <text:p text:style-name="Preformatted_20_Text"><text:span text:style-name="Source_20_Text">for ano in anos:</text:span></text:p>
      <text:p text:style-name="Preformatted_20_Text"><text:span text:style-name="Source_20_Text"><text:s text:c="4"/>url = f"{base_url}dfp_cia_aberta_{ano}.zip"</text:span></text:p>
      <text:p text:style-name="Preformatted_20_Text"><text:span text:style-name="Source_20_Text"><text:s text:c="4"/>print(f"Baixando {ano}...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r = requests.get(url)</text:span></text:p>
      <text:p text:style-name="Preformatted_20_Text"><text:span text:style-name="Source_20_Text"><text:s text:c="4"/>if r.status_code == 200:</text:span></text:p>
      <text:p text:style-name="Preformatted_20_Text"><text:span text:style-name="Source_20_Text"><text:s text:c="8"/>z = zipfile.ZipFile(io.BytesIO(r.content))</text:span></text:p>
      <text:p text:style-name="Preformatted_20_Text"><text:span text:style-name="Source_20_Text"><text:s text:c="8"/>z.extractall(f"dados_cvm/{ano}")</text:span></text:p>
      <text:p text:style-name="Preformatted_20_Text"><text:span text:style-name="Source_20_Text"><text:s text:c="8"/>print(f"Ano {ano} extraído.")</text:span></text:p>
      <text:p text:style-name="Preformatted_20_Text"><text:span text:style-name="Source_20_Text"><text:s text:c="4"/>else:</text:span></text:p>
      <text:p text:style-name="P2"><text:span text:style-name="Source_20_Text"><text:s text:c="8"/>print(f"Ano {ano} não disponível.")</text:span></text:p>
      <text:p text:style-name="Text_20_body">Isso já baixa todas as demonstrações consolidadas do período.</text:p>
      <text:p text:style-name="Horizontal_20_Line"/>
      <text:h text:style-name="Heading_20_1" text:outline-level="1">2️ GERAR PAINEL 2010–2024 (PRONTO PARA REGRESSÃO)</text:h>
      <text:p text:style-name="Text_20_body">Agora vamos montar a base consolidada.</text:p>
      <text:p text:style-name="Horizontal_20_Line"/>
      <text:h text:style-name="Heading_20_2" text:outline-level="2">Script para montar painel</text:h>
      <text:p text:style-name="Preformatted_20_Text"><text:span text:style-name="Source_20_Text">import pandas as pd</text:span></text:p>
      <text:p text:style-name="Preformatted_20_Text"><text:span text:style-name="Source_20_Text">import glob</text:span></text:p>
      <text:p text:style-name="Preformatted_20_Text"/>
      <text:p text:style-name="Preformatted_20_Text"><text:span text:style-name="Source_20_Text">anos = range(2010, 2025)</text:span></text:p>
      <text:p text:style-name="Preformatted_20_Text"><text:span text:style-name="Source_20_Text">painel = []</text:span></text:p>
      <text:p text:style-name="Preformatted_20_Text"/>
      <text:p text:style-name="Preformatted_20_Text"><text:span text:style-name="Source_20_Text">for ano in anos:</text:span></text:p>
      <text:p text:style-name="Preformatted_20_Text"><text:span text:style-name="Source_20_Text"><text:s text:c="4"/>dre_path = f"dados_cvm/{ano}/dfp_cia_aberta_DRE_con_{ano}.csv"</text:span></text:p>
      <text:p text:style-name="Preformatted_20_Text"><text:span text:style-name="Source_20_Text"><text:s text:c="4"/>bpa_path = f"dados_cvm/{ano}/dfp_cia_aberta_BPA_con_{ano}.csv"</text:span></text:p>
      <text:p text:style-name="Preformatted_20_Text"><text:span text:style-name="Source_20_Text"><text:s text:c="4"/>bpp_path = f"dados_cvm/{ano}/dfp_cia_aberta_BPP_con_{ano}.csv"</text:span></text:p>
      <text:p text:style-name="Preformatted_20_Text"><text:span text:style-name="Source_20_Text"><text:s text:c="4"/></text:span></text:p>
      <text:p text:style-name="Preformatted_20_Text"><text:span text:style-name="Source_20_Text"><text:s text:c="4"/>dre = pd.read_csv(dre_path, sep=';', encoding='latin1')</text:span></text:p>
      <text:p text:style-name="Preformatted_20_Text"><text:span text:style-name="Source_20_Text"><text:s text:c="4"/>bpa = pd.read_csv(bpa_path, sep=';', encoding='latin1')</text:span></text:p>
      <text:p text:style-name="Preformatted_20_Text"><text:span text:style-name="Source_20_Text"><text:s text:c="4"/>bpp = pd.read_csv(bpp_path, sep=';', encoding='latin1')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ceita = dre[dre['DS_CONTA'] == 'Receita Líquida']</text:span></text:p>
      <text:p text:style-name="Preformatted_20_Text"><text:span text:style-name="Source_20_Text"><text:s text:c="4"/>lucro = dre[dre['DS_CONTA'] == 'Lucro Líquido']</text:span></text:p>
      <text:p text:style-name="Preformatted_20_Text"><text:span text:style-name="Source_20_Text"><text:s text:c="4"/>ativo = bpa[bpa['DS_CONTA'] == 'Ativo Total']</text:span></text:p>
      <text:p text:style-name="Preformatted_20_Text"><text:span text:style-name="Source_20_Text"><text:s text:c="4"/>pl = bpp[bpp['DS_CONTA'] == 'Patrimônio Líquido']</text:span></text:p>
      <text:p text:style-name="Preformatted_20_Text"><text:span text:style-name="Source_20_Text"><text:s text:c="4"/></text:span></text:p>
      <text:p text:style-name="Preformatted_20_Text"><text:span text:style-name="Source_20_Text"><text:s text:c="4"/>base = receita[['CNPJ_CIA','DENOM_CIA','VL_CONTA']].rename(columns={'VL_CONTA':'Receita'})</text:span></text:p>
      <text:p text:style-name="Preformatted_20_Text"><text:span text:style-name="Source_20_Text"><text:s text:c="4"/>base['Ano'] = ano</text:span></text:p>
      <text:p text:style-name="Preformatted_20_Text"><text:span text:style-name="Source_20_Text"><text:s text:c="4"/></text:span></text:p>
      <text:p text:style-name="Preformatted_20_Text"><text:span text:style-name="Source_20_Text"><text:s text:c="4"/>base = base.merge(lucro[['CNPJ_CIA','VL_CONTA']], on='CNPJ_CIA')</text:span></text:p>
      <text:p text:style-name="Preformatted_20_Text"><text:soft-page-break/><text:span text:style-name="Source_20_Text"><text:s text:c="4"/>base = base.rename(columns={'VL_CONTA':'Lucro'})</text:span></text:p>
      <text:p text:style-name="Preformatted_20_Text"><text:span text:style-name="Source_20_Text"><text:s text:c="4"/></text:span></text:p>
      <text:p text:style-name="Preformatted_20_Text"><text:span text:style-name="Source_20_Text"><text:s text:c="4"/>base = base.merge(ativo[['CNPJ_CIA','VL_CONTA']], on='CNPJ_CIA')</text:span></text:p>
      <text:p text:style-name="Preformatted_20_Text"><text:span text:style-name="Source_20_Text"><text:s text:c="4"/>base = base.rename(columns={'VL_CONTA':'Ativo'})</text:span></text:p>
      <text:p text:style-name="Preformatted_20_Text"><text:span text:style-name="Source_20_Text"><text:s text:c="4"/></text:span></text:p>
      <text:p text:style-name="Preformatted_20_Text"><text:span text:style-name="Source_20_Text"><text:s text:c="4"/>base = base.merge(pl[['CNPJ_CIA','VL_CONTA']], on='CNPJ_CIA')</text:span></text:p>
      <text:p text:style-name="Preformatted_20_Text"><text:span text:style-name="Source_20_Text"><text:s text:c="4"/>base = base.rename(columns={'VL_CONTA':'PL'})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inel.append(base)</text:span></text:p>
      <text:p text:style-name="Preformatted_20_Text"/>
      <text:p text:style-name="Preformatted_20_Text"><text:span text:style-name="Source_20_Text">painel_final = pd.concat(painel)</text:span></text:p>
      <text:p text:style-name="Preformatted_20_Text"/>
      <text:p text:style-name="Preformatted_20_Text"><text:span text:style-name="Source_20_Text">painel_final['ROA'] = painel_final['Lucro'] / painel_final['Ativo']</text:span></text:p>
      <text:p text:style-name="Preformatted_20_Text"><text:span text:style-name="Source_20_Text">painel_final['ROE'] = painel_final['Lucro'] / painel_final['PL']</text:span></text:p>
      <text:p text:style-name="Preformatted_20_Text"/>
      <text:p text:style-name="Preformatted_20_Text"><text:span text:style-name="Source_20_Text">painel_final.to_csv("painel_2010_2024.csv", index=False)</text:span></text:p>
      <text:p text:style-name="Preformatted_20_Text"/>
      <text:p text:style-name="P2"><text:span text:style-name="Source_20_Text">print("Painel pronto.")</text:span></text:p>
      <text:p text:style-name="Text_20_body">Agora você tem um <text:span text:style-name="Strong_20_Emphasis">painel longitudinal consolidado</text:span>.</text:p>
      <text:h text:style-name="Heading_20_1" text:outline-level="1">3️ MODELO ECONOMÉTRICO (PAINEL COM EFEITOS FIXOS)</text:h>
      <text:p text:style-name="Text_20_body">Vamos usar <text:span text:style-name="Source_20_Text">linearmodels</text:span> (Python).</text:p>
      <text:p text:style-name="Text_20_body">Instale:</text:p>
      <text:p text:style-name="P2"><text:span text:style-name="Source_20_Text">pip install linearmodels</text:span></text:p>
      <text:h text:style-name="Heading_20_2" text:outline-level="2">Exemplo: ROA como dependente</text:h>
      <text:p text:style-name="Preformatted_20_Text"><text:span text:style-name="Source_20_Text">from linearmodels.panel import PanelOLS</text:span></text:p>
      <text:p text:style-name="Preformatted_20_Text"><text:span text:style-name="Source_20_Text">import statsmodels.api as sm</text:span></text:p>
      <text:p text:style-name="Preformatted_20_Text"/>
      <text:p text:style-name="Preformatted_20_Text"><text:span text:style-name="Source_20_Text">painel = pd.read_csv("painel_2010_2024.csv")</text:span></text:p>
      <text:p text:style-name="Preformatted_20_Text"/>
      <text:p text:style-name="Preformatted_20_Text"><text:span text:style-name="Source_20_Text">painel = painel.set_index(['CNPJ_CIA','Ano'])</text:span></text:p>
      <text:p text:style-name="Preformatted_20_Text"/>
      <text:p text:style-name="Preformatted_20_Text"><text:span text:style-name="Source_20_Text">X = painel[['Receita','Ativo']]</text:span></text:p>
      <text:p text:style-name="Preformatted_20_Text"><text:span text:style-name="Source_20_Text">X = sm.add_constant(X)</text:span></text:p>
      <text:p text:style-name="Preformatted_20_Text"/>
      <text:p text:style-name="Preformatted_20_Text"><text:span text:style-name="Source_20_Text">modelo = PanelOLS(painel['ROA'], X, entity_effects=True, time_effects=True)</text:span></text:p>
      <text:p text:style-name="Preformatted_20_Text"><text:span text:style-name="Source_20_Text">resultado = modelo.fit(cov_type='robust')</text:span></text:p>
      <text:p text:style-name="Preformatted_20_Text"/>
      <text:p text:style-name="P2"><text:span text:style-name="Source_20_Text">print(resultado.summary)</text:span></text:p>
      <text:p text:style-name="Text_20_body">Isso gera:</text:p>
      <text:p text:style-name="Text_20_body">✔ Efeitos fixos por empresa<text:line-break/>✔ Efeitos temporais<text:line-break/>✔ Erros robustos</text:p>
      <text:h text:style-name="Heading_20_1" text:outline-level="1"><text:soft-page-break/>4️ INTEGRAÇÃO COM GOVERNANÇA (WGI + ESTRUTURA CORPORATIVA)</text:h>
      <text:h text:style-name="Heading_20_2" text:outline-level="2">Passo 1 — Inserir WGI (World Governance Indicators)</text:h>
      <text:p text:style-name="Text_20_body">Você pode baixar do Banco Mundial:</text:p>
      <text:p text:style-name="Text_20_body"><text:a xlink:type="simple" xlink:href="https://info.worldbank.org/governance/wgi/" text:style-name="Internet_20_link" text:visited-style-name="Visited_20_Internet_20_Link">https://info.worldbank.org/governance/wgi/</text:a></text:p>
      <text:p text:style-name="Text_20_body">Selecionar:</text:p>
      <text:list xml:id="list2861443444" text:style-name="L37">
        <text:list-item>
          <text:p text:style-name="P40">Control of Corruption</text:p>
        </text:list-item>
        <text:list-item>
          <text:p text:style-name="P40">Government Effectiveness</text:p>
        </text:list-item>
        <text:list-item>
          <text:p text:style-name="P40">Regulatory Quality</text:p>
        </text:list-item>
        <text:list-item>
          <text:p text:style-name="P40">Rule of Law</text:p>
        </text:list-item>
        <text:list-item>
          <text:p text:style-name="P40">Political Stability</text:p>
        </text:list-item>
        <text:list-item>
          <text:p text:style-name="P40">Voice and Accountability</text:p>
        </text:list-item>
      </text:list>
      <text:p text:style-name="Text_20_body">Criar média ponderada ou usar individualmente.</text:p>
      <text:h text:style-name="Heading_20_2" text:outline-level="2">Passo 2 — Inserir Complexidade Corporativa</text:h>
      <text:p text:style-name="Text_20_body">Do Formulário de Referência:</text:p>
      <text:p text:style-name="Text_20_body">Variáveis possíveis:</text:p>
      <text:list xml:id="list1593291158" text:style-name="L38">
        <text:list-item>
          <text:p text:style-name="P41">Nº total de controladas</text:p>
        </text:list-item>
        <text:list-item>
          <text:p text:style-name="P41">Nº de países</text:p>
        </text:list-item>
        <text:list-item>
          <text:p text:style-name="P41">% subsidiárias no exterior</text:p>
        </text:list-item>
        <text:list-item>
          <text:p text:style-name="P41">Participações indiretas</text:p>
        </text:list-item>
      </text:list>
      <text:p text:style-name="Text_20_body">Criar índice:</text:p>
      <text:p text:style-name="Preformatted_20_Text"><text:span text:style-name="Source_20_Text">painel['Complexidade'] = (</text:span></text:p>
      <text:p text:style-name="Preformatted_20_Text"><text:span text:style-name="Source_20_Text"><text:s text:c="4"/>painel['Num_Controladas']*0.4 +</text:span></text:p>
      <text:p text:style-name="Preformatted_20_Text"><text:span text:style-name="Source_20_Text"><text:s text:c="4"/>painel['Num_Paises']*0.3 +</text:span></text:p>
      <text:p text:style-name="Preformatted_20_Text"><text:span text:style-name="Source_20_Text"><text:s text:c="4"/>painel['Subs_Exterior']*0.3</text:span></text:p>
      <text:p text:style-name="P2"><text:span text:style-name="Source_20_Text">)</text:span></text:p>
      <text:h text:style-name="Heading_20_2" text:outline-level="2">Modelo Final Integrado</text:h>
      <text:p text:style-name="Preformatted_20_Text"><text:span text:style-name="Source_20_Text">X = painel[['Receita','Ativo','Complexidade','WGI']]</text:span></text:p>
      <text:p text:style-name="Preformatted_20_Text"><text:span text:style-name="Source_20_Text">X = sm.add_constant(X)</text:span></text:p>
      <text:p text:style-name="Preformatted_20_Text"/>
      <text:p text:style-name="Preformatted_20_Text"><text:span text:style-name="Source_20_Text">modelo = PanelOLS(painel['ROA'], X, entity_effects=True, time_effects=True)</text:span></text:p>
      <text:p text:style-name="Preformatted_20_Text"><text:span text:style-name="Source_20_Text">resultado = modelo.fit(cov_type='clustered', cluster_entity=True)</text:span></text:p>
      <text:p text:style-name="Preformatted_20_Text"/>
      <text:p text:style-name="P2"><text:span text:style-name="Source_20_Text">print(resultado.summary)</text:span></text:p>
      <text:h text:style-name="Heading_20_1" text:outline-level="1"><text:soft-page-break/>ESTRUTURA DO MODELO TEÓRICO</text:h>
      <text:p text:style-name="Text_20_body">Você pode testar:</text:p>
      <text:h text:style-name="Heading_20_3" text:outline-level="3">H1: Maior complexidade corporativa → menor desempenho</text:h>
      <text:h text:style-name="Heading_20_3" text:outline-level="3">H2: WGI modera impacto da complexidade</text:h>
      <text:p text:style-name="Text_20_body">Modelo de interação:</text:p>
      <text:p text:style-name="P2"><text:span text:style-name="Source_20_Text">painel['Interacao'] = painel['Complexidade'] * painel['WGI']</text:span></text:p>
      <text:h text:style-name="Heading_20_1" text:outline-level="1">Resultado Final</text:h>
      <text:p text:style-name="Text_20_body">Você passa a ter:</text:p>
      <text:p text:style-name="Text_20_body">✔ Painel 2010–2024<text:line-break/>✔ Dados consolidados oficiais (CVM)<text:line-break/>✔ Estrutura societária<text:line-break/>✔ Variáveis institucionais<text:line-break/>✔ Modelo econométrico replicável<text:line-break/>✔ Potencial artigo Qualis A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2T11:20:06.911000000</meta:creation-date>
    <dc:date>2026-02-12T12:35:11.206000000</dc:date>
    <meta:editing-duration>PT1M39S</meta:editing-duration>
    <meta:editing-cycles>1</meta:editing-cycles>
    <meta:generator>LibreOffice/7.1.4.2$Windows_X86_64 LibreOffice_project/a529a4fab45b75fefc5b6226684193eb000654f6</meta:generator>
    <meta:document-statistic meta:table-count="3" meta:image-count="0" meta:object-count="0" meta:page-count="21" meta:paragraph-count="567" meta:word-count="2549" meta:character-count="20688" meta:non-whitespace-character-count="18573"/>
  </office:meta>
</office:document-meta>
</file>