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D0000002CADF371315B04EEE8.png" manifest:media-type="image/png"/>
  <manifest:file-entry manifest:full-path="Pictures/10000201000002CB000000DE25A534B29A4F7B8F.png" manifest:media-type="image/png"/>
  <manifest:file-entry manifest:full-path="Pictures/10000201000000E5000000294355A60BDF5EFADA.png" manifest:media-type="image/png"/>
  <manifest:file-entry manifest:full-path="Pictures/100000000000030B000001BC8763D7035B78064A.png" manifest:media-type="image/png"/>
  <manifest:file-entry manifest:full-path="Pictures/10000000000003290000026AC98057F4FC73C62C.png" manifest:media-type="image/png"/>
  <manifest:file-entry manifest:full-path="Pictures/10000000000003760000001A4B1CF0FD277BC28D.png" manifest:media-type="image/png"/>
  <manifest:file-entry manifest:full-path="Pictures/100000000000032F000001E6376CC7794FAE95D7.png" manifest:media-type="image/png"/>
  <manifest:file-entry manifest:full-path="Pictures/10000000000002CD000000A8BEBD9F9D88415911.png" manifest:media-type="image/png"/>
  <manifest:file-entry manifest:full-path="Pictures/100002010000004400000029EF03C2C1A7418185.png" manifest:media-type="image/png"/>
  <manifest:file-entry manifest:full-path="Pictures/TablePreview1.svm" manifest:media-type=""/>
  <manifest:file-entry manifest:full-path="Pictures/100002010000007B0000002947357E7C2EC4418A.png" manifest:media-type="image/png"/>
  <manifest:file-entry manifest:full-path="Pictures/100000000000030E000001C56528DAF52ED71CD8.png" manifest:media-type="image/png"/>
  <manifest:file-entry manifest:full-path="Pictures/100000000000045D000001ADE9B4BAEF822DBE26.png" manifest:media-type="image/png"/>
  <manifest:file-entry manifest:full-path="Pictures/10000000000003D4000000DCA52E80C22E5B4F66.png" manifest:media-type="image/png"/>
  <manifest:file-entry manifest:full-path="Pictures/100000000000030A000001C248C21A91B154AED7.png" manifest:media-type="image/png"/>
  <manifest:file-entry manifest:full-path="Pictures/100001F40000070700000446DEBFD64112A24A91.wmf" manifest:media-type="image/x-wmf"/>
  <manifest:file-entry manifest:full-path="Pictures/10000000000003D30000010DCDF093C3E0D631D3.png" manifest:media-type="image/png"/>
  <manifest:file-entry manifest:full-path="Pictures/100002B8000017B500000447BAC1E513FC616E81.wmf" manifest:media-type="image/x-wmf"/>
  <manifest:file-entry manifest:full-path="Pictures/TablePreview3.svm" manifest:media-type=""/>
  <manifest:file-entry manifest:full-path="Pictures/1000023800000CAD00000446015034C8846D8D00.wmf" manifest:media-type="image/x-wmf"/>
  <manifest:file-entry manifest:full-path="Pictures/1000020100000099000000292DDCF77000005FB1.png" manifest:media-type="image/png"/>
  <manifest:file-entry manifest:full-path="Pictures/TablePreview4.svm" manifest:media-type=""/>
  <manifest:file-entry manifest:full-path="Pictures/10000201000000440000002939E36ED43B49F7D7.png" manifest:media-type="image/png"/>
  <manifest:file-entry manifest:full-path="Pictures/100001FC000009C9000003DC5C926CBF3ED1D3E0.wmf" manifest:media-type="image/x-wmf"/>
  <manifest:file-entry manifest:full-path="Pictures/100002010000005F000000254473CD0C48A0F6EB.png" manifest:media-type="image/png"/>
  <manifest:file-entry manifest:full-path="Pictures/100000000000028B000000B8546D8F429ADF15BE.png" manifest:media-type="image/png"/>
  <manifest:file-entry manifest:full-path="Pictures/1002486C000049DF000016E8F4621C9C161DFFDC.emf" manifest:media-type="image/x-emf"/>
  <manifest:file-entry manifest:full-path="Pictures/TablePreview2.svm" manifest:media-type=""/>
  <manifest:file-entry manifest:full-path="Pictures/1000026200000D17000004465AB9465F129BDA9E.wmf" manifest:media-type="image/x-wmf"/>
  <manifest:file-entry manifest:full-path="Pictures/100001F4000006E4000004469DF04698DF24CAAD.wmf" manifest:media-type="image/x-wmf"/>
  <manifest:file-entry manifest:full-path="Pictures/1000020100000043000000292936A9248DB0B3DB.png" manifest:media-type="image/png"/>
  <manifest:file-entry manifest:full-path="Pictures/100001F4000006E400000446ED59B4261999E69B.wmf" manifest:media-type="image/x-wmf"/>
  <manifest:file-entry manifest:full-path="Pictures/100002010000004300000029B3BAC34545BC2D20.png" manifest:media-type="image/png"/>
  <manifest:file-entry manifest:full-path="Pictures/1000020100000070000000294D2511F89670AD75.png" manifest:media-type="image/png"/>
  <manifest:file-entry manifest:full-path="Pictures/100001F60000072B000004464412EF9F910CECB4.wmf" manifest:media-type="image/x-wmf"/>
  <manifest:file-entry manifest:full-path="Pictures/10000000000002CF0000016C738221338A81ABAE.png" manifest:media-type="image/png"/>
  <manifest:file-entry manifest:full-path="Pictures/10000000000003110000024E9D5CAD5C817A38A2.png" manifest:media-type="image/png"/>
  <manifest:file-entry manifest:full-path="Pictures/100000000000030C000001C168009178F66FEDA1.png" manifest:media-type="image/png"/>
  <manifest:file-entry manifest:full-path="Pictures/100002010000004500000029E39EB13CA7273C4D.png" manifest:media-type="image/png"/>
  <manifest:file-entry manifest:full-path="Pictures/1000021800000D3A00000446B014D715CD995B01.wmf" manifest:media-type="image/x-wmf"/>
  <manifest:file-entry manifest:full-path="Pictures/100002010000008000000029C956227F0026D064.png" manifest:media-type="image/png"/>
  <manifest:file-entry manifest:full-path="Pictures/100000000000030F00000195AD20DE5BCE66540C.png" manifest:media-type="image/png"/>
  <manifest:file-entry manifest:full-path="Pictures/100001F40000070700000446068E9A8BA43D0129.wmf" manifest:media-type="image/x-wmf"/>
  <manifest:file-entry manifest:full-path="Pictures/1000026000000B9300000446F7C319D036D76450.wmf" manifest:media-type="image/x-wmf"/>
  <manifest:file-entry manifest:full-path="Pictures/100001FA00000A56000004464CA00E35A608F5AF.wmf" manifest:media-type="image/x-wmf"/>
  <manifest:file-entry manifest:full-path="Pictures/1000026A00000FD80000044642889B901A8CF152.wmf" manifest:media-type="image/x-wmf"/>
  <manifest:file-entry manifest:full-path="Pictures/1000020100000064000000295C57535B2C49CAEA.png" manifest:media-type="image/png"/>
  <manifest:file-entry manifest:full-path="Pictures/100002010000007F00000029FDCEA28C31E1D585.png" manifest:media-type="image/png"/>
  <manifest:file-entry manifest:full-path="Pictures/10000000000006D1000001656BFD9567CC278A0C.png" manifest:media-type="image/png"/>
  <manifest:file-entry manifest:full-path="Pictures/1000026000000B7100000447B11ABB6E7C2B94F8.wmf" manifest:media-type="image/x-wmf"/>
  <manifest:file-entry manifest:full-path="Pictures/100002010000006F00000029241D63ADD4D2AE0C.png" manifest:media-type="image/png"/>
  <manifest:file-entry manifest:full-path="Pictures/1000028E000010F40000048DE1153AD8ED125F9F.wmf" manifest:media-type="image/x-wmf"/>
  <manifest:file-entry manifest:full-path="Pictures/100000000000028E000000A4507F1C1403E1DF1F.png" manifest:media-type="image/png"/>
  <manifest:file-entry manifest:full-path="Pictures/1000027E000013930000048D539091FC2075240E.wmf" manifest:media-type="image/x-wmf"/>
  <manifest:file-entry manifest:full-path="Pictures/10000201000000A40000002CCDA40CE5AE271FCB.png" manifest:media-type="image/png"/>
  <manifest:file-entry manifest:full-path="Pictures/100000000000028F0000012452688D06657BCFB9.png" manifest:media-type="image/png"/>
  <manifest:file-entry manifest:full-path="Pictures/10000000000003CF0000016FE6C181B6796B7DA7.png" manifest:media-type="image/png"/>
  <manifest:file-entry manifest:full-path="Pictures/10000000000002D1000003646505E9E4E9C19B64.png" manifest:media-type="image/png"/>
  <manifest:file-entry manifest:full-path="Pictures/1000000000000316000002122883DFCD1898F6A2.png" manifest:media-type="image/png"/>
  <manifest:file-entry manifest:full-path="Pictures/10007A08000031AB00001BA9851BEC02E853FA94.emf" manifest:media-type="image/x-emf"/>
  <manifest:file-entry manifest:full-path="Pictures/10000201000001E10000010CB879CEE62BF2BEE9.png" manifest:media-type="image/png"/>
  <manifest:file-entry manifest:full-path="Pictures/10000000000003190000022E57E6888431CF1EF4.png" manifest:media-type="image/png"/>
  <manifest:file-entry manifest:full-path="Pictures/10000000000002CA000001C8F4EFB5C5A1701F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/>
    <style:font-face style:name="Arial1" svg:font-family="Arial" style:font-family-generic="swiss"/>
    <style:font-face style:name="Calibri2" svg:font-family="Calibri" style:font-family-generic="swiss"/>
    <style:font-face style:name="Arial2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Microsoft YaHei" svg:font-family="'Microsoft YaHei'" style:font-family-generic="modern" style:font-pitch="variable"/>
    <style:font-face style:name="Segoe UI1" svg:font-family="'Segoe UI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1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ＭＳ Ｐゴシック1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ed7d31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Objeto_20_sem_20_preenchimento_20_nem_20_linha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22cm, 36.712cm, 0.355cm, 0cm)" draw:image-opacity="100%" style:mirror="none"/>
    </style:style>
    <style:style style:name="gr1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43cm, 14.811cm, 0.439cm, 23.276cm)" draw:image-opacity="100%" style:mirror="none"/>
    </style:style>
    <style:style style:name="gr1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22cm, 23.313cm, 0.355cm, 14.049cm)" draw:image-opacity="100%" style:mirror="none"/>
    </style:style>
    <style:style style:name="gr15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43cm, 0.34cm, 0.439cm, 37.023cm)" draw:image-opacity="100%" style:mirror="none"/>
    </style:style>
    <style:style style:name="gr16" style:family="graphic" style:parent-style-name="standard">
      <style:graphic-properties draw:stroke="solid" svg:stroke-width="0.106cm" svg:stroke-color="#ff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ff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Slide_20_de_20_título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3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6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Slide_20_de_20_título-subtitle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Slide_20_de_20_título-title">
      <style:graphic-properties fo:min-height="3.882cm"/>
      <style:paragraph-properties style:writing-mode="lr-tb"/>
    </style:style>
    <style:style style:name="pr9" style:family="presentation" style:parent-style-name="Slide_20_de_20_título-outline1" style:list-style-name="L5">
      <style:graphic-properties fo:min-height="10.798cm"/>
      <style:paragraph-properties style:writing-mode="lr-tb"/>
    </style:style>
    <style:style style:name="pr10" style:family="presentation" style:parent-style-name="Slide_20_de_20_título-title">
      <style:graphic-properties draw:auto-grow-height="true" fo:min-height="3.131cm"/>
      <style:paragraph-properties style:writing-mode="lr-tb"/>
    </style:style>
    <style:style style:name="pr11" style:family="presentation" style:parent-style-name="Slide_20_de_20_título-outline1">
      <style:graphic-properties fo:min-height="10.798cm"/>
      <style:paragraph-properties style:writing-mode="lr-tb"/>
    </style:style>
    <style:style style:name="pr12" style:family="presentation" style:parent-style-name="Em_20_branco-notes">
      <style:graphic-properties draw:fill-color="#ffffff" fo:min-height="13.364cm"/>
      <style:paragraph-properties style:writing-mode="lr-tb"/>
    </style:style>
    <style:style style:name="pr13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Slide_20_de_20_título-subtitle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ítulo_20_e_20_texto_20_e_20_2_20_partes_20_d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ítulo_20_e_20_texto_20_e_20_2_20_partes_20_de_20_conteúd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ítulo_20_e_20_texto_20_e_20_2_20_partes_20_de_20_conteúd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ítulo_20_e_20_texto_20_e_20_2_20_partes_20_de_20_conteúdo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ítulo_20_e_20_texto_20_e_20_2_20_partes_20_de_20_conteúdo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ítulo_20_e_20_texto_20_e_20_2_20_partes_20_de_20_conteúdo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ítulo_20_e_20_texto_20_e_20_2_20_partes_20_de_20_conteúdo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ítulo_20_e_20_texto_20_e_20_2_20_partes_20_de_20_conteúdo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Soment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Somente_20_título-notes">
      <style:graphic-properties draw:fill-color="#ffffff" fo:min-height="13.364cm"/>
      <style:paragraph-properties style:writing-mode="lr-tb"/>
    </style:style>
    <style:style style:name="pr25" style:family="presentation" style:parent-style-name="Somente_20_título-notes">
      <style:graphic-properties draw:fill-color="#ffffff" fo:min-height="11.429cm"/>
      <style:paragraph-properties style:writing-mode="lr-tb"/>
    </style:style>
    <style:style style:name="pr26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Slide_20_de_20_título-notes">
      <style:graphic-properties draw:fill-color="#ffffff" fo:min-height="11.429cm"/>
      <style:paragraph-properties style:writing-mode="lr-tb"/>
    </style:style>
    <style:style style:name="pr28" style:family="presentation" style:parent-style-name="Slide_20_de_20_título-subtitle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Em_20_branco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Slide_20_de_20_título-title">
      <style:graphic-properties fo:min-height="6.631cm"/>
      <style:paragraph-properties style:writing-mode="lr-tb"/>
    </style:style>
    <style:style style:name="co1" style:family="table-column">
      <style:table-column-properties style:column-width="7.776cm" style:use-optimal-column-width="false"/>
    </style:style>
    <style:style style:name="co2" style:family="table-column">
      <style:table-column-properties style:column-width="12.122cm" style:use-optimal-column-width="false"/>
    </style:style>
    <style:style style:name="co3" style:family="table-column">
      <style:table-column-properties style:column-width="7.597cm" style:use-optimal-column-width="false"/>
    </style:style>
    <style:style style:name="co4" style:family="table-column">
      <style:table-column-properties style:column-width="6.601cm" style:use-optimal-column-width="false"/>
    </style:style>
    <style:style style:name="co5" style:family="table-column">
      <style:table-column-properties style:column-width="7.725cm" style:use-optimal-column-width="false"/>
    </style:style>
    <style:style style:name="co6" style:family="table-column">
      <style:table-column-properties style:column-width="8.272cm" style:use-optimal-column-width="false"/>
    </style:style>
    <style:style style:name="co7" style:family="table-column">
      <style:table-column-properties style:column-width="6.402cm" style:use-optimal-column-width="false"/>
    </style:style>
    <style:style style:name="co8" style:family="table-column">
      <style:table-column-properties style:column-width="10.398cm" style:use-optimal-column-width="false"/>
    </style:style>
    <style:style style:name="ro1" style:family="table-row">
      <style:table-row-properties style:row-height="2.756cm" style:use-optimal-row-height="false"/>
    </style:style>
    <style:style style:name="ro2" style:family="table-row">
      <style:table-row-properties style:row-height="2.963cm" style:use-optimal-row-height="false"/>
    </style:style>
    <style:style style:name="ro3" style:family="table-row">
      <style:table-row-properties style:row-height="2.76cm" style:use-optimal-row-height="false"/>
    </style:style>
    <style:style style:name="ro4" style:family="table-row">
      <style:table-row-properties style:row-height="2.844cm" style:use-optimal-row-height="false"/>
    </style:style>
    <style:style style:name="ro5" style:family="table-row">
      <style:table-row-properties style:row-height="2.54cm" style:use-optimal-row-height="false"/>
    </style:style>
    <style:style style:name="ro6" style:family="table-row">
      <style:table-row-properties style:row-height="2.592cm" style:use-optimal-row-height="false"/>
    </style:style>
    <style:style style:name="ro7" style:family="table-row">
      <style:table-row-properties style:row-height="3.122cm" style:use-optimal-row-height="false"/>
    </style:style>
    <style:style style:name="ro8" style:family="table-row">
      <style:table-row-properties style:row-height="2.593cm" style:use-optimal-row-height="false"/>
    </style:style>
    <style:style style:name="ro9" style:family="table-row">
      <style:table-row-properties style:row-height="3.254cm" style:use-optimal-row-height="false"/>
    </style:style>
    <style:style style:name="ro10" style:family="table-row">
      <style:table-row-properties style:row-height="3.324cm" style:use-optimal-row-height="false"/>
    </style:style>
    <style:style style:name="ro11" style:family="table-row">
      <style:table-row-properties style:row-height="4.004cm" style:use-optimal-row-height="false"/>
    </style:style>
    <style:style style:name="ce1" style:family="table-cell">
      <loext:graphic-properties draw:fill="none" draw:textarea-vertical-align="middle" fo:padding-top="0.13cm" fo:padding-bottom="0.13cm" fo:padding-left="0.25cm" fo:padding-right="0.25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3" style:family="table-cell">
      <loext:graphic-properties draw:fill="none" draw:textarea-vertical-align="middle" fo:padding-top="0.13cm" fo:padding-bottom="0.13cm" fo:padding-left="0.25cm" fo:padding-right="0.25cm"/>
      <style:paragraph-properties fo:border-left="1.11pt solid #000000" fo:border-right="0.48pt solid #000000" fo:border-top="0.48pt solid #000000" fo:border-bottom="0.48pt solid #000000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5" style:family="table-cell">
      <loext:graphic-properties draw:fill="none" draw:textarea-vertical-align="middle" fo:padding-top="0.13cm" fo:padding-bottom="0.13cm" fo:padding-left="0.25cm" fo:padding-right="0.25cm"/>
      <style:paragraph-properties fo:border-left="1.11pt solid #000000" fo:border-right="0.48pt solid #000000" fo:border-top="0.48pt solid #000000" fo:border-bottom="1.11pt solid #000000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0808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 fo:hyphenate="false"/>
    </style:style>
    <style:style style:name="P11" style:family="paragraph">
      <style:paragraph-properties fo:text-align="center"/>
      <style:text-properties fo:color="#111111" loext:opacity="100%"/>
    </style:style>
    <style:style style:name="P12" style:family="paragraph">
      <style:paragraph-properties fo:margin-top="0.5cm" fo:margin-bottom="0cm" fo:line-height="90%" fo:text-align="center" style:punctuation-wrap="hanging" style:writing-mode="lr-tb"/>
      <style:text-properties fo:hyphenate="false"/>
    </style:style>
    <style:style style:name="P13" style:family="paragraph"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style:paragraph-properties fo:text-align="justify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solid" draw:fill-color="#5b9bd5"/>
      <style:paragraph-properties fo:text-align="center" style:font-independent-line-spacing="true"/>
      <style:text-properties fo:font-size="18pt"/>
    </style:style>
    <style:style style:name="P20" style:family="paragraph">
      <style:paragraph-properties fo:margin-left="0.635cm" fo:margin-right="0cm" fo:margin-top="0.353cm" fo:margin-bottom="0cm" fo:line-height="90%" fo:text-align="center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23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.953cm" fo:margin-right="0cm" fo:margin-top="0.198cm" fo:margin-bottom="0cm" fo:line-height="100%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P27" style:family="paragraph">
      <style:paragraph-properties fo:margin-left="0cm" fo:margin-right="0cm" fo:margin-top="0.212cm" fo:margin-bottom="0cm" fo:line-height="100%" fo:text-align="center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9" style:family="paragraph">
      <style:paragraph-properties fo:margin-left="0.953cm" fo:margin-right="0cm" fo:margin-top="0.141cm" fo:margin-bottom="0cm" fo:line-height="100%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113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155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.953cm" fo:margin-right="0cm" fo:margin-top="0.127cm" fo:margin-bottom="0cm" fo:line-height="90%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left="0cm" fo:margin-right="0cm" fo:margin-top="0.127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1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2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39629f" loext:opacity="100%" style:text-line-through-style="none" style:text-line-through-type="none" style:text-position="0% 100%" style:font-name="Arial" fo:font-size="40pt" fo:letter-spacing="normal" fo:language="pt" fo:country="BR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39629f" loext:opacity="100%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" style:family="text">
      <style:text-properties fo:font-variant="normal" fo:text-transform="none" fo:color="#808080" loext:opacity="100%" style:text-line-through-style="none" style:text-line-through-type="none" style:text-position="0% 100%" style:font-name="Arial" fo:font-size="28pt" fo:letter-spacing="normal" fo:language="pt" fo:country="PT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808080" loext:opacity="100%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39629f" loext:opacity="100%" style:text-line-through-style="none" style:text-line-through-type="none" style:text-position="0% 100%" style:font-name="Arial" fo:font-size="60pt" fo:letter-spacing="normal" fo:language="pt" fo:country="PT" fo:font-style="normal" style:text-underline-style="none" fo:font-weight="norm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7" style:family="text">
      <style:text-properties fo:color="#111111" loext:opacity="100%" fo:font-size="44pt" style:font-size-asian="44pt" style:font-size-complex="44pt"/>
    </style:style>
    <style:style style:name="T8" style:family="text">
      <style:text-properties fo:font-variant="normal" fo:text-transform="none" fo:color="#ff4000" loext:opacity="100%" style:text-outline="false" style:text-line-through-style="none" style:text-line-through-type="none" style:text-position="0% 100%" style:font-name="Arial" fo:font-size="80pt" fo:letter-spacing="normal" fo:language="pt" fo:country="BR" fo:font-style="normal" fo:text-shadow="none" style:text-underline-style="none" fo:font-weight="normal" style:letter-kerning="true" fo:background-color="transparent" style:font-name-asian="Microsoft YaHei1" style:font-size-asian="80pt" style:font-style-asian="normal" style:font-weight-asian="normal" style:font-name-complex="Arial" style:font-size-complex="8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80pt" fo:letter-spacing="normal" fo:language="pt" fo:country="BR" fo:font-style="normal" fo:text-shadow="none" style:text-underline-style="none" fo:font-weight="normal" style:letter-kerning="true" fo:background-color="transparent" style:font-name-asian="Microsoft YaHei1" style:font-size-asian="80pt" style:font-style-asian="normal" style:font-weight-asian="normal" style:font-name-complex="Arial" style:font-size-complex="8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be33d" loext:opacity="100%" style:text-outline="false" style:text-line-through-style="none" style:text-line-through-type="none" style:text-position="0% 100%" style:font-name="Arial" fo:font-size="80pt" fo:letter-spacing="normal" fo:language="pt" fo:country="BR" fo:font-style="normal" fo:text-shadow="none" style:text-underline-style="none" fo:font-weight="normal" style:letter-kerning="true" fo:background-color="transparent" style:font-name-asian="Microsoft YaHei1" style:font-size-asian="80pt" style:font-style-asian="normal" style:font-weight-asian="normal" style:font-name-complex="Arial" style:font-size-complex="8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50953" loext:opacity="100%" fo:font-size="80pt" style:font-size-asian="80pt" style:font-size-complex="80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80pt" style:font-size-asian="80pt" style:font-size-complex="80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39629f" loext:opacity="100%" style:text-line-through-style="none" style:text-line-through-type="none" style:text-position="0% 100%" style:font-name="Arial" fo:font-size="60pt" fo:letter-spacing="normal" fo:language="pt" fo:country="BR" fo:font-style="normal" style:text-underline-style="none" fo:font-weight="norm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18" style:family="text">
      <style:text-properties fo:font-variant="normal" fo:text-transform="none" fo:color="#39629f" loext:opacity="100%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19" style:family="text">
      <style:text-properties fo:font-variant="normal" fo:text-transform="none" fo:color="#808080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language="pt" fo:country="BR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pt" fo:country="BR" fo:font-style="italic" style:text-underline-style="none" fo:font-weight="bold" style:font-name-asian="ＭＳ Ｐゴシック1" style:font-size-asian="28pt" style:font-style-asian="italic" style:font-weight-asian="bold" style:font-size-complex="28pt" style:font-style-complex="italic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language="pt" fo:country="BR" fo:font-style="normal" style:text-underline-style="none" fo:font-weight="bold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font-variant="normal" fo:text-transform="none" fo:color="#80808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language="pt" fo:country="BR" fo:font-style="normal" style:text-underline-style="none" fo:font-weight="bold" style:font-name-asian="ＭＳ Ｐゴシック1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33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4" style:family="text">
      <style:text-properties fo:font-variant="normal" fo:text-transform="none" style:text-line-through-style="none" style:text-line-through-type="none" style:text-position="0% 100%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39629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80808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954f72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001cm" text:min-label-width="0.952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Análise Contábil e Fiscal das Demonstrações Contábeis</text:span><text:span text:style-name="T1"><text:line-break/></text:span><text:span text:style-name="T1"><text:line-break/></text:span><text:span text:style-name="T1">IFES</text:span></text:p>
          </draw:text-box>
        </draw:frame>
        <draw:custom-shape draw:name="CaixaDeTexto 3" draw:style-name="gr1" draw:text-style-name="P4" draw:layer="layout" svg:width="6.188cm" svg:height="1.267cm" svg:x="20.89cm" svg:y="15.945cm">
          <text:p text:style-name="P3"><text:span text:style-name="T2">Prof. Dalmone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tapas do Processo de Análise" draw:style-name="dp1" draw:master-page-name="Título_20_e_20_conteúdo" presentation:presentation-page-layout-name="AL2T11">
        <draw:frame draw:name="Título 1" presentation:style-name="pr3" draw:text-style-name="P7" draw:layer="layout" svg:width="25.721cm" svg:height="3.681cm" svg:x="1.752cm" svg:y="0cm" presentation:class="title" presentation:user-transformed="true">
          <draw:text-box>
            <text:p text:style-name="P6"><text:span text:style-name="T3">Etapas do Processo de Análise</text:span></text:p>
          </draw:text-box>
        </draw:frame>
        <draw:frame draw:name="Espaço Reservado para Conteúdo 2" presentation:style-name="pr4" draw:text-style-name="P9" draw:layer="layout" svg:width="30.45cm" svg:height="12.76cm" svg:x="1.752cm" svg:y="4.216cm" presentation:class="outline" presentation:user-transformed="true">
          <draw:text-box>
            <text:list text:style-name="L3">
              <text:list-item>
                <text:p text:style-name="P8"><text:span text:style-name="T4">1. Análise e Avaliação do Parecer dos Auditores</text:span></text:p>
              </text:list-item>
              <text:list-item>
                <text:p text:style-name="P8"><text:span text:style-name="T4">2. Análise do Modelo de Negócio (Relatório Anual)</text:span></text:p>
              </text:list-item>
              <text:list-item>
                <text:p text:style-name="P8"><text:span text:style-name="T4">3. Analise Horizontal e Vertidal das Demonstrações</text:span></text:p>
              </text:list-item>
              <text:list-item>
                <text:p text:style-name="P8"><text:span text:style-name="T4">4. Análise da Grau de Liquidez</text:span></text:p>
              </text:list-item>
              <text:list-item>
                <text:p text:style-name="P8"><text:span text:style-name="T4">5. Análise da </text:span><text:span text:style-name="T5">Estrutura de Capital</text:span></text:p>
              </text:list-item>
              <text:list-item>
                <text:p text:style-name="P8"><text:span text:style-name="T5">6. Analise da Nível de Rentabilidade</text:span></text:p>
              </text:list-item>
              <text:list-item>
                <text:p text:style-name="P8"><text:span text:style-name="T5">7. Analise dos índices de atividade</text:span></text:p>
              </text:list-item>
            </text:list>
            <text:p text:style-name="P8"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_20_de_20_título" presentation:presentation-page-layout-name="AL1T0">
        <draw:frame draw:name="Título 4" presentation:style-name="pr6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6">3. Análise Horizontal e Vertical das Demonstrações</text:span></text:p>
          </draw:text-box>
        </draw:frame>
        <draw:frame draw:name="Subtítulo 5" presentation:style-name="pr7" draw:text-style-name="P10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_20_de_20_título" presentation:presentation-page-layout-name="AL3T1">
        <draw:frame presentation:style-name="pr8" draw:text-style-name="P11" draw:layer="layout" svg:width="25.399cm" svg:height="3.882cm" svg:x="4cm" svg:y="0.618cm" presentation:class="title" presentation:user-transformed="true">
          <draw:text-box>
            <text:p text:style-name="P11"><text:span text:style-name="T7">Vamos saber o que é…</text:span><text:span text:style-name="T7"><text:line-break/></text:span><text:span text:style-name="T7"> “análise horizontal”.</text:span></text:p>
          </draw:text-box>
        </draw:frame>
        <draw:frame presentation:style-name="pr9" draw:text-style-name="P12" draw:layer="layout" svg:width="30.479cm" svg:height="11.048cm" svg:x="1.521cm" svg:y="6cm" presentation:class="outline" presentation:user-transformed="true">
          <draw:text-box>
            <text:list text:style-name="L5">
              <text:list-item>
                <text:p text:style-name="P12"><text:span text:style-name="T8">Análise Horizontal</text:span><text:span text:style-name="T9"> Análise Horizontal </text:span><text:span text:style-name="T10">Análise Horizontal </text:span></text:p>
              </text:list-item>
              <text:list-item>
                <text:p text:style-name="P12"><text:span text:style-name="T11">Análise Horizontal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0_de_20_título" presentation:presentation-page-layout-name="AL3T1">
        <draw:frame presentation:style-name="pr10" draw:text-style-name="P13" draw:layer="layout" svg:width="25.399cm" svg:height="3.131cm" svg:x="4cm" svg:y="0.869cm" presentation:class="title" presentation:user-transformed="true">
          <draw:text-box>
            <text:p text:style-name="P13"><text:span text:style-name="T12">Conceito de Análise Horizontal?</text:span></text:p>
          </draw:text-box>
        </draw:frame>
        <draw:frame presentation:style-name="pr11" draw:text-style-name="P13" draw:layer="layout" svg:width="30.479cm" svg:height="11.048cm" svg:x="1.693cm" svg:y="4.457cm" presentation:class="outline">
          <draw:text-box>
            <text:list text:style-name="L6">
              <text:list-item>
                <text:p text:style-name="P13"><text:span text:style-name="T13">Análise horizontal é o método que possibilita estabelecer as proporções entre cada elemento em análise, de um exercício social, e o mesmo elemento ou informação em outros exercícios, por meio da evolução percentual que permite comparação por tendências positivas ou negativas.</text:span></text:p>
                <text:p text:style-name="P14"><text:span text:style-name="T13">(Morante, 2010)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_20_de_20_título" presentation:presentation-page-layout-name="AL3T1">
        <draw:frame presentation:style-name="pr8" draw:text-style-name="P15" draw:layer="layout" svg:width="25.399cm" svg:height="3.882cm" svg:x="4.5cm" svg:y="1cm" presentation:class="title" presentation:user-transformed="true">
          <draw:text-box>
            <text:p text:style-name="P15"><text:span text:style-name="T14">Exemplos</text:span></text:p>
          </draw:text-box>
        </draw:frame>
        <draw:frame presentation:style-name="pr11" draw:text-style-name="P16" draw:layer="layout" svg:width="30.479cm" svg:height="11.048cm" svg:x="1.693cm" svg:y="4.457cm" presentation:class="outline" presentation:user-transformed="true">
          <draw:text-box>
            <text:list text:style-name="L6">
              <text:list-item>
                <text:p/>
              </text:list-item>
              <text:list-item>
                <text:p><text:span text:style-name="T13">Estoque 2024</text:span></text:p>
              </text:list-item>
              <text:list-item>
                <text:p><text:span text:style-name="T13">Estoque 2023</text:span></text:p>
              </text:list-item>
              <text:list-item>
                <text:p><text:span text:style-name="T13">Estoque 2022</text:span></text:p>
              </text:list-item>
              <text:list-item>
                <text:p><text:span text:style-name="T13">Estoque 2021 <text:s text:c="13"/></text:span></text:p>
              </text:list-item>
              <text:list-item>
                <text:p><text:span text:style-name="T13">AV Estoque = (Estoque 2024/Estoque 2023) - 1</text:span></text:p>
                <text:p><text:span text:style-name="T13"><text:s text:c="19"/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_20_branco">
        <draw:custom-shape draw:name="Texto Explicativo: Linha Dobrada com Borda e Ênfase 5" draw:style-name="gr3" draw:text-style-name="P17" draw:layer="layout" svg:width="6.128cm" svg:height="11.571cm" svg:x="26.287cm" svg:y="2.95cm">
          <text:list text:style-name="L7">
            <text:list-item>
              <text:p text:style-name="P3"><text:span text:style-name="T15">Estoques</text:span></text:p>
            </text:list-item>
            <text:list-item>
              <text:p text:style-name="P3"><text:span text:style-name="T15">Ativos biológicos</text:span></text:p>
            </text:list-item>
            <text:list-item>
              <text:p text:style-name="P3"><text:span text:style-name="T15">Impostos a Recuperar</text:span></text:p>
            </text:list-item>
            <text:list-item>
              <text:p text:style-name="P3"><text:span text:style-name="T15">Impostos diferidos</text:span></text:p>
            </text:list-item>
            <text:list-item>
              <text:p text:style-name="P3"><text:span text:style-name="T15">Agio</text:span></text:p>
            </text:list-item>
            <text:list-item>
              <text:p text:style-name="P3"><text:span text:style-name="T15">Valor de ativo intangível</text:span></text:p>
            </text:list-item>
          </text:list>
          <draw:enhanced-geometry draw:mirror-horizontal="false" draw:mirror-vertical="false" draw:text-areas="0 0 ?f6 ?f9" svg:viewBox="0 0 0 0" draw:type="ooxml-accentBorderCallout2" draw:modifiers="18750 -8333 18750 -16667 24063 -43086" draw:enhanced-path="M 0 0 L ?f6 0 ?f6 ?f9 0 ?f9 Z N M ?f1 0 L ?f1 ?f9 F N M ?f1 ?f0 L ?f3 ?f2 ?f5 ?f4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height*$4 /100000"/>
            <draw:equation draw:name="f5" draw:formula="logwidth*$5 /100000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  <draw:handle draw:handle-position="?f5 ?f4" draw:handle-range-x-maximum="2147483647" draw:handle-range-x-minimum="-2147483647" draw:handle-range-y-maximum="2147483647" draw:handle-range-y-minimum="-2147483647"/>
          </draw:enhanced-geometry>
        </draw:custom-shape>
        <draw:frame draw:name="Imagem 2" draw:style-name="gr4" draw:text-style-name="P18" draw:layer="layout" svg:width="22.442cm" svg:height="12.791cm" svg:x="1.21cm" svg:y="2.528cm">
          <draw:image xlink:href="Pictures/100000000000030B000001BC8763D7035B78064A.png" xlink:type="simple" xlink:show="embed" xlink:actuate="onLoad" draw:mime-type="image/png">
            <text:p/>
          </draw:image>
        </draw:frame>
        <draw:frame draw:name="Imagem 3" draw:style-name="gr4" draw:text-style-name="P18" draw:layer="layout" svg:width="23.441cm" svg:height="0.687cm" svg:x="0.801cm" svg:y="1.534cm">
          <draw:image xlink:href="Pictures/10000000000003760000001A4B1CF0FD277BC2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_20_branco">
        <draw:custom-shape draw:name="Seta: para a Esquerda 2" draw:style-name="gr5" draw:text-style-name="P19" draw:layer="layout" svg:width="4.063cm" svg:height="2.454cm" svg:x="26.924cm" svg:y="6.322cm">
          <text:p text:style-name="P40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m 5" draw:style-name="gr4" draw:text-style-name="P18" draw:layer="layout" svg:width="23.819cm" svg:height="14.204cm" svg:x="2.034cm" svg:y="1.999cm">
          <draw:image xlink:href="Pictures/100000000000032F000001E6376CC7794FAE95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_20_branco">
        <draw:custom-shape draw:name="Texto Explicativo: Linha Dobrada com Borda e Ênfase 5" draw:style-name="gr3" draw:text-style-name="P17" draw:layer="layout" svg:width="6.186cm" svg:height="11.647cm" svg:x="26.951cm" svg:y="2.95cm">
          <text:list text:style-name="L7">
            <text:list-item>
              <text:p text:style-name="P3"><text:span text:style-name="T15">Empréstimos</text:span></text:p>
            </text:list-item>
            <text:list-item>
              <text:p text:style-name="P3"><text:span text:style-name="T15">Fornecedores</text:span></text:p>
            </text:list-item>
            <text:list-item>
              <text:p text:style-name="P3"><text:span text:style-name="T15">Obrigações Fiscais </text:span></text:p>
            </text:list-item>
            <text:list-item>
              <text:p text:style-name="P3"><text:span text:style-name="T15">Provisões Fiscais</text:span></text:p>
            </text:list-item>
            <text:list-item>
              <text:p text:style-name="P3"><text:span text:style-name="T15">Financiamentos</text:span></text:p>
            </text:list-item>
          </text:list>
          <draw:enhanced-geometry draw:mirror-horizontal="false" draw:mirror-vertical="false" draw:text-areas="0 0 ?f6 ?f9" svg:viewBox="0 0 0 0" draw:type="ooxml-accentBorderCallout2" draw:modifiers="18750 -8333 18750 -16667 32157 -48329" draw:enhanced-path="M 0 0 L ?f6 0 ?f6 ?f9 0 ?f9 Z N M ?f1 0 L ?f1 ?f9 F N M ?f1 ?f0 L ?f3 ?f2 ?f5 ?f4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height*$4 /100000"/>
            <draw:equation draw:name="f5" draw:formula="logwidth*$5 /100000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  <draw:handle draw:handle-position="?f5 ?f4" draw:handle-range-x-maximum="2147483647" draw:handle-range-x-minimum="-2147483647" draw:handle-range-y-maximum="2147483647" draw:handle-range-y-minimum="-2147483647"/>
          </draw:enhanced-geometry>
        </draw:custom-shape>
        <draw:frame draw:name="Imagem 3" draw:style-name="gr4" draw:text-style-name="P18" draw:layer="layout" svg:width="23.856cm" svg:height="13.819cm" svg:x="0.729cm" svg:y="2.95cm">
          <draw:image xlink:href="Pictures/100000000000030E000001C56528DAF52ED71CD8.png" xlink:type="simple" xlink:show="embed" xlink:actuate="onLoad" draw:mime-type="image/png">
            <text:p/>
          </draw:image>
        </draw:frame>
        <draw:frame draw:name="Imagem 6" draw:style-name="gr4" draw:text-style-name="P18" draw:layer="layout" svg:width="23.441cm" svg:height="1.085cm" svg:x="0.801cm" svg:y="1.534cm">
          <draw:image xlink:href="Pictures/10000000000003760000001A4B1CF0FD277BC2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_20_branco">
        <draw:custom-shape draw:name="Seta: para a Esquerda 2" draw:style-name="gr5" draw:text-style-name="P19" draw:layer="layout" svg:width="3.529cm" svg:height="2.031cm" svg:x="23.493cm" svg:y="13.086cm">
          <text:p text:style-name="P40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eta: para a Esquerda 3" draw:style-name="gr5" draw:text-style-name="P19" draw:layer="layout" svg:width="3.529cm" svg:height="2.031cm" svg:x="23.145cm" svg:y="8.509cm">
          <text:p text:style-name="P40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eta: para a Esquerda 4" draw:style-name="gr5" draw:text-style-name="P19" draw:layer="layout" svg:width="3.529cm" svg:height="2.031cm" svg:x="23.493cm" svg:y="3.536cm">
          <text:p text:style-name="P40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m 6" draw:style-name="gr4" draw:text-style-name="P18" draw:layer="layout" svg:width="21.404cm" svg:height="16.35cm" svg:x="1.338cm" svg:y="1.082cm">
          <draw:image xlink:href="Pictures/10000000000003290000026AC98057F4FC73C6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_20_branco">
        <draw:custom-shape draw:name="Texto Explicativo: Linha Dobrada com Borda e Ênfase 3" draw:style-name="gr3" draw:text-style-name="P17" draw:layer="layout" svg:width="6.38cm" svg:height="6.574cm" svg:x="26.659cm" svg:y="3.592cm">
          <text:list text:style-name="L7">
            <text:list-item>
              <text:p text:style-name="P3"><text:span text:style-name="T16">Vendas</text:span></text:p>
            </text:list-item>
          </text:list>
          <text:p text:style-name="P3"><text:span text:style-name="T16"/></text:p>
          <text:list text:continue-numbering="true" text:style-name="L7">
            <text:list-item>
              <text:p text:style-name="P3"><text:span text:style-name="T16">Despesas Vendas</text:span></text:p>
            </text:list-item>
          </text:list>
          <text:p text:style-name="P3"><text:span text:style-name="T16"/></text:p>
          <text:list text:continue-numbering="true" text:style-name="L7">
            <text:list-item>
              <text:p text:style-name="P3"><text:span text:style-name="T16">Despesas Financeiras</text:span></text:p>
            </text:list-item>
          </text:list>
          <draw:enhanced-geometry draw:mirror-horizontal="false" draw:mirror-vertical="false" draw:text-areas="0 0 ?f6 ?f9" svg:viewBox="0 0 0 0" draw:type="ooxml-accentBorderCallout2" draw:modifiers="18750 -8333 18750 -16667 -10543 -20392" draw:enhanced-path="M 0 0 L ?f6 0 ?f6 ?f9 0 ?f9 Z N M ?f1 0 L ?f1 ?f9 F N M ?f1 ?f0 L ?f3 ?f2 ?f5 ?f4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height*$4 /100000"/>
            <draw:equation draw:name="f5" draw:formula="logwidth*$5 /100000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  <draw:handle draw:handle-position="?f5 ?f4" draw:handle-range-x-maximum="2147483647" draw:handle-range-x-minimum="-2147483647" draw:handle-range-y-maximum="2147483647" draw:handle-range-y-minimum="-2147483647"/>
          </draw:enhanced-geometry>
        </draw:custom-shape>
        <draw:frame draw:name="Imagem 1" draw:style-name="gr4" draw:text-style-name="P18" draw:layer="layout" svg:width="24.517cm" svg:height="15.945cm" svg:x="0.826cm" svg:y="0.818cm">
          <draw:image xlink:href="Pictures/100000000000030A000001C248C21A91B154AE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_20_branco">
        <draw:frame draw:name="Imagem 1" draw:style-name="gr4" draw:text-style-name="P18" draw:layer="layout" svg:width="29.553cm" svg:height="11.35cm" svg:x="3.36cm" svg:y="3.85cm">
          <draw:image xlink:href="Pictures/100000000000045D000001ADE9B4BAEF822DBE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_20_de_20_título" presentation:presentation-page-layout-name="AL1T0">
        <draw:frame draw:name="Título 1" presentation:style-name="pr13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7">Cálculo dos Indicadores</text:span></text:p>
          </draw:text-box>
        </draw:frame>
        <draw:frame draw:name="Subtítulo 2" presentation:style-name="pr14" draw:text-style-name="P10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Índices - Liquidez" draw:style-name="dp1" draw:master-page-name="Título_20_e_20_texto_20_e_20_2_20_partes_20_de_20_conteúdo" presentation:presentation-page-layout-name="AL4T12">
        <draw:frame draw:name="Rectangle 2" presentation:style-name="pr15" draw:text-style-name="P7" draw:layer="layout" svg:width="23.573cm" svg:height="1.944cm" svg:x="5.503cm" svg:y="0.723cm" presentation:class="title" presentation:user-transformed="true">
          <draw:text-box>
            <text:p text:style-name="P6"><text:span text:style-name="T18">Índices - Liquidez</text:span></text:p>
          </draw:text-box>
        </draw:frame>
        <draw:frame draw:name="Rectangle 3" presentation:style-name="pr16" draw:text-style-name="P22" draw:layer="layout" svg:width="16.628cm" svg:height="1.37cm" svg:x="5.905cm" svg:y="3.351cm" presentation:class="outline" presentation:user-transformed="true">
          <draw:text-box>
            <text:p text:style-name="P20"><text:span text:style-name="T19">Principais índices de liquidez:</text:span></text:p>
            <text:p text:style-name="P21"><text:span text:style-name="T19"/></text:p>
          </draw:text-box>
        </draw:frame>
        <draw:frame draw:name="Group 26" draw:style-name="standard" draw:layer="layout" svg:width="19.897cm" svg:height="11.234cm" svg:x="2.913cm" svg:y="4.873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23"><text:span text:style-name="T20">Liquidez Corrente</text:span></text:p>
              </table:table-cell>
              <table:table-cell table:style-name="ce2"/>
            </table:table-row>
            <table:table-row table:style-name="ro2">
              <table:table-cell table:style-name="ce3">
                <text:p text:style-name="P23"><text:span text:style-name="T20">Liquidez Seca</text:span></text:p>
              </table:table-cell>
              <table:table-cell table:style-name="ce4"/>
            </table:table-row>
            <table:table-row table:style-name="ro3">
              <table:table-cell table:style-name="ce3">
                <text:p text:style-name="P23"><text:span text:style-name="T20">Liquidez Imediata</text:span></text:p>
              </table:table-cell>
              <table:table-cell table:style-name="ce4"/>
            </table:table-row>
            <table:table-row table:style-name="ro1">
              <table:table-cell table:style-name="ce5">
                <text:p text:style-name="P23"><text:span text:style-name="T20">Liquidez Geral</text:span></text:p>
              </table:table-cell>
              <table:table-cell table:style-name="ce6"/>
            </table:table-row>
          </table:table>
          <draw:image xlink:href="Pictures/TablePreview1.svm" xlink:type="simple" xlink:show="embed" xlink:actuate="onLoad"/>
        </draw:frame>
        <draw:frame draw:name="Object 2" draw:style-name="gr6" draw:text-style-name="P18" draw:layer="layout" svg:width="3.271cm" svg:height="1.992cm" svg:x="16.038cm" svg:y="5.314cm">
          <draw:object>
            <loext:p/>
          </draw:object>
          <draw:image xlink:href="./ObjectReplacements/" xlink:type="simple" xlink:show="embed" xlink:actuate="onLoad"/>
        </draw:frame>
        <draw:frame draw:name="Object 3" draw:style-name="gr6" draw:text-style-name="P18" draw:layer="layout" svg:width="9.617cm" svg:height="1.732cm" svg:x="12.965cm" svg:y="8.387cm">
          <draw:object>
            <loext:p/>
          </draw:object>
          <draw:image xlink:href="./ObjectReplacements/" xlink:type="simple" xlink:show="embed" xlink:actuate="onLoad"/>
        </draw:frame>
        <draw:frame draw:name="Object 4" draw:style-name="gr6" draw:text-style-name="P18" draw:layer="layout" svg:width="5.974cm" svg:height="2.01cm" svg:x="14.773cm" svg:y="13.714cm">
          <draw:object>
            <loext:p/>
          </draw:object>
          <draw:image xlink:href="./ObjectReplacements/" xlink:type="simple" xlink:show="embed" xlink:actuate="onLoad"/>
        </draw:frame>
        <draw:frame draw:name="Object 5" draw:style-name="gr6" draw:text-style-name="P18" draw:layer="layout" svg:width="4.321cm" svg:height="1.701cm" svg:x="15.35cm" svg:y="10.91cm">
          <draw:object>
            <loext:p/>
          </draw:object>
          <draw:image xlink:href="./ObjectReplacements/" xlink:type="simple" xlink:show="embed" xlink:actuate="onLoad"/>
        </draw:frame>
        <draw:custom-shape draw:name="Rectangle 3" draw:style-name="gr7" draw:text-style-name="P26" draw:layer="layout" svg:width="21.801cm" svg:height="1.37cm" svg:x="5.534cm" svg:y="16.753cm">
          <text:p text:style-name="P24"><text:span text:style-name="T21">Interpretação: quanto maior, melhor</text:span><text:span text:style-name="T22"> </text:span></text:p>
          <text:p text:style-name="P25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8" draw:text-style-name="P28" draw:layer="layout" svg:width="6.296cm" svg:height="2.279cm" svg:x="23.336cm" svg:y="5.124cm">
          <text:p text:style-name="P27"><text:span text:style-name="T24">Proporção entre os bens e direitos apenas de curto prazo e as obrigações de CP com terceir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26" draw:layer="layout" svg:width="6.402cm" svg:height="1.37cm" svg:x="23.133cm" svg:y="3.325cm">
          <text:p text:style-name="P29"><text:span text:style-name="T23">Indic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8" draw:text-style-name="P28" draw:layer="layout" svg:width="6.296cm" svg:height="2.279cm" svg:x="23.336cm" svg:y="13.644cm">
          <text:p text:style-name="P27"><text:span text:style-name="T24">Proporção entre os bens e direitos de curto e longo prazos e as obrigações totais com terceir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8" draw:text-style-name="P28" draw:layer="layout" svg:width="6.296cm" svg:height="2.279cm" svg:x="23.336cm" svg:y="7.739cm">
          <text:p text:style-name="P27"><text:span text:style-name="T24">Semelhante à liquidez corrente, porém do ativo circulante, são excluídos os estoques e as despesas pagas antecipadam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8" draw:text-style-name="P28" draw:layer="layout" svg:width="6.296cm" svg:height="1.772cm" svg:x="23.239cm" svg:y="10.839cm">
          <text:p text:style-name="P27"><text:span text:style-name="T24">Semelhante à liquidez corrente, porém só consideram-se as disponibilida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0" draw:layer="layout" svg:width="3.246cm" svg:height="1.976cm" svg:x="16.016cm" svg:y="5.292cm">
          <draw:image xlink:href="Pictures/100001F40000070700000446DEBFD64112A24A91.wmf" xlink:type="simple" xlink:show="embed" xlink:actuate="onLoad" draw:mime-type="image/x-wmf">
            <text:p/>
          </draw:image>
          <draw:image xlink:href="Pictures/100002010000004400000029EF03C2C1A7418185.png" xlink:type="simple" xlink:show="embed" xlink:actuate="onLoad" draw:mime-type="image/png"/>
        </draw:frame>
        <draw:frame draw:style-name="gr9" draw:text-style-name="P30" draw:layer="layout" svg:width="9.596cm" svg:height="1.729cm" svg:x="12.947cm" svg:y="8.361cm">
          <draw:image xlink:href="Pictures/100002B8000017B500000447BAC1E513FC616E81.wmf" xlink:type="simple" xlink:show="embed" xlink:actuate="onLoad" draw:mime-type="image/x-wmf">
            <text:p/>
          </draw:image>
          <draw:image xlink:href="Pictures/10000201000000E5000000294355A60BDF5EFADA.png" xlink:type="simple" xlink:show="embed" xlink:actuate="onLoad" draw:mime-type="image/png"/>
        </draw:frame>
        <draw:frame draw:style-name="gr9" draw:text-style-name="P30" draw:layer="layout" svg:width="5.962cm" svg:height="2.011cm" svg:x="14.746cm" svg:y="13.688cm">
          <draw:image xlink:href="Pictures/1000023800000CAD00000446015034C8846D8D00.wmf" xlink:type="simple" xlink:show="embed" xlink:actuate="onLoad" draw:mime-type="image/x-wmf">
            <text:p/>
          </draw:image>
          <draw:image xlink:href="Pictures/100002010000007B0000002947357E7C2EC4418A.png" xlink:type="simple" xlink:show="embed" xlink:actuate="onLoad" draw:mime-type="image/png"/>
        </draw:frame>
        <draw:frame draw:style-name="gr9" draw:text-style-name="P30" draw:layer="layout" svg:width="4.304cm" svg:height="1.693cm" svg:x="15.346cm" svg:y="10.901cm">
          <draw:image xlink:href="Pictures/100001FC000009C9000003DC5C926CBF3ED1D3E0.wmf" xlink:type="simple" xlink:show="embed" xlink:actuate="onLoad" draw:mime-type="image/x-wmf">
            <text:p/>
          </draw:image>
          <draw:image xlink:href="Pictures/100002010000005F000000254473CD0C48A0F6EB.png" xlink:type="simple" xlink:show="embed" xlink:actuate="onLoad" draw:mime-type="image/png"/>
        </draw:frame>
        <presentation:notes draw:style-name="dp3">
          <draw:frame draw:name="Rectangle 7" presentation:style-name="pr17" draw:text-style-name="P32" draw:layer="layout" svg:width="8.254cm" svg:height="1.273cm" svg:x="10.791cm" svg:y="24.126cm" presentation:class="page-number" presentation:user-transformed="true">
            <draw:text-box>
              <text:p text:style-name="P31"><text:span text:style-name="T25"><text:page-number>&lt;número&gt;</text:page-number></text:span></text:p>
            </draw:text-box>
          </draw:frame>
          <draw:page-thumbnail draw:name="Rectangle 2" draw:style-name="gr2" draw:layer="layout" svg:width="15.239cm" svg:height="8.572cm" svg:x="1.905cm" svg:y="3.175cm" draw:page-number="14" presentation:class="page"/>
          <draw:frame draw:name="Rectangle 3" presentation:style-name="pr18" draw:text-style-name="P33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Em_20_branco">
        <draw:frame draw:name="Imagem 1" draw:style-name="gr4" draw:text-style-name="P18" draw:layer="layout" svg:width="30.745cm" svg:height="9.549cm" svg:x="1.185cm" svg:y="4.091cm">
          <draw:image xlink:href="Pictures/1002486C000049DF000016E8F4621C9C161DFFDC.emf" xlink:type="simple" xlink:show="embed" xlink:actuate="onLoad" draw:mime-type="image/x-emf">
            <text:p/>
          </draw:image>
          <draw:image xlink:href="Pictures/10000201000002CB000000DE25A534B29A4F7B8F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Índices – Estrutura de Capital&#10;Quanto menor melhor!" draw:style-name="dp1" draw:master-page-name="Título_20_e_20_texto_20_e_20_2_20_partes_20_de_20_conteúdo" presentation:presentation-page-layout-name="AL4T12">
        <draw:frame draw:name="Rectangle 2" presentation:style-name="pr19" draw:text-style-name="P7" draw:layer="layout" svg:width="27.511cm" svg:height="1.944cm" svg:x="1.565cm" svg:y="0.578cm" presentation:class="title" presentation:user-transformed="true">
          <draw:text-box>
            <text:p text:style-name="P6"><text:span text:style-name="T18">Índices – Estrutura de Capital</text:span><text:span text:style-name="T18"><text:line-break/></text:span><text:span text:style-name="T18">Quanto menor melhor!</text:span></text:p>
          </draw:text-box>
        </draw:frame>
        <draw:frame draw:name="Rectangle 3" presentation:style-name="pr16" draw:text-style-name="P22" draw:layer="layout" svg:width="14.401cm" svg:height="1.159cm" svg:x="1.935cm" svg:y="2.722cm" presentation:class="outline" presentation:user-transformed="true">
          <draw:text-box>
            <text:p text:style-name="P20"><text:span text:style-name="T19">Principais índices de estrutura de capital:</text:span></text:p>
            <text:p text:style-name="P34"><text:span text:style-name="T19"/></text:p>
          </draw:text-box>
        </draw:frame>
        <draw:frame draw:name="Object 3" draw:style-name="gr6" draw:text-style-name="P18" draw:layer="layout" svg:width="3.275cm" svg:height="2.032cm" svg:x="11.663cm" svg:y="4.49cm">
          <draw:object>
            <loext:p/>
          </draw:object>
          <draw:image xlink:href="./ObjectReplacements/" xlink:type="simple" xlink:show="embed" xlink:actuate="onLoad"/>
        </draw:frame>
        <draw:frame draw:name="Object 4" draw:style-name="gr6" draw:text-style-name="P18" draw:layer="layout" svg:width="3.399cm" svg:height="2.111cm" svg:x="11.433cm" svg:y="7.445cm">
          <draw:object>
            <loext:p/>
          </draw:object>
          <draw:image xlink:href="./ObjectReplacements/" xlink:type="simple" xlink:show="embed" xlink:actuate="onLoad"/>
        </draw:frame>
        <draw:frame draw:name="Object 5" draw:style-name="gr6" draw:text-style-name="P18" draw:layer="layout" svg:width="3.553cm" svg:height="2.12cm" svg:x="11.235cm" svg:y="12.921cm">
          <draw:object>
            <loext:p/>
          </draw:object>
          <draw:image xlink:href="./ObjectReplacements/" xlink:type="simple" xlink:show="embed" xlink:actuate="onLoad"/>
        </draw:frame>
        <draw:custom-shape draw:name="Oval 23" draw:style-name="gr10" draw:text-style-name="P7" draw:layer="layout" svg:width="1.512cm" svg:height="0.885cm" svg:x="13.321cm" svg:y="12.921cm">
          <text:p text:style-name="P3"><text:span text:style-name="T2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75" draw:style-name="standard" draw:layer="layout" svg:width="14.197cm" svg:height="13.875cm" svg:x="2.235cm" svg:y="4.12cm">
          <table:table>
            <table:table-column table:style-name="co3"/>
            <table:table-column table:style-name="co4"/>
            <table:table-row table:style-name="ro1">
              <table:table-cell table:style-name="ce1">
                <text:p text:style-name="P35"><text:span text:style-name="T26">Participação de Capital de Terceiros ou Grau de Endividamento</text:span></text:p>
              </table:table-cell>
              <table:table-cell table:style-name="ce2"/>
            </table:table-row>
            <table:table-row table:style-name="ro4">
              <table:table-cell table:style-name="ce3">
                <text:p text:style-name="P35"><text:span text:style-name="T26">Composição do Endividamento</text:span></text:p>
              </table:table-cell>
              <table:table-cell table:style-name="ce4"/>
            </table:table-row>
            <table:table-row table:style-name="ro3">
              <table:table-cell table:style-name="ce3">
                <text:p text:style-name="P36"><text:span text:style-name="T26">Endividamento Geral</text:span></text:p>
              </table:table-cell>
              <table:table-cell table:style-name="ce4"/>
            </table:table-row>
            <table:table-row table:style-name="ro3">
              <table:table-cell table:style-name="ce3">
                <text:p text:style-name="P36"><text:span text:style-name="T26">Imobilização do Pat. Líquido</text:span></text:p>
              </table:table-cell>
              <table:table-cell table:style-name="ce4"/>
            </table:table-row>
            <table:table-row table:style-name="ro1">
              <table:table-cell table:style-name="ce5">
                <text:p text:style-name="P36"><text:span text:style-name="T26">Imobilização dos Recursos Não Correntes</text:span></text:p>
              </table:table-cell>
              <table:table-cell table:style-name="ce6"/>
            </table:table-row>
          </table:table>
          <draw:image xlink:href="Pictures/TablePreview2.svm" xlink:type="simple" xlink:show="embed" xlink:actuate="onLoad"/>
        </draw:frame>
        <draw:frame draw:name="Object 5" draw:style-name="gr6" draw:text-style-name="P18" draw:layer="layout" svg:width="6.199cm" svg:height="2.001cm" svg:x="10.036cm" svg:y="15.92cm">
          <draw:object>
            <loext:p/>
          </draw:object>
          <draw:image xlink:href="./ObjectReplacements/" xlink:type="simple" xlink:show="embed" xlink:actuate="onLoad"/>
        </draw:frame>
        <draw:custom-shape draw:name="Oval 23" draw:style-name="gr10" draw:text-style-name="P7" draw:layer="layout" svg:width="1.428cm" svg:height="0.766cm" svg:x="13.771cm" svg:y="15.92cm">
          <text:p text:style-name="P3"><text:span text:style-name="T2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55" draw:style-name="gr8" draw:text-style-name="P28" draw:layer="layout" svg:width="10.668cm" svg:height="1.265cm" svg:x="18.039cm" svg:y="4.64cm">
          <text:p text:style-name="P27"><text:span text:style-name="T24">Quanto a empresa obteve de capital de terceiros em relação ao capital próp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26" draw:layer="layout" svg:width="6.402cm" svg:height="1.37cm" svg:x="17.739cm" svg:y="2.722cm">
          <text:p text:style-name="P29"><text:span text:style-name="T23">Indic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7" draw:style-name="gr8" draw:text-style-name="P28" draw:layer="layout" svg:width="11.967cm" svg:height="1.265cm" svg:x="18.039cm" svg:y="12.52cm">
          <text:p text:style-name="P27"><text:span text:style-name="T24">O percentual de recursos próprios destinados à aplicação no “ativo permanente” – Investimentos, Imobilizado e Intangí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8" draw:style-name="gr8" draw:text-style-name="P28" draw:layer="layout" svg:width="10.941cm" svg:height="1.265cm" svg:x="18.136cm" svg:y="7.321cm">
          <text:p text:style-name="P27"><text:span text:style-name="T24">Quanto a empresa possui de dívidas de curto prazo em relação ao total de dívi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8" draw:text-style-name="P28" draw:layer="layout" svg:width="10.263cm" svg:height="1.265cm" svg:x="17.942cm" svg:y="10.121cm">
          <text:p text:style-name="P27"><text:span text:style-name="T24">A dependência do capital de terceiros no financiamento das atividades da empre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gr6" draw:text-style-name="P18" draw:layer="layout" svg:width="3.342cm" svg:height="2.032cm" svg:x="11.535cm" svg:y="10.086cm">
          <draw:object>
            <loext:p/>
          </draw:object>
          <draw:image xlink:href="./ObjectReplacements/" xlink:type="simple" xlink:show="embed" xlink:actuate="onLoad"/>
        </draw:frame>
        <draw:custom-shape draw:name="Text Box 74" draw:style-name="gr8" draw:text-style-name="P28" draw:layer="layout" svg:width="11.038cm" svg:height="1.772cm" svg:x="18.039cm" svg:y="15.651cm">
          <text:p text:style-name="P27"><text:span text:style-name="T24">O percentual de recursos não correntes destinados à aplicação no “ativo permanente” – Investimentos, Imobilizado e Intangí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7" draw:style-name="gr11" draw:text-style-name="P7" draw:layer="layout" svg:width="2.38cm" svg:height="0.758cm" svg:x="14.926cm" svg:y="5.151cm">
          <text:p text:style-name="P3"><text:span text:style-name="T25">X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8" draw:style-name="gr11" draw:text-style-name="P7" draw:layer="layout" svg:width="2.38cm" svg:height="0.758cm" svg:x="14.926cm" svg:y="8.128cm">
          <text:p text:style-name="P3"><text:span text:style-name="T25">X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9" draw:style-name="gr11" draw:text-style-name="P7" draw:layer="layout" svg:width="2.38cm" svg:height="0.758cm" svg:x="14.926cm" svg:y="10.734cm">
          <text:p text:style-name="P3"><text:span text:style-name="T25">X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0" draw:style-name="gr11" draw:text-style-name="P7" draw:layer="layout" svg:width="2.38cm" svg:height="0.758cm" svg:x="14.926cm" svg:y="13.711cm">
          <text:p text:style-name="P3"><text:span text:style-name="T25">X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1" draw:style-name="gr11" draw:text-style-name="P7" draw:layer="layout" svg:width="2.38cm" svg:height="0.758cm" svg:x="16.315cm" svg:y="16.687cm">
          <text:p text:style-name="P3"><text:span text:style-name="T25">X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0" draw:layer="layout" svg:width="3.246cm" svg:height="2.011cm" svg:x="11.642cm" svg:y="4.48cm">
          <draw:image xlink:href="Pictures/100001F4000006E4000004469DF04698DF24CAAD.wmf" xlink:type="simple" xlink:show="embed" xlink:actuate="onLoad" draw:mime-type="image/x-wmf">
            <text:p/>
          </draw:image>
          <draw:image xlink:href="Pictures/1000020100000043000000292936A9248DB0B3DB.png" xlink:type="simple" xlink:show="embed" xlink:actuate="onLoad" draw:mime-type="image/png"/>
        </draw:frame>
        <draw:frame draw:style-name="gr9" draw:text-style-name="P30" draw:layer="layout" svg:width="3.387cm" svg:height="2.081cm" svg:x="11.43cm" svg:y="7.444cm">
          <draw:image xlink:href="Pictures/100001F4000006E400000446ED59B4261999E69B.wmf" xlink:type="simple" xlink:show="embed" xlink:actuate="onLoad" draw:mime-type="image/x-wmf">
            <text:p/>
          </draw:image>
          <draw:image xlink:href="Pictures/100002010000004300000029B3BAC34545BC2D20.png" xlink:type="simple" xlink:show="embed" xlink:actuate="onLoad" draw:mime-type="image/png"/>
        </draw:frame>
        <draw:frame draw:style-name="gr9" draw:text-style-name="P30" draw:layer="layout" svg:width="3.528cm" svg:height="2.117cm" svg:x="11.218cm" svg:y="12.912cm">
          <draw:image xlink:href="Pictures/100001F60000072B000004464412EF9F910CECB4.wmf" xlink:type="simple" xlink:show="embed" xlink:actuate="onLoad" draw:mime-type="image/x-wmf">
            <text:p/>
          </draw:image>
          <draw:image xlink:href="Pictures/100002010000004500000029E39EB13CA7273C4D.png" xlink:type="simple" xlink:show="embed" xlink:actuate="onLoad" draw:mime-type="image/png"/>
        </draw:frame>
        <draw:frame draw:style-name="gr9" draw:text-style-name="P30" draw:layer="layout" svg:width="6.174cm" svg:height="1.976cm" svg:x="10.019cm" svg:y="15.91cm">
          <draw:image xlink:href="Pictures/1000021800000D3A00000446B014D715CD995B01.wmf" xlink:type="simple" xlink:show="embed" xlink:actuate="onLoad" draw:mime-type="image/x-wmf">
            <text:p/>
          </draw:image>
          <draw:image xlink:href="Pictures/100002010000008000000029C956227F0026D064.png" xlink:type="simple" xlink:show="embed" xlink:actuate="onLoad" draw:mime-type="image/png"/>
        </draw:frame>
        <draw:frame draw:style-name="gr9" draw:text-style-name="P30" draw:layer="layout" svg:width="3.316cm" svg:height="2.011cm" svg:x="11.501cm" svg:y="10.054cm">
          <draw:image xlink:href="Pictures/100001F40000070700000446068E9A8BA43D0129.wmf" xlink:type="simple" xlink:show="embed" xlink:actuate="onLoad" draw:mime-type="image/x-wmf">
            <text:p/>
          </draw:image>
          <draw:image xlink:href="Pictures/10000201000000440000002939E36ED43B49F7D7.png" xlink:type="simple" xlink:show="embed" xlink:actuate="onLoad" draw:mime-type="image/png"/>
        </draw:frame>
        <presentation:notes draw:style-name="dp3">
          <draw:frame draw:name="Rectangle 7" presentation:style-name="pr17" draw:text-style-name="P32" draw:layer="layout" svg:width="8.254cm" svg:height="1.273cm" svg:x="10.791cm" svg:y="24.126cm" presentation:class="page-number" presentation:user-transformed="true">
            <draw:text-box>
              <text:p text:style-name="P31"><text:span text:style-name="T25"><text:page-number>&lt;número&gt;</text:page-number></text:span></text:p>
            </draw:text-box>
          </draw:frame>
          <draw:page-thumbnail draw:name="Rectangle 2" draw:style-name="gr2" draw:layer="layout" svg:width="15.239cm" svg:height="8.572cm" svg:x="1.905cm" svg:y="3.175cm" draw:page-number="16" presentation:class="page"/>
          <draw:frame draw:name="Rectangle 3" presentation:style-name="pr20" draw:text-style-name="P33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Em_20_branco">
        <draw:frame draw:name="Imagem 1" draw:style-name="gr4" draw:text-style-name="P18" draw:layer="layout" svg:width="29.304cm" svg:height="8.282cm" svg:x="1.771cm" svg:y="3.374cm">
          <draw:image xlink:href="Pictures/100000000000028B000000B8546D8F429ADF15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Índices - Rentabilidade" draw:style-name="dp1" draw:master-page-name="Título_20_e_20_texto_20_e_20_2_20_partes_20_de_20_conteúdo" presentation:presentation-page-layout-name="AL4T12">
        <draw:frame draw:name="Rectangle 2" presentation:style-name="pr15" draw:text-style-name="P7" draw:layer="layout" svg:width="23.573cm" svg:height="1.944cm" svg:x="5.503cm" svg:y="0.723cm" presentation:class="title" presentation:user-transformed="true">
          <draw:text-box>
            <text:p text:style-name="P6"><text:span text:style-name="T18">Índices - Rentabilidade</text:span></text:p>
          </draw:text-box>
        </draw:frame>
        <draw:frame draw:name="Rectangle 3" presentation:style-name="pr16" draw:text-style-name="P22" draw:layer="layout" svg:width="16.028cm" svg:height="0.947cm" svg:x="4.204cm" svg:y="3.59cm" presentation:class="outline" presentation:user-transformed="true">
          <draw:text-box>
            <text:p text:style-name="P20"><text:span text:style-name="T27">Principais índices de rentabilidade:</text:span></text:p>
            <text:p text:style-name="P34"><text:span text:style-name="T27"/></text:p>
          </draw:text-box>
        </draw:frame>
        <draw:frame draw:name="Group 27" draw:style-name="standard" draw:layer="layout" svg:width="15.996cm" svg:height="10.846cm" svg:x="4.235cm" svg:y="5.006cm">
          <table:table>
            <table:table-column table:style-name="co5"/>
            <table:table-column table:style-name="co6"/>
            <table:table-row table:style-name="ro5">
              <table:table-cell table:style-name="ce1">
                <text:p text:style-name="P37"><text:span text:style-name="T28">Giro do Ativo</text:span></text:p>
              </table:table-cell>
              <table:table-cell table:style-name="ce2"/>
            </table:table-row>
            <table:table-row table:style-name="ro6">
              <table:table-cell table:style-name="ce3">
                <text:p text:style-name="P37"><text:span text:style-name="T28">Margem Líquida</text:span></text:p>
              </table:table-cell>
              <table:table-cell table:style-name="ce4"/>
            </table:table-row>
            <table:table-row table:style-name="ro7">
              <table:table-cell table:style-name="ce3">
                <text:p text:style-name="P37"><text:span text:style-name="T28">Rentabilidade do Ativo (ROA)</text:span></text:p>
              </table:table-cell>
              <table:table-cell table:style-name="ce4"/>
            </table:table-row>
            <table:table-row table:style-name="ro8">
              <table:table-cell table:style-name="ce5">
                <text:p text:style-name="P37"><text:span text:style-name="T28">Rentabilidade do PL (ROE)</text:span></text:p>
              </table:table-cell>
              <table:table-cell table:style-name="ce6"/>
            </table:table-row>
          </table:table>
          <draw:image xlink:href="Pictures/TablePreview3.svm" xlink:type="simple" xlink:show="embed" xlink:actuate="onLoad"/>
        </draw:frame>
        <draw:frame draw:name="Object 2" draw:style-name="gr6" draw:text-style-name="P18" draw:layer="layout" svg:width="5.079cm" svg:height="2.098cm" svg:x="13.835cm" svg:y="5.407cm">
          <draw:object>
            <loext:p/>
          </draw:object>
          <draw:image xlink:href="./ObjectReplacements/" xlink:type="simple" xlink:show="embed" xlink:actuate="onLoad"/>
        </draw:frame>
        <draw:frame draw:name="Object 3" draw:style-name="gr6" draw:text-style-name="P18" draw:layer="layout" svg:width="6.433cm" svg:height="2.098cm" svg:x="13.16cm" svg:y="7.859cm">
          <draw:object>
            <loext:p/>
          </draw:object>
          <draw:image xlink:href="./ObjectReplacements/" xlink:type="simple" xlink:show="embed" xlink:actuate="onLoad"/>
        </draw:frame>
        <draw:frame draw:name="Object 4" draw:style-name="gr6" draw:text-style-name="P18" draw:layer="layout" svg:width="5.683cm" svg:height="2.098cm" svg:x="13.451cm" svg:y="10.809cm">
          <draw:object>
            <loext:p/>
          </draw:object>
          <draw:image xlink:href="./ObjectReplacements/" xlink:type="simple" xlink:show="embed" xlink:actuate="onLoad"/>
        </draw:frame>
        <draw:frame draw:name="Object 5" draw:style-name="gr6" draw:text-style-name="P18" draw:layer="layout" svg:width="5.617cm" svg:height="2.098cm" svg:x="13.455cm" svg:y="13.609cm">
          <draw:object>
            <loext:p/>
          </draw:object>
          <draw:image xlink:href="./ObjectReplacements/" xlink:type="simple" xlink:show="embed" xlink:actuate="onLoad"/>
        </draw:frame>
        <draw:custom-shape draw:name="Text Box 28" draw:style-name="gr8" draw:text-style-name="P28" draw:layer="layout" svg:width="6.296cm" svg:height="1.265cm" svg:x="20.639cm" svg:y="5.337cm">
          <text:p text:style-name="P27"><text:span text:style-name="T24">Quanto a empresa vendeu em relação ao seu investimento tot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26" draw:layer="layout" svg:width="6.402cm" svg:height="1.37cm" svg:x="20.339cm" svg:y="3.418cm">
          <text:p text:style-name="P29"><text:span text:style-name="T23">Indic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8" draw:text-style-name="P28" draw:layer="layout" svg:width="6.296cm" svg:height="2.279cm" svg:x="20.639cm" svg:y="13.526cm">
          <text:p text:style-name="P27"><text:span text:style-name="T24">Representa o rendimento do capital próprio. Quanto a empresa lucrou em relação ao investimento dos sóc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8" draw:text-style-name="P28" draw:layer="layout" svg:width="6.296cm" svg:height="1.772cm" svg:x="20.736cm" svg:y="8.018cm">
          <text:p text:style-name="P27"><text:span text:style-name="T24">O percentual de lucro que a empresa obteve em relação às suas ven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8" draw:text-style-name="P28" draw:layer="layout" svg:width="6.296cm" svg:height="1.265cm" svg:x="20.634cm" svg:y="10.809cm">
          <text:p text:style-name="P27"><text:span text:style-name="T24">Quanto a empresa lucrou em relação ao seu investimento tot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26" draw:layer="layout" svg:width="21.801cm" svg:height="1.37cm" svg:x="4.235cm" svg:y="16.634cm">
          <text:p text:style-name="P24"><text:span text:style-name="T21">Interpretação: quanto maior, melhor</text:span><text:span text:style-name="T22"> </text:span></text:p>
          <text:p text:style-name="P25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0" draw:layer="layout" svg:width="5.08cm" svg:height="2.081cm" svg:x="13.829cm" svg:y="5.398cm">
          <draw:image xlink:href="Pictures/100001FA00000A56000004464CA00E35A608F5AF.wmf" xlink:type="simple" xlink:show="embed" xlink:actuate="onLoad" draw:mime-type="image/x-wmf">
            <text:p/>
          </draw:image>
          <draw:image xlink:href="Pictures/1000020100000064000000295C57535B2C49CAEA.png" xlink:type="simple" xlink:show="embed" xlink:actuate="onLoad" draw:mime-type="image/png"/>
        </draw:frame>
        <draw:frame draw:style-name="gr9" draw:text-style-name="P30" draw:layer="layout" svg:width="6.421cm" svg:height="2.081cm" svg:x="13.159cm" svg:y="7.832cm">
          <draw:image xlink:href="Pictures/1000026200000D17000004465AB9465F129BDA9E.wmf" xlink:type="simple" xlink:show="embed" xlink:actuate="onLoad" draw:mime-type="image/x-wmf">
            <text:p/>
          </draw:image>
          <draw:image xlink:href="Pictures/100002010000007F00000029FDCEA28C31E1D585.png" xlink:type="simple" xlink:show="embed" xlink:actuate="onLoad" draw:mime-type="image/png"/>
        </draw:frame>
        <draw:frame draw:style-name="gr9" draw:text-style-name="P30" draw:layer="layout" svg:width="5.68cm" svg:height="2.081cm" svg:x="13.441cm" svg:y="10.795cm">
          <draw:image xlink:href="Pictures/1000026000000B9300000446F7C319D036D76450.wmf" xlink:type="simple" xlink:show="embed" xlink:actuate="onLoad" draw:mime-type="image/x-wmf">
            <text:p/>
          </draw:image>
          <draw:image xlink:href="Pictures/1000020100000070000000294D2511F89670AD75.png" xlink:type="simple" xlink:show="embed" xlink:actuate="onLoad" draw:mime-type="image/png"/>
        </draw:frame>
        <draw:frame draw:style-name="gr9" draw:text-style-name="P30" draw:layer="layout" svg:width="5.609cm" svg:height="2.081cm" svg:x="13.441cm" svg:y="13.582cm">
          <draw:image xlink:href="Pictures/1000026000000B7100000447B11ABB6E7C2B94F8.wmf" xlink:type="simple" xlink:show="embed" xlink:actuate="onLoad" draw:mime-type="image/x-wmf">
            <text:p/>
          </draw:image>
          <draw:image xlink:href="Pictures/100002010000006F00000029241D63ADD4D2AE0C.png" xlink:type="simple" xlink:show="embed" xlink:actuate="onLoad" draw:mime-type="image/png"/>
        </draw:frame>
        <presentation:notes draw:style-name="dp3">
          <draw:frame draw:name="Rectangle 7" presentation:style-name="pr17" draw:text-style-name="P32" draw:layer="layout" svg:width="8.254cm" svg:height="1.273cm" svg:x="10.791cm" svg:y="24.126cm" presentation:class="page-number" presentation:user-transformed="true">
            <draw:text-box>
              <text:p text:style-name="P31"><text:span text:style-name="T25"><text:page-number>&lt;número&gt;</text:page-number></text:span></text:p>
            </draw:text-box>
          </draw:frame>
          <draw:page-thumbnail draw:name="Rectangle 2" draw:style-name="gr2" draw:layer="layout" svg:width="15.239cm" svg:height="8.572cm" svg:x="1.905cm" svg:y="3.175cm" draw:page-number="18" presentation:class="page"/>
          <draw:frame draw:name="Rectangle 3" presentation:style-name="pr21" draw:text-style-name="P33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Em_20_branco">
        <draw:frame draw:name="Imagem 2" draw:style-name="gr4" draw:text-style-name="P18" draw:layer="layout" svg:width="30.375cm" svg:height="7.616cm" svg:x="2.399cm" svg:y="2.356cm">
          <draw:image xlink:href="Pictures/100000000000028E000000A4507F1C1403E1DF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Índices - Atividade" draw:style-name="dp1" draw:master-page-name="Título_20_e_20_texto_20_e_20_2_20_partes_20_de_20_conteúdo" presentation:presentation-page-layout-name="AL4T12">
        <draw:frame draw:name="Rectangle 2" presentation:style-name="pr15" draw:text-style-name="P7" draw:layer="layout" svg:width="23.573cm" svg:height="1.944cm" svg:x="5.503cm" svg:y="0.723cm" presentation:class="title" presentation:user-transformed="true">
          <draw:text-box>
            <text:p text:style-name="P6"><text:span text:style-name="T18">Índices - Atividade</text:span></text:p>
          </draw:text-box>
        </draw:frame>
        <draw:frame draw:name="Rectangle 3" presentation:style-name="pr16" draw:text-style-name="P22" draw:layer="layout" svg:width="16.628cm" svg:height="0.947cm" svg:x="3.111cm" svg:y="2.84cm" presentation:class="outline" presentation:user-transformed="true">
          <draw:text-box>
            <text:p text:style-name="P20"><text:span text:style-name="T27">Principais índices de atividade:</text:span></text:p>
            <text:p text:style-name="P21"><text:span text:style-name="T27"/></text:p>
          </draw:text-box>
        </draw:frame>
        <draw:frame draw:name="Group 37" draw:style-name="standard" draw:layer="layout" svg:width="16.799cm" svg:height="10.581cm" svg:x="2.939cm" svg:y="4.423cm">
          <table:table>
            <table:table-column table:style-name="co7"/>
            <table:table-column table:style-name="co8"/>
            <table:table-row table:style-name="ro9">
              <table:table-cell table:style-name="ce1">
                <text:p text:style-name="P37"><text:span text:style-name="T28">Prazo médio de Renovação de Estoques</text:span></text:p>
              </table:table-cell>
              <table:table-cell table:style-name="ce2"/>
            </table:table-row>
            <table:table-row table:style-name="ro10">
              <table:table-cell table:style-name="ce3">
                <text:p text:style-name="P37"><text:span text:style-name="T28">Prazo Médio Recebimento de Vendas</text:span></text:p>
              </table:table-cell>
              <table:table-cell table:style-name="ce4"/>
            </table:table-row>
            <table:table-row table:style-name="ro11">
              <table:table-cell table:style-name="ce5">
                <text:p text:style-name="P37"><text:span text:style-name="T28">Prazo médio de Pagamento de Compras</text:span></text:p>
              </table:table-cell>
              <table:table-cell table:style-name="ce6"/>
            </table:table-row>
          </table:table>
          <draw:image xlink:href="Pictures/TablePreview4.svm" xlink:type="simple" xlink:show="embed" xlink:actuate="onLoad"/>
        </draw:frame>
        <draw:frame draw:name="Object 2" draw:style-name="gr6" draw:text-style-name="P18" draw:layer="layout" svg:width="8.554cm" svg:height="2.305cm" svg:x="10.506cm" svg:y="8.149cm">
          <draw:object>
            <loext:p/>
          </draw:object>
          <draw:image xlink:href="./ObjectReplacements/" xlink:type="simple" xlink:show="embed" xlink:actuate="onLoad"/>
        </draw:frame>
        <draw:frame draw:name="Object 3" draw:style-name="gr6" draw:text-style-name="P18" draw:layer="layout" svg:width="9.625cm" svg:height="2.235cm" svg:x="9.677cm" svg:y="11.778cm">
          <draw:object>
            <loext:p/>
          </draw:object>
          <draw:image xlink:href="./ObjectReplacements/" xlink:type="simple" xlink:show="embed" xlink:actuate="onLoad"/>
        </draw:frame>
        <draw:frame draw:name="Object 4" draw:style-name="gr6" draw:text-style-name="P18" draw:layer="layout" svg:width="8.325cm" svg:height="2.235cm" svg:x="10.572cm" svg:y="5.031cm">
          <draw:object>
            <loext:p/>
          </draw:object>
          <draw:image xlink:href="./ObjectReplacements/" xlink:type="simple" xlink:show="embed" xlink:actuate="onLoad"/>
        </draw:frame>
        <draw:custom-shape draw:name="Text Box 26" draw:style-name="gr8" draw:text-style-name="P28" draw:layer="layout" svg:width="6.296cm" svg:height="1.772cm" svg:x="20.15cm" svg:y="5.058cm">
          <text:p text:style-name="P27"><text:span text:style-name="T24">Quantos dias, em média, a empresa levou para vender os seus esto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26" draw:layer="layout" svg:width="6.402cm" svg:height="1.37cm" svg:x="19.85cm" svg:y="2.668cm">
          <text:p text:style-name="P29"><text:span text:style-name="T23">Indic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8" draw:text-style-name="P28" draw:layer="layout" svg:width="6.296cm" svg:height="1.772cm" svg:x="20.34cm" svg:y="8.48cm">
          <text:p text:style-name="P27"><text:span text:style-name="T24">Quantos dias, em média, a empresa esperou para receber dos seus clie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8" draw:text-style-name="P28" draw:layer="layout" svg:width="6.296cm" svg:height="1.772cm" svg:x="20.146cm" svg:y="12.281cm">
          <text:p text:style-name="P27"><text:span text:style-name="T24">Quantos dias, em média, a empresa levou para pagar seus forneced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26" draw:layer="layout" svg:width="10.397cm" svg:height="0.947cm" svg:x="3.142cm" svg:y="15.91cm">
          <text:p text:style-name="P38"><text:span text:style-name="T29">CMV = EI + </text:span><text:span text:style-name="T30">Compras</text:span><text:span text:style-name="T29"> – EF</text:span></text:p>
          <text:p text:style-name="P38"><text:span text:style-name="T30">Compras</text:span><text:span text:style-name="T29"> = CMV – EI + EF</text:span></text:p>
          <text:p text:style-name="P39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" draw:style-name="gr11" draw:text-style-name="P26" draw:layer="layout" svg:width="11.702cm" svg:height="2.537cm" svg:x="14.14cm" svg:y="15.258cm">
          <text:p text:style-name="P40"><text:span text:style-name="T29">Sempre que possível utilizar </text:span><text:span text:style-name="T30">valores médios </text:span><text:span text:style-name="T29">(Estoques, Clientes, Fornecedor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0" draw:layer="layout" svg:width="8.537cm" svg:height="2.293cm" svg:x="10.478cm" svg:y="8.149cm">
          <draw:image xlink:href="Pictures/1000026A00000FD80000044642889B901A8CF152.wmf" xlink:type="simple" xlink:show="embed" xlink:actuate="onLoad" draw:mime-type="image/x-wmf">
            <text:p/>
          </draw:image>
          <draw:image xlink:href="Pictures/1000020100000099000000292DDCF77000005FB1.png" xlink:type="simple" xlink:show="embed" xlink:actuate="onLoad" draw:mime-type="image/png"/>
        </draw:frame>
        <draw:frame draw:style-name="gr9" draw:text-style-name="P30" draw:layer="layout" svg:width="9.596cm" svg:height="2.223cm" svg:x="9.666cm" svg:y="11.748cm">
          <draw:image xlink:href="Pictures/1000027E000013930000048D539091FC2075240E.wmf" xlink:type="simple" xlink:show="embed" xlink:actuate="onLoad" draw:mime-type="image/x-wmf">
            <text:p/>
          </draw:image>
          <draw:image xlink:href="Pictures/10000201000000BD0000002CADF371315B04EEE8.png" xlink:type="simple" xlink:show="embed" xlink:actuate="onLoad" draw:mime-type="image/png"/>
        </draw:frame>
        <draw:frame draw:style-name="gr9" draw:text-style-name="P30" draw:layer="layout" svg:width="8.326cm" svg:height="2.223cm" svg:x="10.548cm" svg:y="5.009cm">
          <draw:image xlink:href="Pictures/1000028E000010F40000048DE1153AD8ED125F9F.wmf" xlink:type="simple" xlink:show="embed" xlink:actuate="onLoad" draw:mime-type="image/x-wmf">
            <text:p/>
          </draw:image>
          <draw:image xlink:href="Pictures/10000201000000A40000002CCDA40CE5AE271FCB.png" xlink:type="simple" xlink:show="embed" xlink:actuate="onLoad" draw:mime-type="image/png"/>
        </draw:frame>
        <presentation:notes draw:style-name="dp3">
          <draw:frame draw:name="Rectangle 7" presentation:style-name="pr17" draw:text-style-name="P32" draw:layer="layout" svg:width="8.254cm" svg:height="1.273cm" svg:x="10.791cm" svg:y="24.126cm" presentation:class="page-number" presentation:user-transformed="true">
            <draw:text-box>
              <text:p text:style-name="P31"><text:span text:style-name="T25"><text:page-number>&lt;número&gt;</text:page-number></text:span></text:p>
            </draw:text-box>
          </draw:frame>
          <draw:page-thumbnail draw:name="Rectangle 2" draw:style-name="gr2" draw:layer="layout" svg:width="15.239cm" svg:height="8.572cm" svg:x="1.905cm" svg:y="3.175cm" draw:page-number="20" presentation:class="page"/>
          <draw:frame draw:name="Rectangle 3" presentation:style-name="pr22" draw:text-style-name="P33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Em_20_branco">
        <draw:frame draw:name="Imagem 1" draw:style-name="gr4" draw:text-style-name="P18" draw:layer="layout" svg:width="30.54cm" svg:height="13.614cm" svg:x="1.183cm" svg:y="3.015cm">
          <draw:image xlink:href="Pictures/100000000000028F0000012452688D06657BCF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_20_branco">
        <draw:custom-shape draw:name="CaixaDeTexto 1" draw:style-name="gr1" draw:text-style-name="P4" draw:layer="layout" svg:width="20.357cm" svg:height="1.945cm" svg:x="2.342cm" svg:y="16.706cm">
          <text:p text:style-name="P3"><text:span text:style-name="T31">Transações e riscos potenciais não reconhecidos no lucro, mas no PL. </text:span></text:p>
          <text:list text:style-name="L15">
            <text:list-item>
              <text:p text:style-name="P3"><text:span text:style-name="T31">Variação Cambi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4" draw:text-style-name="P18" draw:layer="layout" svg:width="25.334cm" svg:height="14.583cm" svg:x="0.749cm" svg:y="0.817cm">
          <draw:image xlink:href="Pictures/100000000000030C000001C168009178F66FEDA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omposição das receitas e despesas" draw:style-name="dp1" draw:master-page-name="Somente_20_título" presentation:presentation-page-layout-name="AL5T19">
        <draw:frame draw:name="Título 2" presentation:style-name="pr23" draw:text-style-name="P7" draw:layer="layout" svg:width="26.673cm" svg:height="3.681cm" svg:x="0.799cm" svg:y="0cm" presentation:class="title" presentation:user-transformed="true">
          <draw:text-box>
            <text:p text:style-name="P6"><text:span text:style-name="T3">Decomposição das receitas e despesas</text:span></text:p>
          </draw:text-box>
        </draw:frame>
        <draw:frame draw:name="Imagem 6" draw:style-name="gr4" draw:text-style-name="P18" draw:layer="layout" svg:width="32.348cm" svg:height="12.175cm" svg:x="0.759cm" svg:y="3.682cm">
          <draw:image xlink:href="Pictures/10000000000003CF0000016FE6C181B6796B7D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omposição das receitas e despesas" draw:style-name="dp1" draw:master-page-name="Somente_20_título" presentation:presentation-page-layout-name="AL5T19">
        <draw:frame draw:name="Título 2" presentation:style-name="pr23" draw:text-style-name="P7" draw:layer="layout" svg:width="26.673cm" svg:height="3.681cm" svg:x="0.799cm" svg:y="0cm" presentation:class="title" presentation:user-transformed="true">
          <draw:text-box>
            <text:p text:style-name="P6"><text:span text:style-name="T3">Decomposição das receitas e despesas</text:span></text:p>
          </draw:text-box>
        </draw:frame>
        <draw:frame draw:name="Imagem 4" draw:style-name="gr4" draw:text-style-name="P18" draw:layer="layout" svg:width="25.928cm" svg:height="5.82cm" svg:x="2.231cm" svg:y="2.978cm">
          <draw:image xlink:href="Pictures/10000000000003D4000000DCA52E80C22E5B4F66.png" xlink:type="simple" xlink:show="embed" xlink:actuate="onLoad" draw:mime-type="image/png">
            <text:p/>
          </draw:image>
        </draw:frame>
        <draw:frame draw:name="Imagem 5" draw:style-name="gr4" draw:text-style-name="P18" draw:layer="layout" svg:width="25.902cm" svg:height="7.116cm" svg:x="2.645cm" svg:y="9.335cm">
          <draw:image xlink:href="Pictures/10000000000003D30000010DCDF093C3E0D631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24" presentation:class="page"/>
          <draw:frame presentation:style-name="pr2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Slide_20_de_20_título" presentation:presentation-page-layout-name="AL1T0">
        <draw:frame draw:name="Título 1" presentation:style-name="pr13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7">Red Flags</text:span></text:p>
          </draw:text-box>
        </draw:frame>
        <draw:frame draw:name="Subtítulo 2" presentation:style-name="pr26" draw:text-style-name="P41" draw:layer="layout" svg:width="25.399cm" svg:height="4.598cm" svg:x="4.233cm" svg:y="10.006cm" presentation:class="subtitle" presentation:user-transformed="true">
          <draw:text-box>
            <text:p text:style-name="P34"><text:span text:style-name="T32">Pontos de atenção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25" presentation:class="page"/>
          <draw:frame presentation:style-name="pr2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Em_20_branco">
        <draw:frame draw:name="Imagem 1" draw:style-name="gr4" draw:text-style-name="P18" draw:layer="layout" svg:width="20.769cm" svg:height="15.609cm" svg:x="6.548cm" svg:y="1.72cm">
          <draw:image xlink:href="Pictures/10000000000003110000024E9D5CAD5C817A38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lide_20_de_20_título" presentation:presentation-page-layout-name="AL1T0">
        <draw:frame draw:name="Título 1" presentation:style-name="pr13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7">Indicadores Tributários</text:span></text:p>
          </draw:text-box>
        </draw:frame>
        <draw:frame draw:name="Subtítulo 2" presentation:style-name="pr28" draw:text-style-name="P10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VA" draw:style-name="dp1" draw:master-page-name="Título_20_e_20_conteúdo" presentation:presentation-page-layout-name="AL2T11">
        <draw:frame draw:name="Título 1" presentation:style-name="pr3" draw:text-style-name="P7" draw:layer="layout" svg:width="25.721cm" svg:height="3.681cm" svg:x="1.752cm" svg:y="0cm" presentation:class="title" presentation:user-transformed="true">
          <draw:text-box>
            <text:p text:style-name="P6"><text:span text:style-name="T3">DVA</text:span></text:p>
          </draw:text-box>
        </draw:frame>
        <draw:frame draw:name="Imagem 3" draw:style-name="gr12" draw:text-style-name="P18" draw:layer="layout" svg:width="8.555cm" svg:height="7.294cm" svg:x="0.428cm" svg:y="2.274cm">
          <draw:image xlink:href="Pictures/10000000000006D1000001656BFD9567CC278A0C.png" xlink:type="simple" xlink:show="embed" xlink:actuate="onLoad" draw:mime-type="image/png">
            <text:p/>
          </draw:image>
        </draw:frame>
        <draw:frame draw:name="Imagem 5" draw:style-name="gr13" draw:text-style-name="P18" draw:layer="layout" svg:width="7.311cm" svg:height="6.656cm" svg:x="0.736cm" svg:y="9.525cm">
          <draw:image xlink:href="Pictures/10000000000006D1000001656BFD9567CC278A0C.png" xlink:type="simple" xlink:show="embed" xlink:actuate="onLoad" draw:mime-type="image/png">
            <text:p/>
          </draw:image>
        </draw:frame>
        <draw:frame draw:name="Imagem 7" draw:style-name="gr4" draw:text-style-name="P18" draw:layer="layout" svg:width="16.302cm" svg:height="9.087cm" svg:x="17.01cm" svg:y="4.174cm">
          <draw:image xlink:href="Pictures/10007A08000031AB00001BA9851BEC02E853FA94.emf" xlink:type="simple" xlink:show="embed" xlink:actuate="onLoad" draw:mime-type="image/x-emf">
            <text:p/>
          </draw:image>
          <draw:image xlink:href="Pictures/10000201000001E10000010CB879CEE62BF2BEE9.png" xlink:type="simple" xlink:show="embed" xlink:actuate="onLoad" draw:mime-type="image/png"/>
        </draw:frame>
        <draw:frame draw:name="Imagem 8" draw:style-name="gr14" draw:text-style-name="P18" draw:layer="layout" svg:width="7.967cm" svg:height="7.294cm" svg:x="8.454cm" svg:y="2.274cm">
          <draw:image xlink:href="Pictures/10000000000006D1000001656BFD9567CC278A0C.png" xlink:type="simple" xlink:show="embed" xlink:actuate="onLoad" draw:mime-type="image/png">
            <text:p/>
          </draw:image>
        </draw:frame>
        <draw:frame draw:name="Imagem 9" draw:style-name="gr15" draw:text-style-name="P18" draw:layer="layout" svg:width="7.967cm" svg:height="6.656cm" svg:x="8.395cm" svg:y="9.569cm">
          <draw:image xlink:href="Pictures/10000000000006D1000001656BFD9567CC278A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Em_20_branco">
        <draw:custom-shape draw:name="Texto Explicativo: Linha com Borda e Ênfase 4" draw:style-name="gr16" draw:text-style-name="P42" xml:id="id1" draw:id="id1" draw:layer="layout" svg:width="5.365cm" svg:height="5.327cm" svg:x="28.207cm" svg:y="6.115cm">
          <text:p text:style-name="P40"><text:span text:style-name="T33">Qual é a Liquidez desses ativos ?</text:span></text:p>
          <draw:enhanced-geometry draw:mirror-horizontal="true" draw:mirror-vertical="false" draw:text-areas="0 0 ?f4 ?f7" svg:viewBox="0 0 0 0" draw:type="ooxml-accentBorderCallout1" draw:modifiers="22093 104306 -8673 128856" draw:enhanced-path="M 0 0 L ?f4 0 ?f4 ?f7 0 ?f7 Z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frame draw:name="Imagem 1" draw:style-name="gr4" draw:text-style-name="P18" draw:layer="layout" svg:width="26.53cm" svg:height="13.722cm" svg:x="0cm" svg:y="2.063cm">
          <draw:image xlink:href="Pictures/100000000000030F00000195AD20DE5BCE66540C.png" xlink:type="simple" xlink:show="embed" xlink:actuate="onLoad" draw:mime-type="image/png">
            <text:p/>
          </draw:image>
        </draw:frame>
        <draw:custom-shape draw:name="Retângulo 2" draw:style-name="gr17" draw:text-style-name="P28" draw:layer="layout" svg:width="9.596cm" svg:height="5.564cm" svg:x="16.933cm" svg:y="2.269cm">
          <text:p text:style-name="P40"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3">
          <draw:page-thumbnail draw:name="Espaço Reservado para Imagem de Slide 1" draw:style-name="gr2" draw:layer="layout" svg:width="15.239cm" svg:height="8.572cm" svg:x="1.905cm" svg:y="3.175cm" draw:page-number="29" presentation:class="page"/>
          <draw:frame draw:name="Espaço Reservado para Anotações 2" presentation:style-name="pr29" draw:text-style-name="P33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30" draw:text-style-name="P32" draw:layer="layout" svg:width="8.254cm" svg:height="1.273cm" svg:x="10.791cm" svg:y="24.126cm" presentation:class="page-number" presentation:user-transformed="true">
            <draw:text-box>
              <text:p text:style-name="P31"><text:span text:style-name="T34"><text:page-number>&lt;número&gt;</text:page-number></text:span></text:p>
            </draw:text-box>
          </draw:frame>
        </presentation:notes>
      </draw:page>
      <draw:page draw:name="page30" draw:style-name="dp1" draw:master-page-name="Em_20_branco">
        <draw:frame draw:name="Imagem 2" draw:style-name="gr4" draw:text-style-name="P18" draw:layer="layout" svg:width="23.671cm" svg:height="15.88cm" svg:x="3.194cm" svg:y="0.749cm">
          <draw:image xlink:href="Pictures/1000000000000316000002122883DFCD1898F6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Em_20_branco">
        <draw:frame draw:name="Imagem 2" draw:style-name="gr4" draw:text-style-name="P18" draw:layer="layout" svg:width="23.956cm" svg:height="16.857cm" svg:x="3.395cm" svg:y="0.272cm">
          <draw:image xlink:href="Pictures/10000000000003190000022E57E6888431CF1E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Em_20_branco">
        <draw:frame draw:name="Imagem 1" draw:style-name="gr4" draw:text-style-name="P18" draw:layer="layout" svg:width="15.823cm" svg:height="19.049cm" svg:x="0cm" svg:y="0cm">
          <draw:image xlink:href="Pictures/10000000000002D1000003646505E9E4E9C19B64.png" xlink:type="simple" xlink:show="embed" xlink:actuate="onLoad" draw:mime-type="image/png">
            <text:p/>
          </draw:image>
        </draw:frame>
        <draw:frame draw:name="Imagem 2" draw:style-name="gr4" draw:text-style-name="P18" draw:layer="layout" svg:width="17.033cm" svg:height="10.878cm" svg:x="16.198cm" svg:y="3.77cm">
          <draw:image xlink:href="Pictures/10000000000002CA000001C8F4EFB5C5A1701F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Em_20_branco">
        <draw:frame draw:name="Imagem 1" draw:style-name="gr4" draw:text-style-name="P18" draw:layer="layout" svg:width="25.562cm" svg:height="5.989cm" svg:x="1.192cm" svg:y="0.725cm">
          <draw:image xlink:href="Pictures/10000000000002CD000000A8BEBD9F9D88415911.png" xlink:type="simple" xlink:show="embed" xlink:actuate="onLoad" draw:mime-type="image/png">
            <text:p/>
          </draw:image>
        </draw:frame>
        <draw:frame draw:name="Imagem 2" draw:style-name="gr4" draw:text-style-name="P18" draw:layer="layout" svg:width="22.55cm" svg:height="11.415cm" svg:x="1.192cm" svg:y="6.715cm">
          <draw:image xlink:href="Pictures/10000000000002CF0000016C738221338A81AB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lide_20_de_20_título" presentation:presentation-page-layout-name="AL1T0">
        <draw:frame draw:name="Título 1_0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Análise Contábil e Fiscal das Demonstrações Contábeis</text:span><text:span text:style-name="T1"><text:line-break/></text:span><text:span text:style-name="T1"><text:line-break/></text:span><text:span text:style-name="T1">IFES</text:span></text:p>
          </draw:text-box>
        </draw:frame>
        <draw:custom-shape draw:name="CaixaDeTexto 3_1" draw:style-name="gr18" draw:text-style-name="P43" draw:layer="layout" svg:width="6.188cm" svg:height="1.267cm" svg:x="20.89cm" svg:y="15.945cm">
          <text:p text:style-name="P3"><text:span text:style-name="T2">Prof. Dalmone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lide_20_de_20_título" presentation:presentation-page-layout-name="AL3T1">
        <draw:frame presentation:style-name="pr31" draw:layer="layout" svg:width="25.399cm" svg:height="6.631cm" svg:x="4.233cm" svg:y="3.118cm" presentation:class="title" presentation:placeholder="true">
          <draw:text-box/>
        </draw:frame>
        <draw:frame presentation:style-name="pr11" draw:layer="layout" svg:width="30.479cm" svg:height="11.048cm" svg:x="1.693cm" svg:y="4.457cm" presentation:class="outline" presentation:user-transformed="true">
          <draw:text-box>
            <text:list text:style-name="L6">
              <text:list-item>
                <text:p>Tem um questionário que está em três matérias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/>
    <style:font-face style:name="Arial1" svg:font-family="Arial" style:font-family-generic="swiss"/>
    <style:font-face style:name="Calibri2" svg:font-family="Calibri" style:font-family-generic="swiss"/>
    <style:font-face style:name="Arial2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Microsoft YaHei" svg:font-family="'Microsoft YaHei'" style:font-family-generic="modern" style:font-pitch="variable"/>
    <style:font-face style:name="Segoe UI1" svg:font-family="'Segoe UI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1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ＭＳ Ｐゴシック1" svg:font-family="'ＭＳ Ｐゴシック'" style:font-family-generic="modern" style:font-pitch="fixe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solid" draw:fill-color="#ffffff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false" style:shrink-to-fit="true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.1cm" fo:margin-bottom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false" style:shrink-to-fit="true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outline2" style:display-name="Em branco-outline2" style:family="presentation" style:parent-style-name="Em_20_branc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Em_20_branco-outline3" style:display-name="Em branco-outline3" style:family="presentation" style:parent-style-name="Em_20_branc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Em_20_branco-outline4" style:display-name="Em branco-outline4" style:family="presentation" style:parent-style-name="Em_20_branc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texto_20_e_20_2_20_partes_20_de_20_conteúdo-background" style:display-name="Título e texto e 2 partes de conteúdo-background" style:family="presentation">
      <style:graphic-properties draw:stroke="none" draw:fill="solid" draw:fill-color="#ffffff"/>
      <style:text-properties style:letter-kerning="true"/>
    </style:style>
    <style:style style:name="Título_20_e_20_texto_20_e_20_2_20_partes_20_de_20_conteúdo-backgroundobjects" style:display-name="Título e texto e 2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texto_20_e_20_2_20_partes_20_de_20_conteúdo-notes" style:display-name="Título e texto e 2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texto_20_e_20_2_20_partes_20_de_20_conteúdo-outline1" style:display-name="Título e texto e 2 partes de conteúdo-outline1" style:family="presentation">
      <style:graphic-properties draw:stroke="none" draw:fill="none" draw:auto-grow-height="false" draw:fit-to-size="false" style:shrink-to-fit="true">
        <text:list-style style:name="Título_20_e_20_texto_20_e_20_2_20_partes_20_de_20_conteúdo-outline1" style:display-name="Título e texto e 2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texto_20_e_20_2_20_partes_20_de_20_conteúdo-outline2" style:display-name="Título e texto e 2 partes de conteúdo-outline2" style:family="presentation" style:parent-style-name="Título_20_e_20_texto_20_e_20_2_20_partes_20_de_20_conteú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ítulo_20_e_20_texto_20_e_20_2_20_partes_20_de_20_conteúdo-outline3" style:display-name="Título e texto e 2 partes de conteúdo-outline3" style:family="presentation" style:parent-style-name="Título_20_e_20_texto_20_e_20_2_20_partes_20_de_20_conteú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ítulo_20_e_20_texto_20_e_20_2_20_partes_20_de_20_conteúdo-outline4" style:display-name="Título e texto e 2 partes de conteúdo-outline4" style:family="presentation" style:parent-style-name="Título_20_e_20_texto_20_e_20_2_20_partes_20_de_20_conteú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ítulo_20_e_20_texto_20_e_20_2_20_partes_20_de_20_conteúdo-outline5" style:display-name="Título e texto e 2 partes de conteúdo-outline5" style:family="presentation" style:parent-style-name="Título_20_e_20_texto_20_e_20_2_20_partes_20_d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texto_20_e_20_2_20_partes_20_de_20_conteúdo-outline6" style:display-name="Título e texto e 2 partes de conteúdo-outline6" style:family="presentation" style:parent-style-name="Título_20_e_20_texto_20_e_20_2_20_partes_20_d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texto_20_e_20_2_20_partes_20_de_20_conteúdo-outline7" style:display-name="Título e texto e 2 partes de conteúdo-outline7" style:family="presentation" style:parent-style-name="Título_20_e_20_texto_20_e_20_2_20_partes_20_d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texto_20_e_20_2_20_partes_20_de_20_conteúdo-outline8" style:display-name="Título e texto e 2 partes de conteúdo-outline8" style:family="presentation" style:parent-style-name="Título_20_e_20_texto_20_e_20_2_20_partes_20_d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texto_20_e_20_2_20_partes_20_de_20_conteúdo-outline9" style:display-name="Título e texto e 2 partes de conteúdo-outline9" style:family="presentation" style:parent-style-name="Título_20_e_20_texto_20_e_20_2_20_partes_20_d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texto_20_e_20_2_20_partes_20_de_20_conteúdo-subtitle" style:display-name="Título e texto e 2 partes de conteúdo-subtitle" style:family="presentation">
      <style:graphic-properties draw:stroke="none" draw:fill="none" draw:textarea-vertical-align="middle">
        <text:list-style style:name="Título_20_e_20_texto_20_e_20_2_20_partes_20_de_20_conteúdo-subtitle" style:display-name="Título e texto e 2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texto_20_e_20_2_20_partes_20_de_20_conteúdo-title" style:display-name="Título e texto e 2 partes de conteúdo-title" style:family="presentation">
      <style:graphic-properties draw:stroke="none" draw:fill="none" draw:textarea-vertical-align="middle">
        <text:list-style style:name="Título_20_e_20_texto_20_e_20_2_20_partes_20_de_20_conteúdo-title" style:display-name="Título e texto e 2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false" style:shrink-to-fit="true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uas_20_Partes_20_d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Duas_20_Partes_20_d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Duas_20_Partes_20_d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Duas_20_Partes_20_d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Em_20_branc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Em_20_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Título_20_e_20_texto_20_e_20_2_20_partes_20_d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ítulo_20_e_20_texto_20_e_20_2_20_partes_20_d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Título_20_e_20_texto_20_e_20_2_20_partes_20_d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ítulo_20_e_20_texto_20_e_20_2_20_partes_20_d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ítulo_20_e_20_texto_20_e_20_2_20_partes_20_d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Soment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Somente_20_títul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Somente_20_títul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32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39629f" loext:opacity="100%" style:text-line-through-style="none" style:text-line-through-type="none" style:text-position="0% 100%" style:font-name="Arial" fo:font-size="60pt" fo:letter-spacing="normal" fo:language="pt" fo:country="BR" fo:font-style="normal" style:text-underline-style="none" fo:font-weight="norm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39629f" loext:opacity="100%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4" style:family="text">
      <style:text-properties fo:font-variant="normal" fo:text-transform="none" fo:color="#808080" loext:opacity="100%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808080" loext:opacity="100%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808080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39629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80808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80808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80808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80808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80808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80808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80808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style:font-name="Arial" fo:color="#80808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80808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80808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80808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80808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3" presentation:style-name="Mpr2" draw:text-style-name="MP8" draw:layer="backgroundobjects" svg:width="7.619cm" svg:height="1.013cm" svg:x="0.799cm" svg:y="17.49cm" presentation:class="date-time" presentation:user-transformed="true">
        <draw:text-box>
          <text:p text:style-name="MP7"><text:span text:style-name="MT2"><text:date style:data-style-name="D1" text:date-value="2024-02-29">29/02/24</text:date></text:span></text:p>
        </draw:text-box>
      </draw:frame>
      <draw:frame draw:name="Espaço Reservado para Rodapé 4" presentation:style-name="Mpr2" draw:text-style-name="MP8" draw:layer="backgroundobjects" svg:width="11.429cm" svg:height="1.013cm" svg:x="8.678cm" svg:y="17.49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4.561cm" svg:height="1.013cm" svg:x="20.368cm" svg:y="17.51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Título 1" presentation:style-name="Mpr5" draw:text-style-name="MP11" draw:layer="backgroundobjects" svg:width="25.721cm" svg:height="3.681cm" svg:x="1.752cm" svg:y="0cm" presentation:class="title" presentation:user-transformed="true">
        <draw:text-box>
          <text:p text:style-name="MP10"><text:span text:style-name="MT3">Clique para editar o título mestre</text:span></text:p>
        </draw:text-box>
      </draw:frame>
      <draw:frame draw:name="Espaço Reservado para Conteúdo 2" presentation:style-name="Mpr6" draw:text-style-name="MP14" draw:layer="backgroundobjects" svg:width="30.45cm" svg:height="12.76cm" svg:x="1.752cm" svg:y="4.216cm" presentation:class="outline" presentation:user-transformed="true">
        <draw:text-box>
          <text:list text:style-name="ML5">
            <text:list-item>
              <text:p text:style-name="MP12"><text:span text:style-name="MT4">Clique para editar o texto mestre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8" draw:layer="backgroundobjects" svg:width="7.619cm" svg:height="1.013cm" svg:x="0.799cm" svg:y="17.49cm" presentation:class="date-time" presentation:user-transformed="true">
        <draw:text-box>
          <text:p text:style-name="MP7"><text:span text:style-name="MT2"><text:date style:data-style-name="D1" text:date-value="2024-02-29">29/02/24</text:date></text:span></text:p>
        </draw:text-box>
      </draw:frame>
      <draw:frame draw:name="Espaço Reservado para Rodapé 4" presentation:style-name="Mpr7" draw:text-style-name="MP8" draw:layer="backgroundobjects" svg:width="11.429cm" svg:height="1.013cm" svg:x="8.678cm" svg:y="17.49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8" draw:layer="backgroundobjects" svg:width="4.561cm" svg:height="1.013cm" svg:x="20.368cm" svg:y="17.51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2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draw:frame draw:name="Título 1" presentation:style-name="Mpr10" draw:text-style-name="MP11" draw:layer="backgroundobjects" svg:width="26.673cm" svg:height="3.681cm" svg:x="0.799cm" svg:y="0cm" presentation:class="title" presentation:user-transformed="true">
        <draw:text-box>
          <text:p text:style-name="MP10"><text:span text:style-name="MT3">Clique para editar o título mestre</text:span></text:p>
        </draw:text-box>
      </draw:frame>
      <draw:frame draw:name="Espaço Reservado para Conteúdo 2" presentation:style-name="Mpr11" draw:text-style-name="MP14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que para editar o texto mestre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1" draw:text-style-name="MP14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2"><text:span text:style-name="MT4">Clique para editar o texto mestre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12" draw:text-style-name="MP8" draw:layer="backgroundobjects" svg:width="7.619cm" svg:height="1.013cm" svg:x="0.799cm" svg:y="17.49cm" presentation:class="date-time" presentation:user-transformed="true">
        <draw:text-box>
          <text:p text:style-name="MP7"><text:span text:style-name="MT2"><text:date style:data-style-name="D1" text:date-value="2024-02-29">29/02/24</text:date></text:span></text:p>
        </draw:text-box>
      </draw:frame>
      <draw:frame draw:name="Espaço Reservado para Rodapé 5" presentation:style-name="Mpr12" draw:text-style-name="MP8" draw:layer="backgroundobjects" svg:width="11.429cm" svg:height="1.013cm" svg:x="8.678cm" svg:y="17.49cm" presentation:class="footer" presentation:user-transformed="true">
        <draw:text-box>
          <text:p/>
        </draw:text-box>
      </draw:frame>
      <draw:frame draw:name="Espaço Reservado para Número de Slide 6" presentation:style-name="Mpr12" draw:text-style-name="MP8" draw:layer="backgroundobjects" svg:width="4.561cm" svg:height="1.013cm" svg:x="20.368cm" svg:y="17.51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2">
        <draw:page-thumbnail presentation:style-name="Duas_20_Partes_20_de_20_Conteúdo-title" draw:layer="backgroundobjects" svg:width="19.798cm" svg:height="11.136cm" svg:x="0.6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Em_20_branco" style:display-name="Em branco" style:page-layout-name="PM1" draw:style-name="Mdp1">
      <draw:frame draw:name="Espaço Reservado para Data 1" presentation:style-name="Mpr15" draw:text-style-name="MP8" draw:layer="backgroundobjects" svg:width="7.619cm" svg:height="1.013cm" svg:x="0.799cm" svg:y="17.49cm" presentation:class="date-time" presentation:user-transformed="true">
        <draw:text-box>
          <text:p text:style-name="MP7"><text:span text:style-name="MT2"><text:date style:data-style-name="D1" text:date-value="2024-02-29">29/02/24</text:date></text:span></text:p>
        </draw:text-box>
      </draw:frame>
      <draw:frame draw:name="Espaço Reservado para Rodapé 2" presentation:style-name="Mpr15" draw:text-style-name="MP8" draw:layer="backgroundobjects" svg:width="11.429cm" svg:height="1.013cm" svg:x="8.678cm" svg:y="17.49cm" presentation:class="footer" presentation:user-transformed="true">
        <draw:text-box>
          <text:p/>
        </draw:text-box>
      </draw:frame>
      <draw:frame draw:name="Espaço Reservado para Número de Slide 3" presentation:style-name="Mpr15" draw:text-style-name="MP8" draw:layer="backgroundobjects" svg:width="4.561cm" svg:height="1.013cm" svg:x="20.368cm" svg:y="17.51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Em_20_branco-title" draw:layer="backgroundobjects" svg:width="30.479cm" svg:height="3.18cm" svg:x="1.693cm" svg:y="0.76cm" presentation:class="title" presentation:placeholder="true">
        <draw:text-box/>
      </draw:frame>
      <draw:frame presentation:style-name="Em_20_br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Em_20_branco-title" draw:layer="backgroundobjects" svg:width="19.798cm" svg:height="11.136cm" svg:x="0.6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texto_20_e_20_2_20_partes_20_de_20_conteúdo" style:display-name="Título e texto e 2 partes de conteúdo" style:page-layout-name="PM1" draw:style-name="Mdp1">
      <draw:frame draw:name="Título 1" presentation:style-name="Mpr18" draw:text-style-name="MP11" draw:layer="backgroundobjects" svg:width="31.432cm" svg:height="1.944cm" svg:x="1.693cm" svg:y="0.595cm" presentation:class="title" presentation:user-transformed="true">
        <draw:text-box>
          <text:p text:style-name="MP10"><text:span text:style-name="MT3">Clique para editar o estilo do título mestre</text:span></text:p>
        </draw:text-box>
      </draw:frame>
      <draw:frame draw:name="Espaço Reservado para Texto 2" presentation:style-name="Mpr19" draw:text-style-name="MP14" draw:layer="backgroundobjects" svg:width="15.451cm" svg:height="13.224cm" svg:x="1.693cm" svg:y="3.709cm" presentation:class="outline" presentation:user-transformed="true">
        <draw:text-box>
          <text:list text:style-name="ML5">
            <text:list-item>
              <text:p text:style-name="MP12"><text:span text:style-name="MT4">Clique para editar os estilos do texto mestre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9" draw:text-style-name="MP14" draw:layer="backgroundobjects" svg:width="15.457cm" svg:height="6.398cm" svg:x="17.709cm" svg:y="3.709cm" presentation:class="outline" presentation:user-transformed="true">
        <draw:text-box>
          <text:list text:style-name="ML5">
            <text:list-item>
              <text:p text:style-name="MP12"><text:span text:style-name="MT4">Clique para editar os estilos do texto mestre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4" presentation:style-name="Mpr19" draw:text-style-name="MP14" draw:layer="backgroundobjects" svg:width="15.457cm" svg:height="6.402cm" svg:x="17.709cm" svg:y="10.53cm" presentation:class="outline" presentation:user-transformed="true">
        <draw:text-box>
          <text:list text:style-name="ML5">
            <text:list-item>
              <text:p text:style-name="MP12"><text:span text:style-name="MT4">Clique para editar os estilos do texto mestre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3" presentation:style-name="Mpr20" draw:text-style-name="MP8" draw:layer="backgroundobjects" svg:width="4.561cm" svg:height="1.013cm" svg:x="20.368cm" svg:y="17.51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2">
        <draw:page-thumbnail presentation:style-name="Título_20_e_20_texto_20_e_20_2_20_partes_20_de_20_conteúdo-title" draw:layer="backgroundobjects" svg:width="19.798cm" svg:height="11.136cm" svg:x="0.6cm" svg:y="2.257cm" presentation:class="page"/>
        <draw:frame presentation:style-name="Título_20_e_20_texto_20_e_20_2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omente_20_título" style:display-name="Somente título" style:page-layout-name="PM1" draw:style-name="Mdp1">
      <draw:frame draw:name="Título 1" presentation:style-name="Mpr23" draw:text-style-name="MP11" draw:layer="backgroundobjects" svg:width="26.673cm" svg:height="3.681cm" svg:x="0.799cm" svg:y="0cm" presentation:class="title" presentation:user-transformed="true">
        <draw:text-box>
          <text:p text:style-name="MP10"><text:span text:style-name="MT3">Clique para editar o título mestre</text:span></text:p>
        </draw:text-box>
      </draw:frame>
      <draw:frame draw:name="Espaço Reservado para Data 2" presentation:style-name="Mpr24" draw:text-style-name="MP8" draw:layer="backgroundobjects" svg:width="7.619cm" svg:height="1.013cm" svg:x="0.799cm" svg:y="17.49cm" presentation:class="date-time" presentation:user-transformed="true">
        <draw:text-box>
          <text:p text:style-name="MP7"><text:span text:style-name="MT2"><text:date style:data-style-name="D1" text:date-value="2024-02-29">29/02/24</text:date></text:span></text:p>
        </draw:text-box>
      </draw:frame>
      <draw:frame draw:name="Espaço Reservado para Rodapé 3" presentation:style-name="Mpr24" draw:text-style-name="MP8" draw:layer="backgroundobjects" svg:width="11.429cm" svg:height="1.013cm" svg:x="8.678cm" svg:y="17.49cm" presentation:class="footer" presentation:user-transformed="true">
        <draw:text-box>
          <text:p/>
        </draw:text-box>
      </draw:frame>
      <draw:frame draw:name="Espaço Reservado para Número de Slide 4" presentation:style-name="Mpr24" draw:text-style-name="MP8" draw:layer="backgroundobjects" svg:width="4.561cm" svg:height="1.013cm" svg:x="20.368cm" svg:y="17.51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Soment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omente_20_título-title" draw:layer="backgroundobjects" svg:width="16.932cm" svg:height="9.524cm" svg:x="1.058cm" svg:y="1.93cm" presentation:class="page"/>
        <draw:frame presentation:style-name="Somente_20_título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presentação do PowerPoint</dc:title>
    <meta:initial-creator>Péricles Barbosa Alves</meta:initial-creator>
    <meta:editing-cycles>155</meta:editing-cycles>
    <meta:creation-date>2018-08-13T19:49:34</meta:creation-date>
    <dc:date>2024-02-29T16:32:55.934000000</dc:date>
    <meta:editing-duration>P1DT3H27M6S</meta:editing-duration>
    <meta:generator>LibreOffice/7.1.4.2$Windows_X86_64 LibreOffice_project/a529a4fab45b75fefc5b6226684193eb000654f6</meta:generator>
    <meta:document-statistic meta:object-count="291"/>
    <meta:user-defined meta:name="AppVersion">16.0000</meta:user-defined>
    <meta:user-defined meta:name="Notes" meta:value-type="float">5</meta:user-defined>
    <meta:user-defined meta:name="PresentationFormat">Widescreen</meta:user-defined>
    <meta:user-defined meta:name="Slides" meta:value-type="float">37</meta:user-defined>
  </office:meta>
</office:document-meta>
</file>